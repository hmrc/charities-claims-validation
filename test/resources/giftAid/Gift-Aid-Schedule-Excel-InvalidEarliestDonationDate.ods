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string" table:style-name="ce33">
            <text:p>dfff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99999999999991.906" table:style-name="ce35">
            <text:p>99,999,999,999,991.90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450" table:formula="of:=SUM([.K25:.K1024])" table:number-columns-spanned="2" table:number-rows-spanned="1" table:style-name="ce66">
            <text:p>£1,45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</text:p>
          </table:table-cell>
          <table:table-cell office:value-type="string" table:style-name="ce43">
            <text:p>House Martin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8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5">
            <text:p>100 Champs Elysees,<text:s/></text:p>
            <text:p>Paris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meta:initial-creator>Rundle, Michael</meta:initial-creator>
    <dc:creator>Singh, Suryabala</dc:creator>
    <meta:creation-date>2024-08-29T06:55:19Z</meta:creation-date>
    <dc:date>2026-01-14T12:15:00Z</dc:date>
    <meta:editing-cycles>1</meta:editing-cycles>
    <meta:editing-duration>PT0S</meta:editing-duration>
  </office:meta>
</office:document-meta>
</file>