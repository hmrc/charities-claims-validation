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7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7" style:family="table-cell" style:parent-style-name="Default" style:data-style-name="N30">
      <style:table-cell-properties fo:border="thin solid #000000" fo:background-color="#FFFFFF" style:cell-protect="none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3" style:font-name-asian="Arial3" style:font-name-complex="Arial3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20pt" style:use-optimal-row-height="false" fo:break-before="auto"/>
    </style:style>
    <style:style style:name="ro13" style:family="table-row">
      <style:table-row-properties style:row-height="17pt" style:use-optimal-row-height="true" fo:break-before="auto"/>
    </style:style>
    <style:style style:name="ro14" style:family="table-row">
      <style:table-row-properties style:row-height="18pt" style:use-optimal-row-height="tru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4.25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7"/>
        <table:table-row table:style-name="ro1">
          <table:table-cell table:style-name="ce1"/>
          <table:table-cell office:value-type="string" table:number-columns-spanned="10" table:number-rows-spanned="1" table:style-name="ce58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9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60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6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office:value-type="date" office:date-value="2017-11-10T00:00:00" table:style-name="ce33">
            <text:p>10/11/17</text:p>
          </table:table-cell>
          <table:table-cell table:style-name="ce34"/>
          <table:table-cell table:number-columns-spanned="6" table:number-rows-spanned="1" table:style-name="ce62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0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63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table:style-name="ce35"/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office:value-type="string" table:number-columns-spanned="10" table:number-rows-spanned="1" table:style-name="ce64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65">
            <text:p>Total donations:</text:p>
          </table:table-cell>
          <table:covered-table-cell/>
          <table:table-cell office:value-type="currency" office:value="1700" table:formula="of:=SUM([.K25:.K1024])" table:number-columns-spanned="2" table:number-rows-spanned="1" table:style-name="ce66">
            <text:p>£1,70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style-name="ce1"/>
          <table:table-cell office:value-type="string" table:number-columns-spanned="10" table:number-rows-spanned="1" table:style-name="ce59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0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Prof</text:p>
          </table:table-cell>
          <table:table-cell office:value-type="string" table:style-name="ce44">
            <text:p>Henry <text:s text:c="2"/>Multiple <text:s text:c="3"/>Spaces</text:p>
          </table:table-cell>
          <table:table-cell office:value-type="string" table:style-name="ce43">
            <text:p>House <text:s text:c="5"/>Martin</text:p>
          </table:table-cell>
          <table:table-cell office:value-type="string" table:style-name="ce43">
            <text:p>152A <text:s text:c="3"/>Multiple <text:s text:c="3"/>Spaces</text:p>
          </table:table-cell>
          <table:table-cell office:value-type="string" table:style-name="ce43">
            <text:p>M99 2QD</text:p>
          </table:table-cell>
          <table:table-cell table:style-name="ce45"/>
          <table:table-cell table:style-name="ce46"/>
          <table:table-cell office:value-type="date" office:date-value="2015-03-24T00:00:00" table:style-name="ce47">
            <text:p>24/03/15</text:p>
          </table:table-cell>
          <table:table-cell office:value-type="float" office:value="240" table:style-name="ce48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" table:style-name="ce42">
            <text:p>2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John <text:s text:c="3"/>Multiple <text:s text:c="3"/>Spaces</text:p>
          </table:table-cell>
          <table:table-cell office:value-type="string" table:style-name="ce43">
            <text:p>Smith <text:s/>Multiple <text:s text:c="3"/>Spaces</text:p>
          </table:table-cell>
          <table:table-cell office:value-type="string" table:style-name="ce43">
            <text:p>100 <text:s text:c="4"/>Champs <text:s text:c="5"/>Elysees, <text:s text:c="4"/>Paris</text:p>
          </table:table-cell>
          <table:table-cell office:value-type="string" table:style-name="ce43">
            <text:p>X</text:p>
          </table:table-cell>
          <table:table-cell table:style-name="ce45"/>
          <table:table-cell table:style-name="ce46"/>
          <table:table-cell office:value-type="date" office:date-value="2015-06-24T00:00:00" table:style-name="ce47">
            <text:p>24/06/15</text:p>
          </table:table-cell>
          <table:table-cell office:value-type="float" office:value="250" table:style-name="ce48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office:value-type="string" table:style-name="ce45">
            <text:p>One <text:s text:c="2"/>off <text:s text:c="3"/>Gift <text:s text:c="3"/>Aid <text:s text:c="3"/>donations</text:p>
          </table:table-cell>
          <table:table-cell table:style-name="ce46"/>
          <table:table-cell office:value-type="date" office:date-value="2015-03-31T00:00:00" table:style-name="ce47">
            <text:p>31/03/15</text:p>
          </table:table-cell>
          <table:table-cell office:value-type="float" office:value="880" table:style-name="ce48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" table:style-name="ce42">
            <text:p>4</text:p>
          </table:table-cell>
          <table:table-cell office:value-type="string" table:style-name="ce44">
            <text:p>Mis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Chaudry</text:p>
          </table:table-cell>
          <table:table-cell office:value-type="string" table:style-name="ce44">
            <text:p>21</text:p>
          </table:table-cell>
          <table:table-cell office:value-type="string" table:style-name="ce44">
            <text:p>L43 4FB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15-04-26T00:00:00" table:style-name="ce47">
            <text:p>26/04/15</text:p>
          </table:table-cell>
          <table:table-cell office:value-type="float" office:value="80" table:style-name="ce48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" table:style-name="ce42">
            <text:p>5</text:p>
          </table:table-cell>
          <table:table-cell office:value-type="string" table:style-name="ce43">
            <text:p>Mr</text:p>
          </table:table-cell>
          <table:table-cell office:value-type="string" table:style-name="ce67">
            <text:p>John</text:p>
          </table:table-cell>
          <table:table-cell office:value-type="string" table:style-name="ce43">
            <text:p>Smith</text:p>
          </table:table-cell>
          <table:table-cell office:value-type="string" table:style-name="ce45">
            <text:p>100 <text:s text:c="5"/>Champs Elysees,</text:p>
            <text:p><text:s/><text:span text:style-name="T6">Paris</text:span></text:p>
          </table:table-cell>
          <table:table-cell office:value-type="string" table:style-name="ce43">
            <text:p>X</text:p>
          </table:table-cell>
          <table:table-cell table:style-name="ce45"/>
          <table:table-cell table:style-name="ce46"/>
          <table:table-cell office:value-type="date" office:date-value="2015-06-24T00:00:00" table:style-name="ce47">
            <text:p>24/06/15</text:p>
          </table:table-cell>
          <table:table-cell office:value-type="float" office:value="250" table:style-name="ce48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" table:style-name="ce42">
            <text:p>12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" table:style-name="ce42">
            <text:p>20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" table:style-name="ce42">
            <text:p>28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" table:style-name="ce42">
            <text:p>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" table:style-name="ce42">
            <text:p>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" table:style-name="ce42">
            <text:p>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" table:style-name="ce42">
            <text:p>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" table:style-name="ce42">
            <text:p>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" table:style-name="ce42">
            <text:p>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" table:style-name="ce42">
            <text:p>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" table:style-name="ce42">
            <text:p>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" table:style-name="ce42">
            <text:p>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" table:style-name="ce42">
            <text:p>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" table:style-name="ce42">
            <text:p>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" table:style-name="ce42">
            <text:p>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" table:style-name="ce42">
            <text:p>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" table:style-name="ce42">
            <text:p>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" table:style-name="ce42">
            <text:p>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" table:style-name="ce42">
            <text:p>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" table:style-name="ce42">
            <text:p>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" table:style-name="ce42">
            <text:p>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" table:style-name="ce42">
            <text:p>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" table:style-name="ce42">
            <text:p>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" table:style-name="ce42">
            <text:p>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" table:style-name="ce42">
            <text:p>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" table:style-name="ce42">
            <text:p>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" table:style-name="ce42">
            <text:p>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" table:style-name="ce42">
            <text:p>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" table:style-name="ce42">
            <text:p>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" table:style-name="ce42">
            <text:p>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" table:style-name="ce42">
            <text:p>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" table:style-name="ce42">
            <text:p>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" table:style-name="ce42">
            <text:p>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" table:style-name="ce42">
            <text:p>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" table:style-name="ce42">
            <text:p>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" table:style-name="ce42">
            <text:p>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" table:style-name="ce42">
            <text:p>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" table:style-name="ce42">
            <text:p>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" table:style-name="ce42">
            <text:p>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" table:style-name="ce42">
            <text:p>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" table:style-name="ce42">
            <text:p>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" table:style-name="ce42">
            <text:p>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" table:style-name="ce42">
            <text:p>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" table:style-name="ce42">
            <text:p>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" table:style-name="ce42">
            <text:p>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" table:style-name="ce42">
            <text:p>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" table:style-name="ce42">
            <text:p>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" table:style-name="ce42">
            <text:p>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" table:style-name="ce42">
            <text:p>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" table:style-name="ce42">
            <text:p>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" table:style-name="ce42">
            <text:p>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" table:style-name="ce42">
            <text:p>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" table:style-name="ce42">
            <text:p>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" table:style-name="ce42">
            <text:p>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" table:style-name="ce42">
            <text:p>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" table:style-name="ce42">
            <text:p>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" table:style-name="ce42">
            <text:p>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" table:style-name="ce42">
            <text:p>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" table:style-name="ce42">
            <text:p>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" table:style-name="ce42">
            <text:p>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" table:style-name="ce42">
            <text:p>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" table:style-name="ce42">
            <text:p>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" table:style-name="ce42">
            <text:p>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" table:style-name="ce42">
            <text:p>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" table:style-name="ce42">
            <text:p>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" table:style-name="ce42">
            <text:p>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" table:style-name="ce42">
            <text:p>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" table:style-name="ce42">
            <text:p>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0" table:style-name="ce42">
            <text:p>1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1" table:style-name="ce42">
            <text:p>1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2" table:style-name="ce42">
            <text:p>1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3" table:style-name="ce42">
            <text:p>1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4" table:style-name="ce42">
            <text:p>1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5" table:style-name="ce42">
            <text:p>1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6" table:style-name="ce42">
            <text:p>1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7" table:style-name="ce42">
            <text:p>1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8" table:style-name="ce42">
            <text:p>1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9" table:style-name="ce42">
            <text:p>1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0" table:style-name="ce42">
            <text:p>1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1" table:style-name="ce42">
            <text:p>1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2" table:style-name="ce42">
            <text:p>1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3" table:style-name="ce42">
            <text:p>1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4" table:style-name="ce42">
            <text:p>1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5" table:style-name="ce42">
            <text:p>1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6" table:style-name="ce42">
            <text:p>1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7" table:style-name="ce42">
            <text:p>1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8" table:style-name="ce42">
            <text:p>1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19" table:style-name="ce42">
            <text:p>1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0" table:style-name="ce42">
            <text:p>1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1" table:style-name="ce42">
            <text:p>1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2" table:style-name="ce42">
            <text:p>1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3" table:style-name="ce42">
            <text:p>1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4" table:style-name="ce42">
            <text:p>1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5" table:style-name="ce42">
            <text:p>1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6" table:style-name="ce42">
            <text:p>1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7" table:style-name="ce42">
            <text:p>1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8" table:style-name="ce42">
            <text:p>1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29" table:style-name="ce42">
            <text:p>1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0" table:style-name="ce42">
            <text:p>1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1" table:style-name="ce42">
            <text:p>1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2" table:style-name="ce42">
            <text:p>1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3" table:style-name="ce42">
            <text:p>1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4" table:style-name="ce42">
            <text:p>1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5" table:style-name="ce42">
            <text:p>1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6" table:style-name="ce42">
            <text:p>1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7" table:style-name="ce42">
            <text:p>1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8" table:style-name="ce42">
            <text:p>1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39" table:style-name="ce42">
            <text:p>1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0" table:style-name="ce42">
            <text:p>1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1" table:style-name="ce42">
            <text:p>1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2" table:style-name="ce42">
            <text:p>1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3" table:style-name="ce42">
            <text:p>1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4" table:style-name="ce42">
            <text:p>1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5" table:style-name="ce42">
            <text:p>1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6" table:style-name="ce42">
            <text:p>1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7" table:style-name="ce42">
            <text:p>1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8" table:style-name="ce42">
            <text:p>1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49" table:style-name="ce42">
            <text:p>1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0" table:style-name="ce42">
            <text:p>1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1" table:style-name="ce42">
            <text:p>1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2" table:style-name="ce42">
            <text:p>1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3" table:style-name="ce42">
            <text:p>1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4" table:style-name="ce42">
            <text:p>1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5" table:style-name="ce42">
            <text:p>1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6" table:style-name="ce42">
            <text:p>1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7" table:style-name="ce42">
            <text:p>1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8" table:style-name="ce42">
            <text:p>1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59" table:style-name="ce42">
            <text:p>1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0" table:style-name="ce42">
            <text:p>1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1" table:style-name="ce42">
            <text:p>1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2" table:style-name="ce42">
            <text:p>1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3" table:style-name="ce42">
            <text:p>1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4" table:style-name="ce42">
            <text:p>1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5" table:style-name="ce42">
            <text:p>1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6" table:style-name="ce42">
            <text:p>1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7" table:style-name="ce42">
            <text:p>1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8" table:style-name="ce42">
            <text:p>1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69" table:style-name="ce42">
            <text:p>1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0" table:style-name="ce42">
            <text:p>1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1" table:style-name="ce42">
            <text:p>1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2" table:style-name="ce42">
            <text:p>1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3" table:style-name="ce42">
            <text:p>1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4" table:style-name="ce42">
            <text:p>1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5" table:style-name="ce42">
            <text:p>1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6" table:style-name="ce42">
            <text:p>1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7" table:style-name="ce42">
            <text:p>1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8" table:style-name="ce42">
            <text:p>1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79" table:style-name="ce42">
            <text:p>1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0" table:style-name="ce42">
            <text:p>1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1" table:style-name="ce42">
            <text:p>1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2" table:style-name="ce42">
            <text:p>1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3" table:style-name="ce42">
            <text:p>1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4" table:style-name="ce42">
            <text:p>1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5" table:style-name="ce42">
            <text:p>1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6" table:style-name="ce42">
            <text:p>1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7" table:style-name="ce42">
            <text:p>1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8" table:style-name="ce42">
            <text:p>1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89" table:style-name="ce42">
            <text:p>1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0" table:style-name="ce42">
            <text:p>1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1" table:style-name="ce42">
            <text:p>1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2" table:style-name="ce42">
            <text:p>1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3" table:style-name="ce42">
            <text:p>1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4" table:style-name="ce42">
            <text:p>1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5" table:style-name="ce42">
            <text:p>1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6" table:style-name="ce42">
            <text:p>1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7" table:style-name="ce42">
            <text:p>1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8" table:style-name="ce42">
            <text:p>1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99" table:style-name="ce42">
            <text:p>1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0" table:style-name="ce42">
            <text:p>2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1" table:style-name="ce42">
            <text:p>2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2" table:style-name="ce42">
            <text:p>2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3" table:style-name="ce42">
            <text:p>2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4" table:style-name="ce42">
            <text:p>2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5" table:style-name="ce42">
            <text:p>2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6" table:style-name="ce42">
            <text:p>2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7" table:style-name="ce42">
            <text:p>2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8" table:style-name="ce42">
            <text:p>2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09" table:style-name="ce42">
            <text:p>2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0" table:style-name="ce42">
            <text:p>2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1" table:style-name="ce42">
            <text:p>2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2" table:style-name="ce42">
            <text:p>2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3" table:style-name="ce42">
            <text:p>2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4" table:style-name="ce42">
            <text:p>2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5" table:style-name="ce42">
            <text:p>2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6" table:style-name="ce42">
            <text:p>2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7" table:style-name="ce42">
            <text:p>2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8" table:style-name="ce42">
            <text:p>2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19" table:style-name="ce42">
            <text:p>2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0" table:style-name="ce42">
            <text:p>2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1" table:style-name="ce42">
            <text:p>2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2" table:style-name="ce42">
            <text:p>2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3" table:style-name="ce42">
            <text:p>2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4" table:style-name="ce42">
            <text:p>2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5" table:style-name="ce42">
            <text:p>2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6" table:style-name="ce42">
            <text:p>2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7" table:style-name="ce42">
            <text:p>2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8" table:style-name="ce42">
            <text:p>2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29" table:style-name="ce42">
            <text:p>2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0" table:style-name="ce42">
            <text:p>2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1" table:style-name="ce42">
            <text:p>2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2" table:style-name="ce42">
            <text:p>2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3" table:style-name="ce42">
            <text:p>2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4" table:style-name="ce42">
            <text:p>2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5" table:style-name="ce42">
            <text:p>2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6" table:style-name="ce42">
            <text:p>2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7" table:style-name="ce42">
            <text:p>2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8" table:style-name="ce42">
            <text:p>2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39" table:style-name="ce42">
            <text:p>2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0" table:style-name="ce42">
            <text:p>2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1" table:style-name="ce42">
            <text:p>2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2" table:style-name="ce42">
            <text:p>2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3" table:style-name="ce42">
            <text:p>2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4" table:style-name="ce42">
            <text:p>2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5" table:style-name="ce42">
            <text:p>2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6" table:style-name="ce42">
            <text:p>2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7" table:style-name="ce42">
            <text:p>2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8" table:style-name="ce42">
            <text:p>2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49" table:style-name="ce42">
            <text:p>2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0" table:style-name="ce42">
            <text:p>2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1" table:style-name="ce42">
            <text:p>2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2" table:style-name="ce42">
            <text:p>2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3" table:style-name="ce42">
            <text:p>2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4" table:style-name="ce42">
            <text:p>2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5" table:style-name="ce42">
            <text:p>2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6" table:style-name="ce42">
            <text:p>2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7" table:style-name="ce42">
            <text:p>2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8" table:style-name="ce42">
            <text:p>2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59" table:style-name="ce42">
            <text:p>2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0" table:style-name="ce42">
            <text:p>2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1" table:style-name="ce42">
            <text:p>2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2" table:style-name="ce42">
            <text:p>2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3" table:style-name="ce42">
            <text:p>2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4" table:style-name="ce42">
            <text:p>2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5" table:style-name="ce42">
            <text:p>2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6" table:style-name="ce42">
            <text:p>2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7" table:style-name="ce42">
            <text:p>2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8" table:style-name="ce42">
            <text:p>2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69" table:style-name="ce42">
            <text:p>2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0" table:style-name="ce42">
            <text:p>2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1" table:style-name="ce42">
            <text:p>2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2" table:style-name="ce42">
            <text:p>2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3" table:style-name="ce42">
            <text:p>2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4" table:style-name="ce42">
            <text:p>2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5" table:style-name="ce42">
            <text:p>2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6" table:style-name="ce42">
            <text:p>2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7" table:style-name="ce42">
            <text:p>2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8" table:style-name="ce42">
            <text:p>2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79" table:style-name="ce42">
            <text:p>2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0" table:style-name="ce42">
            <text:p>2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1" table:style-name="ce42">
            <text:p>2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2" table:style-name="ce42">
            <text:p>2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3" table:style-name="ce42">
            <text:p>2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4" table:style-name="ce42">
            <text:p>2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5" table:style-name="ce42">
            <text:p>2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6" table:style-name="ce42">
            <text:p>2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7" table:style-name="ce42">
            <text:p>2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8" table:style-name="ce42">
            <text:p>2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89" table:style-name="ce42">
            <text:p>2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0" table:style-name="ce42">
            <text:p>2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1" table:style-name="ce42">
            <text:p>2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2" table:style-name="ce42">
            <text:p>2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3" table:style-name="ce42">
            <text:p>2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4" table:style-name="ce42">
            <text:p>2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5" table:style-name="ce42">
            <text:p>2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6" table:style-name="ce42">
            <text:p>2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7" table:style-name="ce42">
            <text:p>2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8" table:style-name="ce42">
            <text:p>2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299" table:style-name="ce42">
            <text:p>2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0" table:style-name="ce42">
            <text:p>3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1" table:style-name="ce42">
            <text:p>3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2" table:style-name="ce42">
            <text:p>3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3" table:style-name="ce42">
            <text:p>3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4" table:style-name="ce42">
            <text:p>3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5" table:style-name="ce42">
            <text:p>3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6" table:style-name="ce42">
            <text:p>3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7" table:style-name="ce42">
            <text:p>3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8" table:style-name="ce42">
            <text:p>3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09" table:style-name="ce42">
            <text:p>3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0" table:style-name="ce42">
            <text:p>3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1" table:style-name="ce42">
            <text:p>3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2" table:style-name="ce42">
            <text:p>3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3" table:style-name="ce42">
            <text:p>3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4" table:style-name="ce42">
            <text:p>3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5" table:style-name="ce42">
            <text:p>3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6" table:style-name="ce42">
            <text:p>3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7" table:style-name="ce42">
            <text:p>3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8" table:style-name="ce42">
            <text:p>3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19" table:style-name="ce42">
            <text:p>3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0" table:style-name="ce42">
            <text:p>3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1" table:style-name="ce42">
            <text:p>3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2" table:style-name="ce42">
            <text:p>3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3" table:style-name="ce42">
            <text:p>3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4" table:style-name="ce42">
            <text:p>3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5" table:style-name="ce42">
            <text:p>3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6" table:style-name="ce42">
            <text:p>3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7" table:style-name="ce42">
            <text:p>3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8" table:style-name="ce42">
            <text:p>3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29" table:style-name="ce42">
            <text:p>3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0" table:style-name="ce42">
            <text:p>3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1" table:style-name="ce42">
            <text:p>3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2" table:style-name="ce42">
            <text:p>3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3" table:style-name="ce42">
            <text:p>3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4" table:style-name="ce42">
            <text:p>3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5" table:style-name="ce42">
            <text:p>3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6" table:style-name="ce42">
            <text:p>3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7" table:style-name="ce42">
            <text:p>3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8" table:style-name="ce42">
            <text:p>3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39" table:style-name="ce42">
            <text:p>3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0" table:style-name="ce42">
            <text:p>3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1" table:style-name="ce42">
            <text:p>3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2" table:style-name="ce42">
            <text:p>3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3" table:style-name="ce42">
            <text:p>3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4" table:style-name="ce42">
            <text:p>3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5" table:style-name="ce42">
            <text:p>3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6" table:style-name="ce42">
            <text:p>3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7" table:style-name="ce42">
            <text:p>3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8" table:style-name="ce42">
            <text:p>3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49" table:style-name="ce42">
            <text:p>3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0" table:style-name="ce42">
            <text:p>3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1" table:style-name="ce42">
            <text:p>3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2" table:style-name="ce42">
            <text:p>3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3" table:style-name="ce42">
            <text:p>3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4" table:style-name="ce42">
            <text:p>3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5" table:style-name="ce42">
            <text:p>3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6" table:style-name="ce42">
            <text:p>3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7" table:style-name="ce42">
            <text:p>3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8" table:style-name="ce42">
            <text:p>3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59" table:style-name="ce42">
            <text:p>3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0" table:style-name="ce42">
            <text:p>3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1" table:style-name="ce42">
            <text:p>3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2" table:style-name="ce42">
            <text:p>3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3" table:style-name="ce42">
            <text:p>3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4" table:style-name="ce42">
            <text:p>3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5" table:style-name="ce42">
            <text:p>3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6" table:style-name="ce42">
            <text:p>3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7" table:style-name="ce42">
            <text:p>3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8" table:style-name="ce42">
            <text:p>3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69" table:style-name="ce42">
            <text:p>3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0" table:style-name="ce42">
            <text:p>3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1" table:style-name="ce42">
            <text:p>3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2" table:style-name="ce42">
            <text:p>3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3" table:style-name="ce42">
            <text:p>3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4" table:style-name="ce42">
            <text:p>3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5" table:style-name="ce42">
            <text:p>3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6" table:style-name="ce42">
            <text:p>3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7" table:style-name="ce42">
            <text:p>3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8" table:style-name="ce42">
            <text:p>3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79" table:style-name="ce42">
            <text:p>3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0" table:style-name="ce42">
            <text:p>3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1" table:style-name="ce42">
            <text:p>3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2" table:style-name="ce42">
            <text:p>3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3" table:style-name="ce42">
            <text:p>3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4" table:style-name="ce42">
            <text:p>3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5" table:style-name="ce42">
            <text:p>3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6" table:style-name="ce42">
            <text:p>3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7" table:style-name="ce42">
            <text:p>3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8" table:style-name="ce42">
            <text:p>3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89" table:style-name="ce42">
            <text:p>3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0" table:style-name="ce42">
            <text:p>3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1" table:style-name="ce42">
            <text:p>3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2" table:style-name="ce42">
            <text:p>3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3" table:style-name="ce42">
            <text:p>3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4" table:style-name="ce42">
            <text:p>3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5" table:style-name="ce42">
            <text:p>3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6" table:style-name="ce42">
            <text:p>3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7" table:style-name="ce42">
            <text:p>3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8" table:style-name="ce42">
            <text:p>3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399" table:style-name="ce42">
            <text:p>3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0" table:style-name="ce42">
            <text:p>4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1" table:style-name="ce42">
            <text:p>4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2" table:style-name="ce42">
            <text:p>4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3" table:style-name="ce42">
            <text:p>4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4" table:style-name="ce42">
            <text:p>4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5" table:style-name="ce42">
            <text:p>4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6" table:style-name="ce42">
            <text:p>4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7" table:style-name="ce42">
            <text:p>4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8" table:style-name="ce42">
            <text:p>4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09" table:style-name="ce42">
            <text:p>4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0" table:style-name="ce42">
            <text:p>4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1" table:style-name="ce42">
            <text:p>4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2" table:style-name="ce42">
            <text:p>4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3" table:style-name="ce42">
            <text:p>4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4" table:style-name="ce42">
            <text:p>4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5" table:style-name="ce42">
            <text:p>4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6" table:style-name="ce42">
            <text:p>4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7" table:style-name="ce42">
            <text:p>4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8" table:style-name="ce42">
            <text:p>4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19" table:style-name="ce42">
            <text:p>4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0" table:style-name="ce42">
            <text:p>4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1" table:style-name="ce42">
            <text:p>4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2" table:style-name="ce42">
            <text:p>4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3" table:style-name="ce42">
            <text:p>4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4" table:style-name="ce42">
            <text:p>4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5" table:style-name="ce42">
            <text:p>4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6" table:style-name="ce42">
            <text:p>4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7" table:style-name="ce42">
            <text:p>4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8" table:style-name="ce42">
            <text:p>4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29" table:style-name="ce42">
            <text:p>4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0" table:style-name="ce42">
            <text:p>4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1" table:style-name="ce42">
            <text:p>4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2" table:style-name="ce42">
            <text:p>4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3" table:style-name="ce42">
            <text:p>4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4" table:style-name="ce42">
            <text:p>4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5" table:style-name="ce42">
            <text:p>4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6" table:style-name="ce42">
            <text:p>4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7" table:style-name="ce42">
            <text:p>4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8" table:style-name="ce42">
            <text:p>4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39" table:style-name="ce42">
            <text:p>4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0" table:style-name="ce42">
            <text:p>4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1" table:style-name="ce42">
            <text:p>4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2" table:style-name="ce42">
            <text:p>4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3" table:style-name="ce42">
            <text:p>4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4" table:style-name="ce42">
            <text:p>4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5" table:style-name="ce42">
            <text:p>4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6" table:style-name="ce42">
            <text:p>4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7" table:style-name="ce42">
            <text:p>4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8" table:style-name="ce42">
            <text:p>4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49" table:style-name="ce42">
            <text:p>4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0" table:style-name="ce42">
            <text:p>4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1" table:style-name="ce42">
            <text:p>4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2" table:style-name="ce42">
            <text:p>4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3" table:style-name="ce42">
            <text:p>4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4" table:style-name="ce42">
            <text:p>4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5" table:style-name="ce42">
            <text:p>4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6" table:style-name="ce42">
            <text:p>4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7" table:style-name="ce42">
            <text:p>4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8" table:style-name="ce42">
            <text:p>4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59" table:style-name="ce42">
            <text:p>4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0" table:style-name="ce42">
            <text:p>4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1" table:style-name="ce42">
            <text:p>4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2" table:style-name="ce42">
            <text:p>4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3" table:style-name="ce42">
            <text:p>4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4" table:style-name="ce42">
            <text:p>4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5" table:style-name="ce42">
            <text:p>4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6" table:style-name="ce42">
            <text:p>4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7" table:style-name="ce42">
            <text:p>4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8" table:style-name="ce42">
            <text:p>4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69" table:style-name="ce42">
            <text:p>4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0" table:style-name="ce42">
            <text:p>4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1" table:style-name="ce42">
            <text:p>4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2" table:style-name="ce42">
            <text:p>4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3" table:style-name="ce42">
            <text:p>4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4" table:style-name="ce42">
            <text:p>4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5" table:style-name="ce42">
            <text:p>4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6" table:style-name="ce42">
            <text:p>4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7" table:style-name="ce42">
            <text:p>4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8" table:style-name="ce42">
            <text:p>4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79" table:style-name="ce42">
            <text:p>4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0" table:style-name="ce42">
            <text:p>4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1" table:style-name="ce42">
            <text:p>4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2" table:style-name="ce42">
            <text:p>4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3" table:style-name="ce42">
            <text:p>4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4" table:style-name="ce42">
            <text:p>4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5" table:style-name="ce42">
            <text:p>4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6" table:style-name="ce42">
            <text:p>4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7" table:style-name="ce42">
            <text:p>4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8" table:style-name="ce42">
            <text:p>4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89" table:style-name="ce42">
            <text:p>4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0" table:style-name="ce42">
            <text:p>4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1" table:style-name="ce42">
            <text:p>4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2" table:style-name="ce42">
            <text:p>4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3" table:style-name="ce42">
            <text:p>4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4" table:style-name="ce42">
            <text:p>4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5" table:style-name="ce42">
            <text:p>4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6" table:style-name="ce42">
            <text:p>4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7" table:style-name="ce42">
            <text:p>4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8" table:style-name="ce42">
            <text:p>4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499" table:style-name="ce42">
            <text:p>4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0" table:style-name="ce42">
            <text:p>5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1" table:style-name="ce42">
            <text:p>5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2" table:style-name="ce42">
            <text:p>5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55"/>
          <table:table-cell office:value-type="float" office:value="503" table:style-name="ce42">
            <text:p>5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1" table:style-name="ce55"/>
          <table:table-cell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4" table:style-name="ce42">
            <text:p>5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5" table:style-name="ce42">
            <text:p>5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6" table:style-name="ce42">
            <text:p>5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7" table:style-name="ce42">
            <text:p>5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8" table:style-name="ce42">
            <text:p>5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09" table:style-name="ce42">
            <text:p>5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0" table:style-name="ce42">
            <text:p>5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1" table:style-name="ce42">
            <text:p>5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2" table:style-name="ce42">
            <text:p>5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3" table:style-name="ce42">
            <text:p>5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4" table:style-name="ce42">
            <text:p>5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5" table:style-name="ce42">
            <text:p>5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6" table:style-name="ce42">
            <text:p>5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7" table:style-name="ce42">
            <text:p>5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8" table:style-name="ce42">
            <text:p>5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19" table:style-name="ce42">
            <text:p>5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0" table:style-name="ce42">
            <text:p>5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1" table:style-name="ce42">
            <text:p>5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2" table:style-name="ce42">
            <text:p>5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3" table:style-name="ce42">
            <text:p>5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4" table:style-name="ce42">
            <text:p>5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5" table:style-name="ce42">
            <text:p>5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6" table:style-name="ce42">
            <text:p>5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7" table:style-name="ce42">
            <text:p>5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8" table:style-name="ce42">
            <text:p>5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29" table:style-name="ce42">
            <text:p>5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0" table:style-name="ce42">
            <text:p>5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1" table:style-name="ce42">
            <text:p>5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2" table:style-name="ce42">
            <text:p>5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3" table:style-name="ce42">
            <text:p>5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4" table:style-name="ce42">
            <text:p>5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5" table:style-name="ce42">
            <text:p>5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6" table:style-name="ce42">
            <text:p>5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7" table:style-name="ce42">
            <text:p>5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8" table:style-name="ce42">
            <text:p>5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39" table:style-name="ce42">
            <text:p>5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0" table:style-name="ce42">
            <text:p>5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1" table:style-name="ce42">
            <text:p>5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2" table:style-name="ce42">
            <text:p>5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3" table:style-name="ce42">
            <text:p>5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4" table:style-name="ce42">
            <text:p>5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5" table:style-name="ce42">
            <text:p>5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6" table:style-name="ce42">
            <text:p>5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7" table:style-name="ce42">
            <text:p>5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8" table:style-name="ce42">
            <text:p>5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49" table:style-name="ce42">
            <text:p>5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0" table:style-name="ce42">
            <text:p>5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1" table:style-name="ce42">
            <text:p>5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2" table:style-name="ce42">
            <text:p>5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3" table:style-name="ce42">
            <text:p>5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4" table:style-name="ce42">
            <text:p>5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5" table:style-name="ce42">
            <text:p>5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6" table:style-name="ce42">
            <text:p>5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7" table:style-name="ce42">
            <text:p>5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8" table:style-name="ce42">
            <text:p>5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59" table:style-name="ce42">
            <text:p>5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0" table:style-name="ce42">
            <text:p>5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1" table:style-name="ce42">
            <text:p>5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2" table:style-name="ce42">
            <text:p>5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3" table:style-name="ce42">
            <text:p>5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4" table:style-name="ce42">
            <text:p>5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5" table:style-name="ce42">
            <text:p>5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6" table:style-name="ce42">
            <text:p>5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7" table:style-name="ce42">
            <text:p>5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8" table:style-name="ce42">
            <text:p>5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69" table:style-name="ce42">
            <text:p>5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0" table:style-name="ce42">
            <text:p>5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1" table:style-name="ce42">
            <text:p>5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2" table:style-name="ce42">
            <text:p>5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3" table:style-name="ce42">
            <text:p>5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4" table:style-name="ce42">
            <text:p>5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5" table:style-name="ce42">
            <text:p>5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6" table:style-name="ce42">
            <text:p>5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7" table:style-name="ce42">
            <text:p>5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8" table:style-name="ce42">
            <text:p>5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79" table:style-name="ce42">
            <text:p>5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0" table:style-name="ce42">
            <text:p>5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1" table:style-name="ce42">
            <text:p>5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2" table:style-name="ce42">
            <text:p>5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3" table:style-name="ce42">
            <text:p>5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4" table:style-name="ce42">
            <text:p>5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5" table:style-name="ce42">
            <text:p>5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6" table:style-name="ce42">
            <text:p>5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7" table:style-name="ce42">
            <text:p>5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8" table:style-name="ce42">
            <text:p>5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89" table:style-name="ce42">
            <text:p>5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0" table:style-name="ce42">
            <text:p>5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1" table:style-name="ce42">
            <text:p>5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2" table:style-name="ce42">
            <text:p>5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3" table:style-name="ce42">
            <text:p>5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4" table:style-name="ce42">
            <text:p>5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5" table:style-name="ce42">
            <text:p>5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6" table:style-name="ce42">
            <text:p>5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7" table:style-name="ce42">
            <text:p>5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8" table:style-name="ce42">
            <text:p>5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599" table:style-name="ce42">
            <text:p>5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0" table:style-name="ce42">
            <text:p>6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1" table:style-name="ce42">
            <text:p>6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2" table:style-name="ce42">
            <text:p>6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3" table:style-name="ce42">
            <text:p>6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4" table:style-name="ce42">
            <text:p>6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5" table:style-name="ce42">
            <text:p>6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6" table:style-name="ce42">
            <text:p>6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7" table:style-name="ce42">
            <text:p>6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8" table:style-name="ce42">
            <text:p>6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09" table:style-name="ce42">
            <text:p>6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0" table:style-name="ce42">
            <text:p>6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1" table:style-name="ce42">
            <text:p>6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2" table:style-name="ce42">
            <text:p>6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3" table:style-name="ce42">
            <text:p>6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4" table:style-name="ce42">
            <text:p>6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5" table:style-name="ce42">
            <text:p>6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6" table:style-name="ce42">
            <text:p>6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7" table:style-name="ce42">
            <text:p>6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8" table:style-name="ce42">
            <text:p>6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19" table:style-name="ce42">
            <text:p>6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0" table:style-name="ce42">
            <text:p>6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1" table:style-name="ce42">
            <text:p>6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2" table:style-name="ce42">
            <text:p>6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3" table:style-name="ce42">
            <text:p>6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4" table:style-name="ce42">
            <text:p>6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5" table:style-name="ce42">
            <text:p>6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6" table:style-name="ce42">
            <text:p>6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7" table:style-name="ce42">
            <text:p>6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8" table:style-name="ce42">
            <text:p>6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29" table:style-name="ce42">
            <text:p>6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0" table:style-name="ce42">
            <text:p>6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1" table:style-name="ce42">
            <text:p>6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2" table:style-name="ce42">
            <text:p>6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3" table:style-name="ce42">
            <text:p>6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4" table:style-name="ce42">
            <text:p>6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5" table:style-name="ce42">
            <text:p>6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6" table:style-name="ce42">
            <text:p>6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7" table:style-name="ce42">
            <text:p>6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8" table:style-name="ce42">
            <text:p>6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39" table:style-name="ce42">
            <text:p>6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0" table:style-name="ce42">
            <text:p>6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1" table:style-name="ce42">
            <text:p>6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2" table:style-name="ce42">
            <text:p>6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3" table:style-name="ce42">
            <text:p>6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4" table:style-name="ce42">
            <text:p>6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5" table:style-name="ce42">
            <text:p>6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6" table:style-name="ce42">
            <text:p>6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7" table:style-name="ce42">
            <text:p>6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8" table:style-name="ce42">
            <text:p>6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49" table:style-name="ce42">
            <text:p>6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0" table:style-name="ce42">
            <text:p>6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1" table:style-name="ce42">
            <text:p>6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2" table:style-name="ce42">
            <text:p>6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3" table:style-name="ce42">
            <text:p>6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4" table:style-name="ce42">
            <text:p>6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5" table:style-name="ce42">
            <text:p>6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6" table:style-name="ce42">
            <text:p>6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7" table:style-name="ce42">
            <text:p>6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8" table:style-name="ce42">
            <text:p>6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59" table:style-name="ce42">
            <text:p>6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0" table:style-name="ce42">
            <text:p>6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1" table:style-name="ce42">
            <text:p>6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2" table:style-name="ce42">
            <text:p>6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3" table:style-name="ce42">
            <text:p>6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4" table:style-name="ce42">
            <text:p>6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5" table:style-name="ce42">
            <text:p>6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6" table:style-name="ce42">
            <text:p>6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7" table:style-name="ce42">
            <text:p>6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8" table:style-name="ce42">
            <text:p>6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69" table:style-name="ce42">
            <text:p>6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0" table:style-name="ce42">
            <text:p>6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1" table:style-name="ce42">
            <text:p>6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2" table:style-name="ce42">
            <text:p>6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3" table:style-name="ce42">
            <text:p>6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4" table:style-name="ce42">
            <text:p>6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5" table:style-name="ce42">
            <text:p>6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6" table:style-name="ce42">
            <text:p>6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7" table:style-name="ce42">
            <text:p>6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8" table:style-name="ce42">
            <text:p>6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79" table:style-name="ce42">
            <text:p>6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0" table:style-name="ce42">
            <text:p>6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1" table:style-name="ce42">
            <text:p>6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2" table:style-name="ce42">
            <text:p>6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3" table:style-name="ce42">
            <text:p>6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4" table:style-name="ce42">
            <text:p>6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5" table:style-name="ce42">
            <text:p>6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6" table:style-name="ce42">
            <text:p>6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7" table:style-name="ce42">
            <text:p>6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8" table:style-name="ce42">
            <text:p>6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89" table:style-name="ce42">
            <text:p>6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0" table:style-name="ce42">
            <text:p>6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1" table:style-name="ce42">
            <text:p>6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2" table:style-name="ce42">
            <text:p>6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3" table:style-name="ce42">
            <text:p>6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4" table:style-name="ce42">
            <text:p>6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5" table:style-name="ce42">
            <text:p>6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6" table:style-name="ce42">
            <text:p>6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7" table:style-name="ce42">
            <text:p>6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8" table:style-name="ce42">
            <text:p>6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699" table:style-name="ce42">
            <text:p>6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0" table:style-name="ce42">
            <text:p>7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1" table:style-name="ce42">
            <text:p>7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2" table:style-name="ce42">
            <text:p>7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3" table:style-name="ce42">
            <text:p>7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4" table:style-name="ce42">
            <text:p>7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5" table:style-name="ce42">
            <text:p>7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6" table:style-name="ce42">
            <text:p>7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7" table:style-name="ce42">
            <text:p>7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8" table:style-name="ce42">
            <text:p>7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09" table:style-name="ce42">
            <text:p>7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0" table:style-name="ce42">
            <text:p>7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1" table:style-name="ce42">
            <text:p>7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2" table:style-name="ce42">
            <text:p>7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3" table:style-name="ce42">
            <text:p>7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4" table:style-name="ce42">
            <text:p>7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5" table:style-name="ce42">
            <text:p>7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6" table:style-name="ce42">
            <text:p>7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7" table:style-name="ce42">
            <text:p>7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8" table:style-name="ce42">
            <text:p>7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19" table:style-name="ce42">
            <text:p>7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0" table:style-name="ce42">
            <text:p>7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1" table:style-name="ce42">
            <text:p>7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2" table:style-name="ce42">
            <text:p>7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3" table:style-name="ce42">
            <text:p>7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4" table:style-name="ce42">
            <text:p>7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5" table:style-name="ce42">
            <text:p>7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6" table:style-name="ce42">
            <text:p>7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7" table:style-name="ce42">
            <text:p>7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8" table:style-name="ce42">
            <text:p>7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29" table:style-name="ce42">
            <text:p>7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0" table:style-name="ce42">
            <text:p>7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1" table:style-name="ce42">
            <text:p>7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2" table:style-name="ce42">
            <text:p>7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3" table:style-name="ce42">
            <text:p>7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4" table:style-name="ce42">
            <text:p>7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5" table:style-name="ce42">
            <text:p>7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6" table:style-name="ce42">
            <text:p>7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7" table:style-name="ce42">
            <text:p>7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8" table:style-name="ce42">
            <text:p>7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39" table:style-name="ce42">
            <text:p>7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0" table:style-name="ce42">
            <text:p>7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1" table:style-name="ce42">
            <text:p>7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2" table:style-name="ce42">
            <text:p>7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3" table:style-name="ce42">
            <text:p>7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4" table:style-name="ce42">
            <text:p>7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5" table:style-name="ce42">
            <text:p>7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6" table:style-name="ce42">
            <text:p>7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7" table:style-name="ce42">
            <text:p>7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8" table:style-name="ce42">
            <text:p>7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49" table:style-name="ce42">
            <text:p>7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0" table:style-name="ce42">
            <text:p>7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1" table:style-name="ce42">
            <text:p>7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2" table:style-name="ce42">
            <text:p>7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3" table:style-name="ce42">
            <text:p>7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4" table:style-name="ce42">
            <text:p>7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5" table:style-name="ce42">
            <text:p>7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6" table:style-name="ce42">
            <text:p>7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7" table:style-name="ce42">
            <text:p>7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8" table:style-name="ce42">
            <text:p>7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59" table:style-name="ce42">
            <text:p>7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0" table:style-name="ce42">
            <text:p>7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1" table:style-name="ce42">
            <text:p>7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2" table:style-name="ce42">
            <text:p>7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3" table:style-name="ce42">
            <text:p>7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4" table:style-name="ce42">
            <text:p>7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5" table:style-name="ce42">
            <text:p>7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6" table:style-name="ce42">
            <text:p>7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7" table:style-name="ce42">
            <text:p>7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8" table:style-name="ce42">
            <text:p>7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69" table:style-name="ce42">
            <text:p>7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0" table:style-name="ce42">
            <text:p>7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1" table:style-name="ce42">
            <text:p>7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2" table:style-name="ce42">
            <text:p>7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3" table:style-name="ce42">
            <text:p>7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4" table:style-name="ce42">
            <text:p>7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5" table:style-name="ce42">
            <text:p>7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6" table:style-name="ce42">
            <text:p>7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7" table:style-name="ce42">
            <text:p>7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8" table:style-name="ce42">
            <text:p>7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79" table:style-name="ce42">
            <text:p>7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0" table:style-name="ce42">
            <text:p>7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1" table:style-name="ce42">
            <text:p>7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2" table:style-name="ce42">
            <text:p>7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3" table:style-name="ce42">
            <text:p>7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4" table:style-name="ce42">
            <text:p>7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5" table:style-name="ce42">
            <text:p>7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6" table:style-name="ce42">
            <text:p>7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7" table:style-name="ce42">
            <text:p>7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8" table:style-name="ce42">
            <text:p>7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89" table:style-name="ce42">
            <text:p>7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0" table:style-name="ce42">
            <text:p>7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1" table:style-name="ce42">
            <text:p>7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2" table:style-name="ce42">
            <text:p>7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3" table:style-name="ce42">
            <text:p>7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4" table:style-name="ce42">
            <text:p>7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5" table:style-name="ce42">
            <text:p>7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6" table:style-name="ce42">
            <text:p>7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7" table:style-name="ce42">
            <text:p>7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8" table:style-name="ce42">
            <text:p>7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799" table:style-name="ce42">
            <text:p>7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0" table:style-name="ce42">
            <text:p>8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1" table:style-name="ce42">
            <text:p>8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2" table:style-name="ce42">
            <text:p>8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3" table:style-name="ce42">
            <text:p>8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4" table:style-name="ce42">
            <text:p>8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5" table:style-name="ce42">
            <text:p>8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6" table:style-name="ce42">
            <text:p>8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7" table:style-name="ce42">
            <text:p>8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8" table:style-name="ce42">
            <text:p>8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09" table:style-name="ce42">
            <text:p>8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0" table:style-name="ce42">
            <text:p>8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1" table:style-name="ce42">
            <text:p>8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2" table:style-name="ce42">
            <text:p>8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3" table:style-name="ce42">
            <text:p>8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4" table:style-name="ce42">
            <text:p>8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5" table:style-name="ce42">
            <text:p>8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6" table:style-name="ce42">
            <text:p>8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7" table:style-name="ce42">
            <text:p>8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8" table:style-name="ce42">
            <text:p>8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19" table:style-name="ce42">
            <text:p>8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0" table:style-name="ce42">
            <text:p>8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1" table:style-name="ce42">
            <text:p>8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2" table:style-name="ce42">
            <text:p>8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3" table:style-name="ce42">
            <text:p>8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4" table:style-name="ce42">
            <text:p>8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5" table:style-name="ce42">
            <text:p>8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6" table:style-name="ce42">
            <text:p>8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7" table:style-name="ce42">
            <text:p>8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8" table:style-name="ce42">
            <text:p>8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29" table:style-name="ce42">
            <text:p>8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0" table:style-name="ce42">
            <text:p>8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1" table:style-name="ce42">
            <text:p>8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2" table:style-name="ce42">
            <text:p>8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3" table:style-name="ce42">
            <text:p>8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4" table:style-name="ce42">
            <text:p>8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5" table:style-name="ce42">
            <text:p>8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6" table:style-name="ce42">
            <text:p>8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7" table:style-name="ce42">
            <text:p>8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8" table:style-name="ce42">
            <text:p>8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39" table:style-name="ce42">
            <text:p>8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0" table:style-name="ce42">
            <text:p>8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1" table:style-name="ce42">
            <text:p>8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2" table:style-name="ce42">
            <text:p>8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3" table:style-name="ce42">
            <text:p>8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4" table:style-name="ce42">
            <text:p>8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5" table:style-name="ce42">
            <text:p>8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6" table:style-name="ce42">
            <text:p>8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7" table:style-name="ce42">
            <text:p>8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8" table:style-name="ce42">
            <text:p>8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49" table:style-name="ce42">
            <text:p>8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0" table:style-name="ce42">
            <text:p>8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1" table:style-name="ce42">
            <text:p>8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2" table:style-name="ce42">
            <text:p>8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3" table:style-name="ce42">
            <text:p>8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4" table:style-name="ce42">
            <text:p>8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5" table:style-name="ce42">
            <text:p>8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6" table:style-name="ce42">
            <text:p>8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7" table:style-name="ce42">
            <text:p>8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8" table:style-name="ce42">
            <text:p>8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59" table:style-name="ce42">
            <text:p>8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0" table:style-name="ce42">
            <text:p>8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1" table:style-name="ce42">
            <text:p>8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2" table:style-name="ce42">
            <text:p>8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3" table:style-name="ce42">
            <text:p>8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4" table:style-name="ce42">
            <text:p>8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5" table:style-name="ce42">
            <text:p>8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6" table:style-name="ce42">
            <text:p>8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7" table:style-name="ce42">
            <text:p>8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8" table:style-name="ce42">
            <text:p>8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69" table:style-name="ce42">
            <text:p>8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0" table:style-name="ce42">
            <text:p>8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1" table:style-name="ce42">
            <text:p>8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2" table:style-name="ce42">
            <text:p>8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3" table:style-name="ce42">
            <text:p>8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4" table:style-name="ce42">
            <text:p>8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5" table:style-name="ce42">
            <text:p>8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6" table:style-name="ce42">
            <text:p>8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7" table:style-name="ce42">
            <text:p>8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8" table:style-name="ce42">
            <text:p>8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79" table:style-name="ce42">
            <text:p>8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0" table:style-name="ce42">
            <text:p>8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1" table:style-name="ce42">
            <text:p>8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2" table:style-name="ce42">
            <text:p>8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3" table:style-name="ce42">
            <text:p>8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4" table:style-name="ce42">
            <text:p>8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5" table:style-name="ce42">
            <text:p>8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6" table:style-name="ce42">
            <text:p>8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7" table:style-name="ce42">
            <text:p>8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8" table:style-name="ce42">
            <text:p>8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89" table:style-name="ce42">
            <text:p>8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0" table:style-name="ce42">
            <text:p>8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1" table:style-name="ce42">
            <text:p>8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2" table:style-name="ce42">
            <text:p>8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3" table:style-name="ce42">
            <text:p>8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4" table:style-name="ce42">
            <text:p>8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5" table:style-name="ce42">
            <text:p>8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6" table:style-name="ce42">
            <text:p>8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7" table:style-name="ce42">
            <text:p>8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8" table:style-name="ce42">
            <text:p>8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899" table:style-name="ce42">
            <text:p>8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0" table:style-name="ce42">
            <text:p>9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1" table:style-name="ce42">
            <text:p>9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2" table:style-name="ce42">
            <text:p>9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3" table:style-name="ce42">
            <text:p>9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4" table:style-name="ce42">
            <text:p>9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5" table:style-name="ce42">
            <text:p>9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6" table:style-name="ce42">
            <text:p>9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7" table:style-name="ce42">
            <text:p>9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8" table:style-name="ce42">
            <text:p>9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09" table:style-name="ce42">
            <text:p>9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0" table:style-name="ce42">
            <text:p>9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1" table:style-name="ce42">
            <text:p>9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2" table:style-name="ce42">
            <text:p>9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3" table:style-name="ce42">
            <text:p>9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4" table:style-name="ce42">
            <text:p>9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5" table:style-name="ce42">
            <text:p>9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6" table:style-name="ce42">
            <text:p>9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7" table:style-name="ce42">
            <text:p>9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8" table:style-name="ce42">
            <text:p>9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19" table:style-name="ce42">
            <text:p>9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0" table:style-name="ce42">
            <text:p>9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1" table:style-name="ce42">
            <text:p>9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2" table:style-name="ce42">
            <text:p>9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3" table:style-name="ce42">
            <text:p>9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4" table:style-name="ce42">
            <text:p>9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5" table:style-name="ce42">
            <text:p>9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6" table:style-name="ce42">
            <text:p>9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7" table:style-name="ce42">
            <text:p>9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8" table:style-name="ce42">
            <text:p>9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29" table:style-name="ce42">
            <text:p>9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0" table:style-name="ce42">
            <text:p>9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1" table:style-name="ce42">
            <text:p>9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2" table:style-name="ce42">
            <text:p>9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3" table:style-name="ce42">
            <text:p>9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4" table:style-name="ce42">
            <text:p>9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5" table:style-name="ce42">
            <text:p>9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6" table:style-name="ce42">
            <text:p>9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7" table:style-name="ce42">
            <text:p>9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8" table:style-name="ce42">
            <text:p>9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39" table:style-name="ce42">
            <text:p>9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0" table:style-name="ce42">
            <text:p>9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1" table:style-name="ce42">
            <text:p>9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2" table:style-name="ce42">
            <text:p>9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3" table:style-name="ce42">
            <text:p>9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4" table:style-name="ce42">
            <text:p>9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5" table:style-name="ce42">
            <text:p>9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6" table:style-name="ce42">
            <text:p>9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7" table:style-name="ce42">
            <text:p>9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8" table:style-name="ce42">
            <text:p>9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49" table:style-name="ce42">
            <text:p>9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0" table:style-name="ce42">
            <text:p>9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1" table:style-name="ce42">
            <text:p>9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2" table:style-name="ce42">
            <text:p>9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3" table:style-name="ce42">
            <text:p>9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4" table:style-name="ce42">
            <text:p>9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5" table:style-name="ce42">
            <text:p>9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6" table:style-name="ce42">
            <text:p>9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7" table:style-name="ce42">
            <text:p>9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8" table:style-name="ce42">
            <text:p>9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59" table:style-name="ce42">
            <text:p>9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0" table:style-name="ce42">
            <text:p>9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1" table:style-name="ce42">
            <text:p>9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2" table:style-name="ce42">
            <text:p>9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3" table:style-name="ce42">
            <text:p>9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4" table:style-name="ce42">
            <text:p>9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5" table:style-name="ce42">
            <text:p>9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6" table:style-name="ce42">
            <text:p>9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7" table:style-name="ce42">
            <text:p>9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8" table:style-name="ce42">
            <text:p>9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69" table:style-name="ce42">
            <text:p>9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0" table:style-name="ce42">
            <text:p>9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1" table:style-name="ce42">
            <text:p>9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2" table:style-name="ce42">
            <text:p>9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3" table:style-name="ce42">
            <text:p>9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4" table:style-name="ce42">
            <text:p>9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5" table:style-name="ce42">
            <text:p>9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6" table:style-name="ce42">
            <text:p>9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7" table:style-name="ce42">
            <text:p>9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8" table:style-name="ce42">
            <text:p>9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79" table:style-name="ce42">
            <text:p>9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0" table:style-name="ce42">
            <text:p>9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1" table:style-name="ce42">
            <text:p>9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2" table:style-name="ce42">
            <text:p>9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3" table:style-name="ce42">
            <text:p>9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4" table:style-name="ce42">
            <text:p>9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5" table:style-name="ce42">
            <text:p>9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6" table:style-name="ce42">
            <text:p>9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7" table:style-name="ce42">
            <text:p>9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8" table:style-name="ce42">
            <text:p>9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89" table:style-name="ce42">
            <text:p>9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0" table:style-name="ce42">
            <text:p>9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1" table:style-name="ce42">
            <text:p>9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2" table:style-name="ce42">
            <text:p>9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3" table:style-name="ce42">
            <text:p>9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4" table:style-name="ce42">
            <text:p>9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5" table:style-name="ce42">
            <text:p>9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6" table:style-name="ce42">
            <text:p>9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7" table:style-name="ce42">
            <text:p>9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8" table:style-name="ce42">
            <text:p>9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999" table:style-name="ce42">
            <text:p>9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office:value-type="float" office:value="1000" table:style-name="ce42">
            <text:p>10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string" table:style-name="ce56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string" table:style-name="ce56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907" table:style-name="ro10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8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21</meta:generator>
    <dc:title/>
    <meta:initial-creator>Rundle, Michael</meta:initial-creator>
    <dc:creator>sandip.khedekar@digital.hmrc.gov.uk</dc:creator>
    <meta:creation-date>2024-08-29T06:55:19Z</meta:creation-date>
    <dc:date>2026-06-22T10:45:45Z</dc:date>
    <meta:editing-cycles>1</meta:editing-cycles>
    <meta:editing-duration>PT0S</meta:editing-duration>
  </office:meta>
</office:document-meta>
</file>