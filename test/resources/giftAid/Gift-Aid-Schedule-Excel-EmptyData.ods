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1" svg:font-family="Arial1"/>
    <style:font-face style:name="Arial" svg:font-family="Arial"/>
    <style:font-face style:name="Arial2" svg:font-family="Arial2"/>
    <style:font-face style:name="Arial3" svg:font-family="Arial3"/>
  </office:font-face-decls>
  <office:automatic-styles>
    <style:style style:name="ce1" style:family="table-cell" style:parent-style-name="Default" style:data-style-name="N0">
      <style:table-cell-properties fo:background-color="#FFFFFF" style:cell-protect="protected"/>
      <style:text-properties style:font-name="Arial" style:font-name-asian="Arial" style:font-name-complex="Arial" style:font-family-generic="swiss"/>
    </style:style>
    <style:style style:name="ce2" style:family="table-cell" style:parent-style-name="Default" style:data-style-name="N0">
      <style:table-cell-properties style:cell-protect="protected"/>
    </style:style>
    <style:style style:name="ce3" style:family="table-cell" style:parent-style-name="Default" style:data-style-name="N0">
      <style:table-cell-properties style:vertical-align="middle" fo:background-color="#FFFFFF" style:cell-protect="protected"/>
      <style:text-properties style:font-name="Arial" style:font-name-asian="Arial" style:font-name-complex="Arial" style:font-family-generic="swiss"/>
    </style:style>
    <style:style style:name="ce4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5" style:family="table-cell" style:parent-style-name="Hyperlink" style:data-style-name="N0">
      <style:table-cell-properties style:vertical-align="middle" fo:background-color="#FFFFFF"/>
      <style:text-properties fo:color="#0000FF" style:text-underline-style="solid" style:text-underline-type="single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808080" style:cell-protect="protected" style:repeat-content="false"/>
      <style:paragraph-properties fo:text-align="center"/>
      <style:text-properties fo:color="#FFFFFF" style:font-name="Arial2" style:font-name-asian="Arial2" style:font-name-complex="Arial2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top" fo:wrap-option="wrap" fo:background-color="#808080" style:cell-protect="protected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top" fo:wrap-option="wrap" fo:background-color="#808080" style:cell-protect="protected" style:repeat-content="false"/>
      <style:paragraph-properties fo:text-align="center"/>
      <style:text-properties style:font-name="Arial2" style:font-name-asian="Arial2" style:font-name-complex="Arial2"/>
    </style:style>
    <style:style style:name="ce9" style:family="table-cell" style:parent-style-name="Default" style:data-style-name="N39">
      <style:table-cell-properties fo:border="thin solid #000000" style:vertical-align="top" fo:wrap-option="wrap" fo:background-color="#808080" style:cell-protect="protected" style:repeat-content="false"/>
      <style:paragraph-properties fo:text-align="center"/>
      <style:text-properties style:font-name="Arial2" style:font-name-asian="Arial2" style:font-name-complex="Arial2"/>
    </style:style>
    <style:style style:name="ce10" style:family="table-cell" style:parent-style-name="Default" style:data-style-name="N4">
      <style:table-cell-properties fo:border="thin solid #000000" style:vertical-align="top" fo:wrap-option="wrap" fo:background-color="#808080" style:cell-protect="protected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fo:background-color="#808080" style:cell-protect="protected" style:repeat-content="false"/>
      <style:paragraph-properties fo:text-align="end" fo:margin-right="0cm"/>
      <style:text-properties fo:color="#FFFFFF" style:font-name="Arial2" style:font-name-asian="Arial2" style:font-name-complex="Arial2" fo:font-weight="bold" style:font-weight-asian="bold" style:font-weight-complex="bold"/>
    </style:style>
    <style:style style:name="ce12" style:family="table-cell" style:parent-style-name="Default" style:data-style-name="N30">
      <style:table-cell-properties fo:border="thin solid #000000" style:vertical-align="automatic" fo:background-color="#C0C0C0" style:cell-protect="protected" style:repeat-content="false"/>
      <style:paragraph-properties fo:text-align="start" fo:margin-left="0cm"/>
      <style:text-properties fo:color="#333333" style:font-name="Arial2" style:font-name-asian="Arial2" style:font-name-complex="Arial2"/>
    </style:style>
    <style:style style:name="ce13" style:family="table-cell" style:parent-style-name="Default" style:data-style-name="N30">
      <style:table-cell-properties fo:border="thin solid #000000" style:vertical-align="automatic" fo:background-color="#C0C0C0" style:cell-protect="protected"/>
      <style:text-properties fo:color="#333333" style:font-name="Arial2" style:font-name-asian="Arial2" style:font-name-complex="Arial2"/>
    </style:style>
    <style:style style:name="ce14" style:family="table-cell" style:parent-style-name="Default" style:data-style-name="N30">
      <style:table-cell-properties fo:border="thin solid #000000" style:vertical-align="automatic" fo:wrap-option="wrap" fo:background-color="#C0C0C0" style:cell-protect="protected" style:repeat-content="false"/>
      <style:paragraph-properties fo:text-align="start" fo:margin-left="0cm"/>
      <style:text-properties fo:color="#333333" style:font-name="Arial2" style:font-name-asian="Arial2" style:font-name-complex="Arial2"/>
    </style:style>
    <style:style style:name="ce15" style:family="table-cell" style:parent-style-name="Default" style:data-style-name="N30">
      <style:table-cell-properties fo:border="thin solid #000000" style:vertical-align="automatic" fo:background-color="#C0C0C0" style:cell-protect="protected" style:repeat-content="false"/>
      <style:paragraph-properties fo:text-align="center"/>
      <style:text-properties fo:color="#333333" style:font-name="Arial2" style:font-name-asian="Arial2" style:font-name-complex="Arial2"/>
    </style:style>
    <style:style style:name="ce16" style:family="table-cell" style:parent-style-name="Default" style:data-style-name="N36">
      <style:table-cell-properties fo:border="thin solid #000000" style:vertical-align="automatic" fo:background-color="#C0C0C0" style:cell-protect="protected" style:repeat-content="false"/>
      <style:paragraph-properties fo:text-align="center"/>
      <style:text-properties fo:color="#333333" style:font-name="Arial2" style:font-name-asian="Arial2" style:font-name-complex="Arial2"/>
    </style:style>
    <style:style style:name="ce17" style:family="table-cell" style:parent-style-name="Default" style:data-style-name="N4">
      <style:table-cell-properties fo:border="thin solid #000000" style:vertical-align="automatic" fo:background-color="#C0C0C0" style:cell-protect="protected" style:repeat-content="false"/>
      <style:paragraph-properties fo:text-align="end" fo:margin-right="0cm"/>
      <style:text-properties fo:color="#333333" style:font-name="Arial2" style:font-name-asian="Arial2" style:font-name-complex="Arial2"/>
    </style:style>
    <style:style style:name="ce18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C0C0C0" style:cell-protect="protected" style:repeat-content="false"/>
      <style:paragraph-properties fo:text-align="start" fo:margin-left="0cm"/>
      <style:text-properties fo:color="#333333" style:font-name="Arial2" style:font-name-asian="Arial2" style:font-name-complex="Arial2"/>
    </style:style>
    <style:style style:name="ce19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C0C0C0" style:cell-protect="protected"/>
      <style:text-properties fo:color="#333333" style:font-name="Arial2" style:font-name-asian="Arial2" style:font-name-complex="Arial2"/>
    </style:style>
    <style:style style:name="ce20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C0C0C0" style:cell-protect="protected" style:repeat-content="false"/>
      <style:paragraph-properties fo:text-align="center"/>
      <style:text-properties fo:color="#333333" style:font-name="Arial2" style:font-name-asian="Arial2" style:font-name-complex="Arial2"/>
    </style:style>
    <style:style style:name="ce21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fo:background-color="#C0C0C0" style:cell-protect="protected" style:repeat-content="false"/>
      <style:paragraph-properties fo:text-align="center"/>
      <style:text-properties fo:color="#333333" style:font-name="Arial2" style:font-name-asian="Arial2" style:font-name-complex="Arial2"/>
    </style:style>
    <style:style style:name="ce22" style:family="table-cell" style:parent-style-name="Default" style:data-style-name="N4">
      <style:table-cell-properties fo:border-top="thin solid #000000" fo:border-bottom="none" fo:border-left="thin solid #000000" fo:border-right="thin solid #000000" style:vertical-align="automatic" fo:background-color="#C0C0C0" style:cell-protect="protected" style:repeat-content="false"/>
      <style:paragraph-properties fo:text-align="end" fo:margin-right="0cm"/>
      <style:text-properties fo:color="#333333" style:font-name="Arial2" style:font-name-asian="Arial2" style:font-name-complex="Arial2"/>
    </style:style>
    <style:style style:name="ce23" style:family="table-cell" style:parent-style-name="Default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24" style:family="table-cell" style:parent-style-name="Default" style:data-style-name="N0">
      <style:table-cell-properties style:vertical-align="automatic" fo:background-color="#FFFFFF" style:cell-protect="protected"/>
      <style:text-properties style:font-name="Arial" style:font-name-asian="Arial" style:font-name-complex="Arial" style:font-family-generic="swiss"/>
    </style:style>
    <style:style style:name="ce25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6" style:family="table-cell" style:parent-style-name="Default" style:data-style-name="N37">
      <style:table-cell-properties style:vertical-align="automatic" fo:background-color="#FFFFFF" style:cell-protect="protected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7" style:family="table-cell" style:parent-style-name="Default" style:data-style-name="N4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28" style:family="table-cell" style:parent-style-name="Default" style:data-style-name="N0">
      <style:table-cell-properties style:vertical-align="automatic" fo:wrap-option="wrap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29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000000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fo:background-color="#FFFFFF" style:cell-protect="protected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fo:border-top="thin solid #000000" fo:border-bottom="thin solid #000000" fo:border-left="thin solid #000000" fo:border-right="none" fo:background-color="#000000" style:cell-protect="protected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33" style:family="table-cell" style:parent-style-name="Default" style:data-style-name="N36">
      <style:table-cell-properties fo:border="thin solid #000000" fo:background-color="#FFFFFF" style:cell-protect="none"/>
      <style:text-properties style:font-name="Arial" style:font-name-asian="Arial" style:font-name-complex="Arial" style:font-family-generic="swiss"/>
    </style:style>
    <style:style style:name="ce34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35" style:family="table-cell" style:parent-style-name="Default" style:data-style-name="N4">
      <style:table-cell-properties fo:border="thin solid #000000" fo:background-color="#FFFFFF" style:cell-protect="none"/>
      <style:text-properties style:font-name="Arial" style:font-name-asian="Arial" style:font-name-complex="Arial" style:font-family-generic="swiss"/>
    </style:style>
    <style:style style:name="ce36" style:family="table-cell" style:parent-style-name="Default" style:data-style-name="N0">
      <style:table-cell-properties fo:background-color="#FFFFFF" style:cell-protect="protected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37" style:family="table-cell" style:parent-style-name="Default" style:data-style-name="N0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38" style:family="table-cell" style:parent-style-name="Default" style:data-style-name="N37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39" style:family="table-cell" style:parent-style-name="Default" style:data-style-name="N4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40" style:family="table-cell" style:parent-style-name="Default" style:data-style-name="N0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1" style:family="table-cell" style:parent-style-name="Default" style:data-style-name="N37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2" style:family="table-cell" style:parent-style-name="Default" style:data-style-name="N0">
      <style:table-cell-properties fo:border="thin solid #000000" style:vertical-align="automatic" fo:background-color="#000000" style:cell-protect="protected" style:repeat-content="false"/>
      <style:paragraph-properties fo:text-align="end" fo:margin-right="0cm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43" style:family="table-cell" style:parent-style-name="Default" style:data-style-name="N30">
      <style:table-cell-properties fo:border="thin solid #000000" style:vertical-align="automatic" fo:background-color="#FFFFFF" style:cell-protect="none" style:repeat-content="false"/>
      <style:paragraph-properties fo:text-align="start" fo:margin-left="0cm"/>
      <style:text-properties style:font-name="Arial3" style:font-name-asian="Arial3" style:font-name-complex="Arial3"/>
    </style:style>
    <style:style style:name="ce44" style:family="table-cell" style:parent-style-name="Default" style:data-style-name="N30">
      <style:table-cell-properties fo:border="thin solid #000000" style:vertical-align="automatic" fo:background-color="#FFFFFF" style:cell-protect="none"/>
    </style:style>
    <style:style style:name="ce45" style:family="table-cell" style:parent-style-name="Default" style:data-style-name="N30">
      <style:table-cell-properties fo:border="thin solid #000000" style:vertical-align="automatic" fo:wrap-option="wrap" fo:background-color="#FFFFFF" style:cell-protect="none" style:repeat-content="false"/>
      <style:paragraph-properties fo:text-align="start" fo:margin-left="0cm"/>
      <style:text-properties style:font-name="Arial3" style:font-name-asian="Arial3" style:font-name-complex="Arial3"/>
    </style:style>
    <style:style style:name="ce46" style:family="table-cell" style:parent-style-name="Default" style:data-style-name="N30">
      <style:table-cell-properties fo:border="thin solid #000000" style:vertical-align="automatic" fo:background-color="#FFFFFF" style:cell-protect="none" style:repeat-content="false"/>
      <style:paragraph-properties fo:text-align="center"/>
    </style:style>
    <style:style style:name="ce47" style:family="table-cell" style:parent-style-name="Default" style:data-style-name="N36">
      <style:table-cell-properties fo:border="thin solid #000000" style:vertical-align="automatic" fo:background-color="#FFFFFF" style:cell-protect="none" style:repeat-content="false"/>
      <style:paragraph-properties fo:text-align="center"/>
    </style:style>
    <style:style style:name="ce48" style:family="table-cell" style:parent-style-name="Default" style:data-style-name="N4">
      <style:table-cell-properties fo:border="thin solid #000000" style:vertical-align="automatic" fo:background-color="#FFFFFF" style:cell-protect="none" style:repeat-content="false"/>
      <style:paragraph-properties fo:text-align="end" fo:margin-right="0cm"/>
      <style:text-properties style:font-name="Arial3" style:font-name-asian="Arial3" style:font-name-complex="Arial3"/>
    </style:style>
    <style:style style:name="ce49" style:family="table-cell" style:parent-style-name="Default" style:data-style-name="N30">
      <style:table-cell-properties fo:border="thin solid #000000" style:vertical-align="automatic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50" style:family="table-cell" style:parent-style-name="Default" style:data-style-name="N30">
      <style:table-cell-properties fo:border="thin solid #000000" style:vertical-align="automatic" fo:background-color="#FFFFFF" style:cell-protect="none"/>
      <style:text-properties style:font-name="Arial" style:font-name-asian="Arial" style:font-name-complex="Arial" style:font-family-generic="swiss"/>
    </style:style>
    <style:style style:name="ce51" style:family="table-cell" style:parent-style-name="Default" style:data-style-name="N30">
      <style:table-cell-properties fo:border="thin solid #000000" style:vertical-align="automatic" fo:wrap-option="wrap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52" style:family="table-cell" style:parent-style-name="Default" style:data-style-name="N30">
      <style:table-cell-properties fo:border="thin solid #000000" style:vertical-align="automatic" fo:background-color="#FFFFFF" style:cell-protect="non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53" style:family="table-cell" style:parent-style-name="Default" style:data-style-name="N36">
      <style:table-cell-properties fo:border="thin solid #000000" style:vertical-align="automatic" fo:background-color="#FFFFFF" style:cell-protect="non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54" style:family="table-cell" style:parent-style-name="Default" style:data-style-name="N4">
      <style:table-cell-properties fo:border="thin solid #000000" style:vertical-align="automatic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55" style:family="table-cell" style:parent-style-name="Default" style:data-style-name="N0">
      <style:table-cell-properties fo:background-color="#FFFFFF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56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weight="bold" style:font-weight-asian="bold" style:font-weight-complex="bold"/>
    </style:style>
    <style:style style:name="ce57" style:family="table-cell" style:parent-style-name="Default" style:data-style-name="N0">
      <style:table-cell-properties style:cell-protect="protected"/>
      <style:text-properties style:font-name="Arial" style:font-name-asian="Arial" style:font-name-complex="Arial" style:font-family-generic="swiss"/>
    </style:style>
    <style:style style:name="ce58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20pt" style:font-size-asian="20pt" style:font-size-complex="20pt" fo:font-weight="bold" style:font-weight-asian="bold" style:font-weight-complex="bold" style:font-family-generic="swiss"/>
    </style:style>
    <style:style style:name="ce59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60" style:family="table-cell" style:parent-style-name="Default" style:data-style-name="N0">
      <style:table-cell-properties style:vertical-align="top" fo:wrap-option="wrap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61" style:family="table-cell" style:parent-style-name="Default" style:data-style-name="N0">
      <style:table-cell-properties style:vertical-align="automatic" fo:wrap-option="wrap" fo:background-color="#FFFFFF" style:cell-protect="protected"/>
      <style:text-properties style:font-name="Arial" style:font-name-asian="Arial" style:font-name-complex="Arial" style:font-family-generic="swiss"/>
    </style:style>
    <style:style style:name="ce62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ackground-color="#FFFFFF" style:cell-protect="protected"/>
      <style:text-properties style:font-name="Arial" style:font-name-asian="Arial" style:font-name-complex="Arial" style:font-family-generic="swiss"/>
    </style:style>
    <style:style style:name="ce64" style:family="table-cell" style:parent-style-name="Default" style:data-style-name="N0">
      <style:table-cell-properties style:vertical-align="top" fo:wrap-option="wrap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65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66" style:family="table-cell" style:parent-style-name="Default" style:data-style-name="N38">
      <style:table-cell-properties fo:border-top="2pt solid #000000" fo:border-bottom="2pt solid #000000" fo:border-left="none" fo:border-right="2pt solid #000000"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T4" style:family="text" style:parent-style-name="Default">
      <style:text-properties fo:color="#000000" style:text-line-through-style="none" style:font-name="Arial2" style:font-name-asian="Arial2" style:font-name-complex="Arial2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5" style:family="text" style:parent-style-name="Default">
      <style:text-properties fo:color="#000000" style:text-line-through-style="none" style:font-name="Arial2" style:font-name-asian="Arial2" style:font-name-complex="Arial2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031875cm"/>
    </style:style>
    <style:style style:name="co2" style:family="table-column">
      <style:table-column-properties fo:break-before="auto" style:column-width="2.169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6.6675cm"/>
    </style:style>
    <style:style style:name="co5" style:family="table-column">
      <style:table-column-properties fo:break-before="auto" style:column-width="4.81541666666667cm"/>
    </style:style>
    <style:style style:name="co6" style:family="table-column">
      <style:table-column-properties fo:break-before="auto" style:column-width="5.29166666666667cm"/>
    </style:style>
    <style:style style:name="co7" style:family="table-column">
      <style:table-column-properties fo:break-before="auto" style:column-width="3.04270833333333cm"/>
    </style:style>
    <style:style style:name="co8" style:family="table-column">
      <style:table-column-properties fo:break-before="auto" style:column-width="5.02708333333333cm"/>
    </style:style>
    <style:style style:name="co9" style:family="table-column">
      <style:table-column-properties fo:break-before="auto" style:column-width="2.48708333333333cm"/>
    </style:style>
    <style:style style:name="co10" style:family="table-column">
      <style:table-column-properties fo:break-before="auto" style:column-width="2.98979166666667cm"/>
    </style:style>
    <style:style style:name="co11" style:family="table-column">
      <style:table-column-properties fo:break-before="auto" style:column-width="4.25979166666667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72pt" style:use-optimal-row-height="fals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145.5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26.25pt" style:use-optimal-row-height="false" fo:break-before="auto"/>
    </style:style>
    <style:style style:name="ro6" style:family="table-row">
      <style:table-row-properties style:row-height="73.5pt" style:use-optimal-row-height="false" fo:break-before="auto"/>
    </style:style>
    <style:style style:name="ro7" style:family="table-row">
      <style:table-row-properties style:row-height="18pt" style:use-optimal-row-height="false" fo:break-before="auto"/>
    </style:style>
    <style:style style:name="ro8" style:family="table-row">
      <style:table-row-properties style:row-height="30.75pt" style:use-optimal-row-height="false" fo:break-before="auto"/>
    </style:style>
    <style:style style:name="ro9" style:family="table-row">
      <style:table-row-properties style:row-height="36.75pt" style:use-optimal-row-height="false" fo:break-before="auto"/>
    </style:style>
    <style:style style:name="ro10" style:family="table-row">
      <style:table-row-properties style:row-height="15pt" style:use-optimal-row-height="true" fo:break-before="auto"/>
    </style:style>
    <style:style style:name="ro11" style:family="table-row">
      <style:table-row-properties style:row-height="14.25pt" style:use-optimal-row-height="true" fo:break-before="auto"/>
    </style:style>
    <style:style style:name="ro12" style:family="table-row">
      <style:table-row-properties style:row-height="30pt" style:use-optimal-row-height="true" fo:break-before="auto"/>
    </style:style>
    <style:style style:name="ro13" style:family="table-row">
      <style:table-row-properties style:row-height="19.9pt" style:use-optimal-row-height="false" fo:break-before="auto"/>
    </style:style>
    <style:style style:name="ro14" style:family="table-row">
      <style:table-row-properties style:row-height="16.5pt" style:use-optimal-row-height="true" fo:break-before="auto"/>
    </style:style>
    <style:style style:name="ro15" style:family="table-row">
      <style:table-row-properties style:row-height="18pt" style:use-optimal-row-height="true" fo:break-before="auto"/>
    </style:style>
    <style:style style:name="ro16" style:family="table-row">
      <style:table-row-properties style:row-height="3.75pt" style:use-optimal-row-height="false" fo:break-before="auto"/>
    </style:style>
    <style:style style:name="ro17" style:family="table-row">
      <style:table-row-properties style:row-height="14.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R68GAD_V1_00_0_EN" table:style-name="ta1">
        <table:shapes>
          <draw:frame draw:z-index="1" draw:id="id0" draw:style-name="a0" draw:name="Graphics 1" svg:x="0.38504in" svg:y="0in" svg:width="3.61457in" svg:height="1.11417in" style:rel-width="scale" style:rel-height="scale">
            <draw:image xlink:href="media/image1.png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932" table:default-cell-style-name="ce1"/>
        <table:table-column table:style-name="co13" table:number-columns-repeated="15441" table:default-cell-style-name="ce57"/>
        <table:table-row table:style-name="ro1">
          <table:table-cell table:style-name="ce1"/>
          <table:table-cell office:value-type="string" table:number-columns-spanned="10" table:number-rows-spanned="1" table:style-name="ce58">
            <text:p>Gift Aid donations schedule</text:p>
          </table:table-cell>
          <table:covered-table-cell table:number-columns-repeated="9"/>
          <table:table-cell table:number-columns-repeated="932" table:style-name="ce1"/>
          <table:table-cell table:number-columns-repeated="15441" table:style-name="ce2"/>
        </table:table-row>
        <table:table-row table:style-name="ro2">
          <table:table-cell table:style-name="ce3"/>
          <table:table-cell office:value-type="string" table:number-columns-spanned="10" table:number-rows-spanned="1" table:style-name="ce59">
            <text:p>Get it right first time - how to complete this schedule:</text:p>
          </table:table-cell>
          <table:covered-table-cell table:number-columns-repeated="9"/>
          <table:table-cell table:number-columns-repeated="16373" table:style-name="ce3"/>
        </table:table-row>
        <table:table-row table:style-name="ro3">
          <table:table-cell table:style-name="ce1"/>
          <table:table-cell office:value-type="string" table:number-columns-spanned="10" table:number-rows-spanned="1" table:style-name="ce60">
            <text:p>* Don't change the layout of the schedule or change the name of the worksheet.</text:p>
            <text:p>* Save the schedule as a .ods file not a Microsoft Excel .xlsx file, for example Gift Aid Jan 2014.ods.</text:p>
            <text:p>* If any section isn't applicable leave it blank. Don't enter N/A or Nil.</text:p>
            <text:p>* Don't include blank spaces or other characters at the start or end of boxes.<text:s text:c="2"/></text:p>
            <text:p>* Don't leave a blank row between donations.</text:p>
            <text:p>* Enter the house name or number and the postcode of all <text:s/>donors that live in the UK. For donors living abroad, enter their address and put X in the 'Postcode' column.</text:p>
            <text:p>* Stay within the maximum of 1,000 rows of donations.</text:p>
            <text:p>* Aggregated donations are donations under £20 from different people totalling less than £1000 per line. When you add together donations from the same donor, you must leave the aggregated donations column blank.</text:p>
            <text:p>* For sponsored events enter the participant's name and address, the date collected, and the total amount raised. Don't include any donations over £500 – these must be shown separately as normal Gift Aid donations.</text:p>
          </table:table-cell>
          <table:covered-table-cell table:number-columns-repeated="9"/>
          <table:table-cell table:number-columns-repeated="932" table:style-name="ce1"/>
          <table:table-cell table:number-columns-repeated="15441" table:style-name="ce2"/>
        </table:table-row>
        <table:table-row table:style-name="ro4">
          <table:table-cell table:style-name="ce1"/>
          <table:table-cell office:value-type="string" table:style-name="ce4">
            <text:p>Fig.1 shows an example of how to complete the schedule. For more information follow the link below. You must be connected to the internet to access the guidance.</text:p>
          </table:table-cell>
          <table:table-cell table:number-columns-repeated="941" table:style-name="ce1"/>
          <table:table-cell table:number-columns-repeated="15441" table:style-name="ce2"/>
        </table:table-row>
        <table:table-row table:style-name="ro5">
          <table:table-cell table:style-name="ce1"/>
          <table:table-cell office:value-type="string" table:style-name="ce5">
            <text:p><text:a xlink:href="https://www.gov.uk/claim-tax-back-on-donations-using-charities-online">Charities online guidance</text:a></text:p>
          </table:table-cell>
          <table:table-cell table:style-name="ce1"/>
          <table:table-cell table:style-name="ce3"/>
          <table:table-cell table:number-columns-repeated="939" table:style-name="ce1"/>
          <table:table-cell table:number-columns-repeated="15441" table:style-name="ce2"/>
        </table:table-row>
        <table:table-row table:style-name="ro6">
          <table:table-cell table:style-name="ce1"/>
          <table:table-cell office:value-type="string" table:style-name="ce6">
            <text:p>Fig.1</text:p>
            <text:p>Examples</text:p>
          </table:table-cell>
          <table:table-cell office:value-type="string" table:style-name="ce7">
            <text:p>Title</text:p>
            <text:p><text:span text:style-name="T5">up to 4 characters</text:span></text:p>
          </table:table-cell>
          <table:table-cell office:value-type="string" table:style-name="ce7">
            <text:p>First name or initial</text:p>
            <text:p><text:span text:style-name="T5">up to 35 characters with no spaces, or just enter an initial</text:span></text:p>
          </table:table-cell>
          <table:table-cell office:value-type="string" table:style-name="ce7">
            <text:p>Last name</text:p>
            <text:p><text:span text:style-name="T5">up to 35 characters</text:span></text:p>
          </table:table-cell>
          <table:table-cell office:value-type="string" table:style-name="ce7">
            <text:p>House name or number</text:p>
            <text:p><text:span text:style-name="T5">up to 40 characters</text:span></text:p>
          </table:table-cell>
          <table:table-cell office:value-type="string" table:style-name="ce7">
            <text:p>Postcode</text:p>
            <text:p><text:span text:style-name="T5"><text:s/></text:span><text:span text:style-name="T5">UPPER CASE and include a space</text:span></text:p>
          </table:table-cell>
          <table:table-cell office:value-type="string" table:style-name="ce7">
            <text:p>Aggregated donations</text:p>
            <text:p><text:span text:style-name="T5">a simple description up to 35 characters - DON'T enter Yes or Not Applicable.</text:span></text:p>
          </table:table-cell>
          <table:table-cell office:value-type="string" table:style-name="ce8">
            <text:p><text:s/><text:span text:style-name="T4">Sponsored event</text:span><text:span text:style-name="T4"/></text:p>
            <text:p>enter Yes or leave blank</text:p>
          </table:table-cell>
          <table:table-cell office:value-type="string" table:style-name="ce9">
            <text:p><text:s/><text:span text:style-name="T4">Donation date</text:span><text:span text:style-name="T4"/></text:p>
            <text:p>(DD/MM/YY)</text:p>
            <text:p>DON'T use hyphens or full stops</text:p>
          </table:table-cell>
          <table:table-cell office:value-type="string" table:style-name="ce10">
            <text:p>Amount</text:p>
            <text:p><text:span text:style-name="T5">DON'T use a £ sign</text:span>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7">
          <table:table-cell table:style-name="ce1"/>
          <table:table-cell table:style-name="ce11"/>
          <table:table-cell office:value-type="string" table:style-name="ce12">
            <text:p>Prof</text:p>
          </table:table-cell>
          <table:table-cell office:value-type="string" table:style-name="ce13">
            <text:p>Henry</text:p>
          </table:table-cell>
          <table:table-cell office:value-type="string" table:style-name="ce12">
            <text:p>House Martin</text:p>
          </table:table-cell>
          <table:table-cell office:value-type="string" table:style-name="ce12">
            <text:p>152A</text:p>
          </table:table-cell>
          <table:table-cell office:value-type="string" table:style-name="ce12">
            <text:p>M99 2QD</text:p>
          </table:table-cell>
          <table:table-cell table:style-name="ce14"/>
          <table:table-cell table:style-name="ce15"/>
          <table:table-cell office:value-type="date" office:date-value="2015-03-24T00:00:00" table:style-name="ce16">
            <text:p>24/03/15</text:p>
          </table:table-cell>
          <table:table-cell office:value-type="float" office:value="240" table:style-name="ce17">
            <text:p>240.00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4">
          <table:table-cell table:style-name="ce1"/>
          <table:table-cell table:style-name="ce11"/>
          <table:table-cell office:value-type="string" table:style-name="ce18">
            <text:p>Mr</text:p>
          </table:table-cell>
          <table:table-cell office:value-type="string" table:style-name="ce18">
            <text:p>John</text:p>
          </table:table-cell>
          <table:table-cell office:value-type="string" table:style-name="ce18">
            <text:p>Smith</text:p>
          </table:table-cell>
          <table:table-cell office:value-type="string" table:style-name="ce18">
            <text:p>100 Champs Elysees, Paris</text:p>
          </table:table-cell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5-06-24T00:00:00" table:style-name="ce16">
            <text:p>24/06/15</text:p>
          </table:table-cell>
          <table:table-cell office:value-type="float" office:value="250" table:style-name="ce17">
            <text:p>250.00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4">
          <table:table-cell table:style-name="ce1"/>
          <table:table-cell table:style-name="ce11"/>
          <table:table-cell table:style-name="ce18"/>
          <table:table-cell table:style-name="ce19"/>
          <table:table-cell table:number-columns-repeated="3" table:style-name="ce18"/>
          <table:table-cell office:value-type="string" table:style-name="ce18">
            <text:p>One off Gift Aid donations</text:p>
          </table:table-cell>
          <table:table-cell table:style-name="ce20"/>
          <table:table-cell office:value-type="date" office:date-value="2015-03-31T00:00:00" table:style-name="ce21">
            <text:p>31/03/15</text:p>
          </table:table-cell>
          <table:table-cell office:value-type="float" office:value="880" table:style-name="ce22">
            <text:p>880.00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4">
          <table:table-cell table:style-name="ce1"/>
          <table:table-cell table:style-name="ce11"/>
          <table:table-cell office:value-type="string" table:style-name="ce12">
            <text:p>Miss</text:p>
          </table:table-cell>
          <table:table-cell office:value-type="string" table:style-name="ce13">
            <text:p>B</text:p>
          </table:table-cell>
          <table:table-cell office:value-type="string" table:style-name="ce12">
            <text:p>Chaudry</text:p>
          </table:table-cell>
          <table:table-cell office:value-type="string" table:style-name="ce12">
            <text:p>21</text:p>
          </table:table-cell>
          <table:table-cell office:value-type="string" table:style-name="ce12">
            <text:p>L43 4FB</text:p>
          </table:table-cell>
          <table:table-cell table:style-name="ce14"/>
          <table:table-cell office:value-type="string" table:style-name="ce15">
            <text:p>Yes</text:p>
          </table:table-cell>
          <table:table-cell office:value-type="date" office:date-value="2015-04-26T00:00:00" table:style-name="ce16">
            <text:p>26/04/15</text:p>
          </table:table-cell>
          <table:table-cell office:value-type="float" office:value="80" table:style-name="ce17">
            <text:p>80.00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8">
          <table:table-cell table:style-name="ce1"/>
          <table:table-cell office:value-type="string" table:style-name="ce23">
            <text:p>Enter details from here</text:p>
          </table:table-cell>
          <table:table-cell table:style-name="ce4"/>
          <table:table-cell table:style-name="ce24"/>
          <table:table-cell table:number-columns-repeated="4" table:style-name="ce4"/>
          <table:table-cell table:style-name="ce25"/>
          <table:table-cell table:style-name="ce26"/>
          <table:table-cell table:style-name="ce27"/>
          <table:table-cell table:number-columns-repeated="932" table:style-name="ce1"/>
          <table:table-cell table:number-columns-repeated="15441" table:style-name="ce2"/>
        </table:table-row>
        <table:table-row table:style-name="ro9">
          <table:table-cell table:style-name="ce1"/>
          <table:table-cell table:style-name="ce28"/>
          <table:table-cell table:style-name="ce29"/>
          <table:table-cell office:value-type="string" table:style-name="ce30">
            <text:p>Earliest donation date in the period of claim. (DD/MM/YY)</text:p>
          </table:table-cell>
          <table:table-cell table:style-name="ce1"/>
          <table:table-cell office:value-type="string" table:number-columns-spanned="6" table:number-rows-spanned="1" table:style-name="ce61">
            <text:p>For aggregated donations, this date may be earlier than any date entered in the donation date column of the donations schedule table below.</text:p>
          </table:table-cell>
          <table:covered-table-cell table:number-columns-repeated="5"/>
          <table:table-cell table:number-columns-repeated="932" table:style-name="ce1"/>
          <table:table-cell table:number-columns-repeated="15441" table:style-name="ce2"/>
        </table:table-row>
        <table:table-row table:style-name="ro10">
          <table:table-cell table:style-name="ce1"/>
          <table:table-cell table:style-name="ce31"/>
          <table:table-cell office:value-type="string" table:style-name="ce32">
            <text:p>Box 1</text:p>
          </table:table-cell>
          <table:table-cell table:style-name="ce33"/>
          <table:table-cell table:style-name="ce34"/>
          <table:table-cell table:number-columns-spanned="6" table:number-rows-spanned="1" table:style-name="ce62"/>
          <table:covered-table-cell table:number-columns-repeated="5"/>
          <table:table-cell table:number-columns-repeated="932" table:style-name="ce1"/>
          <table:table-cell table:number-columns-repeated="15441" table:style-name="ce2"/>
        </table:table-row>
        <table:table-row table:number-rows-repeated="2" table:style-name="ro11">
          <table:table-cell table:style-name="ce1"/>
          <table:table-cell table:style-name="ce28"/>
          <table:table-cell table:style-name="ce4"/>
          <table:table-cell table:style-name="ce24"/>
          <table:table-cell table:number-columns-repeated="2" table:style-name="ce4"/>
          <table:table-cell table:style-name="ce1"/>
          <table:table-cell table:style-name="ce4"/>
          <table:table-cell table:style-name="ce25"/>
          <table:table-cell table:style-name="ce26"/>
          <table:table-cell table:style-name="ce27"/>
          <table:table-cell table:number-columns-repeated="932" table:style-name="ce1"/>
          <table:table-cell table:number-columns-repeated="15441" table:style-name="ce2"/>
        </table:table-row>
        <table:table-row table:style-name="ro12">
          <table:table-cell table:style-name="ce1"/>
          <table:table-cell table:style-name="ce28"/>
          <table:table-cell table:style-name="ce29"/>
          <table:table-cell office:value-type="string" table:style-name="ce30">
            <text:p>Previously over-claimed amount. Leave blank if none</text:p>
          </table:table-cell>
          <table:table-cell table:style-name="ce1"/>
          <table:table-cell office:value-type="string" table:number-columns-spanned="6" table:number-rows-spanned="1" table:style-name="ce63">
            <text:p>Make sure you show the tax not the donation. This amount will be deducted from your claim.</text:p>
          </table:table-cell>
          <table:covered-table-cell table:number-columns-repeated="5"/>
          <table:table-cell table:number-columns-repeated="932" table:style-name="ce1"/>
          <table:table-cell table:number-columns-repeated="15441" table:style-name="ce2"/>
        </table:table-row>
        <table:table-row table:style-name="ro10">
          <table:table-cell table:style-name="ce1"/>
          <table:table-cell table:style-name="ce31"/>
          <table:table-cell office:value-type="string" table:style-name="ce32">
            <text:p>Box 2</text:p>
          </table:table-cell>
          <table:table-cell table:style-name="ce35"/>
          <table:table-cell table:number-columns-repeated="3" table:style-name="ce1"/>
          <table:table-cell table:style-name="ce4"/>
          <table:table-cell table:style-name="ce1"/>
          <table:table-cell table:style-name="ce26"/>
          <table:table-cell table:style-name="ce27"/>
          <table:table-cell table:number-columns-repeated="932" table:style-name="ce1"/>
          <table:table-cell table:number-columns-repeated="15441" table:style-name="ce2"/>
        </table:table-row>
        <table:table-row table:style-name="ro11">
          <table:table-cell table:style-name="ce1"/>
          <table:table-cell table:style-name="ce36"/>
          <table:table-cell table:style-name="ce4"/>
          <table:table-cell office:value-type="string" table:style-name="ce24">
            <text:p>Don't use a £ sign</text:p>
          </table:table-cell>
          <table:table-cell table:number-columns-repeated="4" table:style-name="ce4"/>
          <table:table-cell table:style-name="ce25"/>
          <table:table-cell table:style-name="ce26"/>
          <table:table-cell table:style-name="ce27"/>
          <table:table-cell table:number-columns-repeated="932" table:style-name="ce1"/>
          <table:table-cell table:number-columns-repeated="15441" table:style-name="ce2"/>
        </table:table-row>
        <table:table-row table:style-name="ro13">
          <table:table-cell table:style-name="ce1"/>
          <table:table-cell office:value-type="string" table:number-columns-spanned="10" table:number-rows-spanned="1" table:style-name="ce64">
            <text:p>The total below is automatically calculated from the amounts you enter in the schedule.</text:p>
          </table:table-cell>
          <table:covered-table-cell table:number-columns-repeated="9"/>
          <table:table-cell table:number-columns-repeated="932" table:style-name="ce1"/>
          <table:table-cell table:number-columns-repeated="15441" table:style-name="ce2"/>
        </table:table-row>
        <table:table-row table:style-name="ro14">
          <table:table-cell table:number-columns-repeated="6" table:style-name="ce1"/>
          <table:table-cell table:style-name="ce4"/>
          <table:table-cell office:value-type="string" table:number-columns-spanned="2" table:number-rows-spanned="1" table:style-name="ce65">
            <text:p>Total donations:</text:p>
          </table:table-cell>
          <table:covered-table-cell/>
          <table:table-cell office:value-type="currency" office:value="0" table:formula="of:=SUM([.K25:.K1024])" table:number-columns-spanned="2" table:number-rows-spanned="1" table:style-name="ce66">
            <text:p>£0.00</text:p>
          </table:table-cell>
          <table:covered-table-cell/>
          <table:table-cell table:number-columns-repeated="932" table:style-name="ce1"/>
          <table:table-cell table:number-columns-repeated="15441" table:style-name="ce2"/>
        </table:table-row>
        <table:table-row table:style-name="ro15">
          <table:table-cell table:style-name="ce1"/>
          <table:table-cell office:value-type="string" table:number-columns-spanned="10" table:number-rows-spanned="1" table:style-name="ce59">
            <text:p>Donations schedule table</text:p>
          </table:table-cell>
          <table:covered-table-cell table:number-columns-repeated="9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table:number-columns-repeated="2" table:style-name="ce4"/>
          <table:table-cell table:style-name="ce24"/>
          <table:table-cell table:number-columns-repeated="4" table:style-name="ce4"/>
          <table:table-cell table:style-name="ce25"/>
          <table:table-cell table:style-name="ce26"/>
          <table:table-cell table:style-name="ce27"/>
          <table:table-cell table:number-columns-repeated="932" table:style-name="ce1"/>
          <table:table-cell table:number-columns-repeated="15441" table:style-name="ce2"/>
        </table:table-row>
        <table:table-row table:style-name="ro12">
          <table:table-cell table:style-name="ce3"/>
          <table:table-cell office:value-type="string" table:style-name="ce37">
            <text:p>Item</text:p>
          </table:table-cell>
          <table:table-cell office:value-type="string" table:style-name="ce37">
            <text:p>Title</text:p>
          </table:table-cell>
          <table:table-cell office:value-type="string" table:style-name="ce37">
            <text:p>First name</text:p>
          </table:table-cell>
          <table:table-cell office:value-type="string" table:style-name="ce37">
            <text:p>Last name</text:p>
          </table:table-cell>
          <table:table-cell office:value-type="string" table:style-name="ce37">
            <text:p>House name or number</text:p>
          </table:table-cell>
          <table:table-cell office:value-type="string" table:style-name="ce37">
            <text:p>Postcode</text:p>
          </table:table-cell>
          <table:table-cell office:value-type="string" table:style-name="ce37">
            <text:p>Aggregated donations</text:p>
          </table:table-cell>
          <table:table-cell office:value-type="string" table:style-name="ce37">
            <text:p>Sponsored event</text:p>
          </table:table-cell>
          <table:table-cell office:value-type="string" table:style-name="ce38">
            <text:p>Donation date</text:p>
          </table:table-cell>
          <table:table-cell office:value-type="string" table:style-name="ce39">
            <text:p>Amount</text:p>
          </table:table-cell>
          <table:table-cell table:number-columns-repeated="931" table:style-name="ce3"/>
          <table:table-cell table:style-name="ce1"/>
          <table:table-cell table:number-columns-repeated="15441" table:style-name="ce2"/>
        </table:table-row>
        <table:table-row table:style-name="ro10">
          <table:table-cell table:style-name="ce3"/>
          <table:table-cell table:number-columns-repeated="7" table:style-name="ce37"/>
          <table:table-cell office:value-type="string" table:style-name="ce40">
            <text:p><text:s/>(Yes/blank)</text:p>
          </table:table-cell>
          <table:table-cell office:value-type="string" table:style-name="ce41">
            <text:p><text:s/>(DD/MM/YY)</text:p>
          </table:table-cell>
          <table:table-cell table:style-name="ce39"/>
          <table:table-cell table:number-columns-repeated="931" table:style-name="ce3"/>
          <table:table-cell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" table:style-name="ce42">
            <text:p>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" table:style-name="ce42">
            <text:p>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" table:style-name="ce42">
            <text:p>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" table:style-name="ce42">
            <text:p>4</text:p>
          </table:table-cell>
          <table:table-cell table:number-columns-repeated="5"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" table:style-name="ce42">
            <text:p>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" table:style-name="ce42">
            <text:p>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" table:style-name="ce42">
            <text:p>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" table:style-name="ce42">
            <text:p>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" table:style-name="ce42">
            <text:p>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" table:style-name="ce42">
            <text:p>1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" table:style-name="ce42">
            <text:p>1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" table:style-name="ce42">
            <text:p>12</text:p>
          </table:table-cell>
          <table:table-cell table:number-columns-repeated="5"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" table:style-name="ce42">
            <text:p>1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" table:style-name="ce42">
            <text:p>1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" table:style-name="ce42">
            <text:p>1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" table:style-name="ce42">
            <text:p>1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" table:style-name="ce42">
            <text:p>1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" table:style-name="ce42">
            <text:p>1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" table:style-name="ce42">
            <text:p>1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" table:style-name="ce42">
            <text:p>20</text:p>
          </table:table-cell>
          <table:table-cell table:number-columns-repeated="5"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" table:style-name="ce42">
            <text:p>2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" table:style-name="ce42">
            <text:p>2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" table:style-name="ce42">
            <text:p>2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" table:style-name="ce42">
            <text:p>2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" table:style-name="ce42">
            <text:p>2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" table:style-name="ce42">
            <text:p>2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" table:style-name="ce42">
            <text:p>2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" table:style-name="ce42">
            <text:p>28</text:p>
          </table:table-cell>
          <table:table-cell table:number-columns-repeated="5"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" table:style-name="ce42">
            <text:p>2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" table:style-name="ce42">
            <text:p>3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" table:style-name="ce42">
            <text:p>3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" table:style-name="ce42">
            <text:p>3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" table:style-name="ce42">
            <text:p>3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" table:style-name="ce42">
            <text:p>3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" table:style-name="ce42">
            <text:p>3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" table:style-name="ce42">
            <text:p>3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" table:style-name="ce42">
            <text:p>3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" table:style-name="ce42">
            <text:p>3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" table:style-name="ce42">
            <text:p>3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" table:style-name="ce42">
            <text:p>4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" table:style-name="ce42">
            <text:p>4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" table:style-name="ce42">
            <text:p>4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" table:style-name="ce42">
            <text:p>4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" table:style-name="ce42">
            <text:p>4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" table:style-name="ce42">
            <text:p>4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" table:style-name="ce42">
            <text:p>4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" table:style-name="ce42">
            <text:p>4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" table:style-name="ce42">
            <text:p>4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" table:style-name="ce42">
            <text:p>4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" table:style-name="ce42">
            <text:p>5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" table:style-name="ce42">
            <text:p>5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" table:style-name="ce42">
            <text:p>5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" table:style-name="ce42">
            <text:p>5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" table:style-name="ce42">
            <text:p>5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" table:style-name="ce42">
            <text:p>5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" table:style-name="ce42">
            <text:p>5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" table:style-name="ce42">
            <text:p>5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" table:style-name="ce42">
            <text:p>5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" table:style-name="ce42">
            <text:p>5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" table:style-name="ce42">
            <text:p>6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" table:style-name="ce42">
            <text:p>6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" table:style-name="ce42">
            <text:p>6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" table:style-name="ce42">
            <text:p>6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" table:style-name="ce42">
            <text:p>6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" table:style-name="ce42">
            <text:p>6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" table:style-name="ce42">
            <text:p>6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" table:style-name="ce42">
            <text:p>6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" table:style-name="ce42">
            <text:p>6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" table:style-name="ce42">
            <text:p>6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" table:style-name="ce42">
            <text:p>7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" table:style-name="ce42">
            <text:p>7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" table:style-name="ce42">
            <text:p>7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" table:style-name="ce42">
            <text:p>7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" table:style-name="ce42">
            <text:p>7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" table:style-name="ce42">
            <text:p>7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" table:style-name="ce42">
            <text:p>7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" table:style-name="ce42">
            <text:p>7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" table:style-name="ce42">
            <text:p>7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" table:style-name="ce42">
            <text:p>7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" table:style-name="ce42">
            <text:p>8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" table:style-name="ce42">
            <text:p>8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" table:style-name="ce42">
            <text:p>8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" table:style-name="ce42">
            <text:p>8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" table:style-name="ce42">
            <text:p>8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" table:style-name="ce42">
            <text:p>8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" table:style-name="ce42">
            <text:p>8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" table:style-name="ce42">
            <text:p>8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" table:style-name="ce42">
            <text:p>8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" table:style-name="ce42">
            <text:p>8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" table:style-name="ce42">
            <text:p>9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" table:style-name="ce42">
            <text:p>9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" table:style-name="ce42">
            <text:p>9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" table:style-name="ce42">
            <text:p>9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" table:style-name="ce42">
            <text:p>9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" table:style-name="ce42">
            <text:p>9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" table:style-name="ce42">
            <text:p>9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" table:style-name="ce42">
            <text:p>9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" table:style-name="ce42">
            <text:p>9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" table:style-name="ce42">
            <text:p>9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0" table:style-name="ce42">
            <text:p>10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1" table:style-name="ce42">
            <text:p>10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2" table:style-name="ce42">
            <text:p>10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3" table:style-name="ce42">
            <text:p>10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4" table:style-name="ce42">
            <text:p>10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5" table:style-name="ce42">
            <text:p>10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6" table:style-name="ce42">
            <text:p>10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7" table:style-name="ce42">
            <text:p>10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8" table:style-name="ce42">
            <text:p>10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9" table:style-name="ce42">
            <text:p>10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0" table:style-name="ce42">
            <text:p>11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1" table:style-name="ce42">
            <text:p>11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2" table:style-name="ce42">
            <text:p>11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3" table:style-name="ce42">
            <text:p>11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4" table:style-name="ce42">
            <text:p>11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5" table:style-name="ce42">
            <text:p>11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6" table:style-name="ce42">
            <text:p>11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7" table:style-name="ce42">
            <text:p>11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8" table:style-name="ce42">
            <text:p>11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9" table:style-name="ce42">
            <text:p>11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0" table:style-name="ce42">
            <text:p>12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1" table:style-name="ce42">
            <text:p>12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2" table:style-name="ce42">
            <text:p>12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3" table:style-name="ce42">
            <text:p>12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4" table:style-name="ce42">
            <text:p>12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5" table:style-name="ce42">
            <text:p>12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6" table:style-name="ce42">
            <text:p>12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7" table:style-name="ce42">
            <text:p>12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8" table:style-name="ce42">
            <text:p>12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9" table:style-name="ce42">
            <text:p>12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0" table:style-name="ce42">
            <text:p>13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1" table:style-name="ce42">
            <text:p>13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2" table:style-name="ce42">
            <text:p>13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3" table:style-name="ce42">
            <text:p>13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4" table:style-name="ce42">
            <text:p>13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5" table:style-name="ce42">
            <text:p>13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6" table:style-name="ce42">
            <text:p>13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7" table:style-name="ce42">
            <text:p>13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8" table:style-name="ce42">
            <text:p>13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9" table:style-name="ce42">
            <text:p>13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0" table:style-name="ce42">
            <text:p>14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1" table:style-name="ce42">
            <text:p>14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2" table:style-name="ce42">
            <text:p>14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3" table:style-name="ce42">
            <text:p>14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4" table:style-name="ce42">
            <text:p>14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5" table:style-name="ce42">
            <text:p>14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6" table:style-name="ce42">
            <text:p>14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7" table:style-name="ce42">
            <text:p>14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8" table:style-name="ce42">
            <text:p>14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9" table:style-name="ce42">
            <text:p>14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0" table:style-name="ce42">
            <text:p>15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1" table:style-name="ce42">
            <text:p>15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2" table:style-name="ce42">
            <text:p>15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3" table:style-name="ce42">
            <text:p>15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4" table:style-name="ce42">
            <text:p>15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5" table:style-name="ce42">
            <text:p>15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6" table:style-name="ce42">
            <text:p>15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7" table:style-name="ce42">
            <text:p>15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8" table:style-name="ce42">
            <text:p>15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9" table:style-name="ce42">
            <text:p>15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0" table:style-name="ce42">
            <text:p>16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1" table:style-name="ce42">
            <text:p>16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2" table:style-name="ce42">
            <text:p>16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3" table:style-name="ce42">
            <text:p>16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4" table:style-name="ce42">
            <text:p>16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5" table:style-name="ce42">
            <text:p>16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6" table:style-name="ce42">
            <text:p>16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7" table:style-name="ce42">
            <text:p>16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8" table:style-name="ce42">
            <text:p>16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9" table:style-name="ce42">
            <text:p>16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0" table:style-name="ce42">
            <text:p>17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1" table:style-name="ce42">
            <text:p>17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2" table:style-name="ce42">
            <text:p>17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3" table:style-name="ce42">
            <text:p>17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4" table:style-name="ce42">
            <text:p>17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5" table:style-name="ce42">
            <text:p>17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6" table:style-name="ce42">
            <text:p>17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7" table:style-name="ce42">
            <text:p>17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8" table:style-name="ce42">
            <text:p>17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9" table:style-name="ce42">
            <text:p>17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0" table:style-name="ce42">
            <text:p>18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1" table:style-name="ce42">
            <text:p>18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2" table:style-name="ce42">
            <text:p>18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3" table:style-name="ce42">
            <text:p>18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4" table:style-name="ce42">
            <text:p>18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5" table:style-name="ce42">
            <text:p>18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6" table:style-name="ce42">
            <text:p>18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7" table:style-name="ce42">
            <text:p>18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8" table:style-name="ce42">
            <text:p>18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9" table:style-name="ce42">
            <text:p>18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0" table:style-name="ce42">
            <text:p>19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1" table:style-name="ce42">
            <text:p>19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2" table:style-name="ce42">
            <text:p>19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3" table:style-name="ce42">
            <text:p>19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4" table:style-name="ce42">
            <text:p>19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5" table:style-name="ce42">
            <text:p>19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6" table:style-name="ce42">
            <text:p>19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7" table:style-name="ce42">
            <text:p>19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8" table:style-name="ce42">
            <text:p>19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9" table:style-name="ce42">
            <text:p>19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0" table:style-name="ce42">
            <text:p>20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1" table:style-name="ce42">
            <text:p>20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2" table:style-name="ce42">
            <text:p>20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3" table:style-name="ce42">
            <text:p>20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4" table:style-name="ce42">
            <text:p>20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5" table:style-name="ce42">
            <text:p>20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6" table:style-name="ce42">
            <text:p>20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7" table:style-name="ce42">
            <text:p>20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8" table:style-name="ce42">
            <text:p>20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9" table:style-name="ce42">
            <text:p>20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0" table:style-name="ce42">
            <text:p>21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1" table:style-name="ce42">
            <text:p>21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2" table:style-name="ce42">
            <text:p>21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3" table:style-name="ce42">
            <text:p>21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4" table:style-name="ce42">
            <text:p>21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5" table:style-name="ce42">
            <text:p>21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6" table:style-name="ce42">
            <text:p>21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7" table:style-name="ce42">
            <text:p>21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8" table:style-name="ce42">
            <text:p>21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9" table:style-name="ce42">
            <text:p>21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0" table:style-name="ce42">
            <text:p>22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1" table:style-name="ce42">
            <text:p>22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2" table:style-name="ce42">
            <text:p>22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3" table:style-name="ce42">
            <text:p>22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4" table:style-name="ce42">
            <text:p>22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5" table:style-name="ce42">
            <text:p>22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6" table:style-name="ce42">
            <text:p>22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7" table:style-name="ce42">
            <text:p>22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8" table:style-name="ce42">
            <text:p>22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9" table:style-name="ce42">
            <text:p>22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0" table:style-name="ce42">
            <text:p>23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1" table:style-name="ce42">
            <text:p>23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2" table:style-name="ce42">
            <text:p>23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3" table:style-name="ce42">
            <text:p>23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4" table:style-name="ce42">
            <text:p>23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5" table:style-name="ce42">
            <text:p>23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6" table:style-name="ce42">
            <text:p>23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7" table:style-name="ce42">
            <text:p>23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8" table:style-name="ce42">
            <text:p>23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9" table:style-name="ce42">
            <text:p>23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0" table:style-name="ce42">
            <text:p>24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1" table:style-name="ce42">
            <text:p>24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2" table:style-name="ce42">
            <text:p>24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3" table:style-name="ce42">
            <text:p>24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4" table:style-name="ce42">
            <text:p>24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5" table:style-name="ce42">
            <text:p>24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6" table:style-name="ce42">
            <text:p>24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7" table:style-name="ce42">
            <text:p>24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8" table:style-name="ce42">
            <text:p>24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9" table:style-name="ce42">
            <text:p>24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0" table:style-name="ce42">
            <text:p>25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1" table:style-name="ce42">
            <text:p>25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2" table:style-name="ce42">
            <text:p>25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3" table:style-name="ce42">
            <text:p>25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4" table:style-name="ce42">
            <text:p>25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5" table:style-name="ce42">
            <text:p>25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6" table:style-name="ce42">
            <text:p>25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7" table:style-name="ce42">
            <text:p>25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8" table:style-name="ce42">
            <text:p>25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9" table:style-name="ce42">
            <text:p>25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0" table:style-name="ce42">
            <text:p>26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1" table:style-name="ce42">
            <text:p>26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2" table:style-name="ce42">
            <text:p>26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3" table:style-name="ce42">
            <text:p>26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4" table:style-name="ce42">
            <text:p>26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5" table:style-name="ce42">
            <text:p>26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6" table:style-name="ce42">
            <text:p>26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7" table:style-name="ce42">
            <text:p>26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8" table:style-name="ce42">
            <text:p>26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9" table:style-name="ce42">
            <text:p>26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0" table:style-name="ce42">
            <text:p>27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1" table:style-name="ce42">
            <text:p>27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2" table:style-name="ce42">
            <text:p>27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3" table:style-name="ce42">
            <text:p>27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4" table:style-name="ce42">
            <text:p>27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5" table:style-name="ce42">
            <text:p>27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6" table:style-name="ce42">
            <text:p>27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7" table:style-name="ce42">
            <text:p>27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8" table:style-name="ce42">
            <text:p>27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9" table:style-name="ce42">
            <text:p>27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0" table:style-name="ce42">
            <text:p>28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1" table:style-name="ce42">
            <text:p>28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2" table:style-name="ce42">
            <text:p>28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3" table:style-name="ce42">
            <text:p>28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4" table:style-name="ce42">
            <text:p>28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5" table:style-name="ce42">
            <text:p>28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6" table:style-name="ce42">
            <text:p>28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7" table:style-name="ce42">
            <text:p>28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8" table:style-name="ce42">
            <text:p>28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9" table:style-name="ce42">
            <text:p>28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0" table:style-name="ce42">
            <text:p>29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1" table:style-name="ce42">
            <text:p>29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2" table:style-name="ce42">
            <text:p>29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3" table:style-name="ce42">
            <text:p>29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4" table:style-name="ce42">
            <text:p>29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5" table:style-name="ce42">
            <text:p>29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6" table:style-name="ce42">
            <text:p>29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7" table:style-name="ce42">
            <text:p>29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8" table:style-name="ce42">
            <text:p>29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9" table:style-name="ce42">
            <text:p>29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0" table:style-name="ce42">
            <text:p>30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1" table:style-name="ce42">
            <text:p>30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2" table:style-name="ce42">
            <text:p>30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3" table:style-name="ce42">
            <text:p>30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4" table:style-name="ce42">
            <text:p>30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5" table:style-name="ce42">
            <text:p>30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6" table:style-name="ce42">
            <text:p>30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7" table:style-name="ce42">
            <text:p>30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8" table:style-name="ce42">
            <text:p>30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9" table:style-name="ce42">
            <text:p>30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0" table:style-name="ce42">
            <text:p>31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1" table:style-name="ce42">
            <text:p>31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2" table:style-name="ce42">
            <text:p>31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3" table:style-name="ce42">
            <text:p>31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4" table:style-name="ce42">
            <text:p>31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5" table:style-name="ce42">
            <text:p>31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6" table:style-name="ce42">
            <text:p>31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7" table:style-name="ce42">
            <text:p>31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8" table:style-name="ce42">
            <text:p>31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9" table:style-name="ce42">
            <text:p>31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0" table:style-name="ce42">
            <text:p>32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1" table:style-name="ce42">
            <text:p>32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2" table:style-name="ce42">
            <text:p>32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3" table:style-name="ce42">
            <text:p>32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4" table:style-name="ce42">
            <text:p>32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5" table:style-name="ce42">
            <text:p>32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6" table:style-name="ce42">
            <text:p>32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7" table:style-name="ce42">
            <text:p>327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8" table:style-name="ce42">
            <text:p>32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9" table:style-name="ce42">
            <text:p>32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0" table:style-name="ce42">
            <text:p>33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1" table:style-name="ce42">
            <text:p>33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2" table:style-name="ce42">
            <text:p>33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3" table:style-name="ce42">
            <text:p>33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4" table:style-name="ce42">
            <text:p>33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5" table:style-name="ce42">
            <text:p>335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6" table:style-name="ce42">
            <text:p>33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7" table:style-name="ce42">
            <text:p>33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8" table:style-name="ce42">
            <text:p>33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9" table:style-name="ce42">
            <text:p>33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0" table:style-name="ce42">
            <text:p>34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1" table:style-name="ce42">
            <text:p>34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2" table:style-name="ce42">
            <text:p>34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3" table:style-name="ce42">
            <text:p>343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4" table:style-name="ce42">
            <text:p>34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5" table:style-name="ce42">
            <text:p>34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6" table:style-name="ce42">
            <text:p>34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7" table:style-name="ce42">
            <text:p>34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8" table:style-name="ce42">
            <text:p>34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9" table:style-name="ce42">
            <text:p>34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0" table:style-name="ce42">
            <text:p>35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1" table:style-name="ce42">
            <text:p>351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2" table:style-name="ce42">
            <text:p>35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3" table:style-name="ce42">
            <text:p>35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4" table:style-name="ce42">
            <text:p>35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5" table:style-name="ce42">
            <text:p>35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6" table:style-name="ce42">
            <text:p>35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7" table:style-name="ce42">
            <text:p>35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8" table:style-name="ce42">
            <text:p>35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9" table:style-name="ce42">
            <text:p>359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0" table:style-name="ce42">
            <text:p>36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1" table:style-name="ce42">
            <text:p>36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2" table:style-name="ce42">
            <text:p>36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3" table:style-name="ce42">
            <text:p>36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4" table:style-name="ce42">
            <text:p>36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5" table:style-name="ce42">
            <text:p>36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6" table:style-name="ce42">
            <text:p>36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7" table:style-name="ce42">
            <text:p>367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8" table:style-name="ce42">
            <text:p>36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9" table:style-name="ce42">
            <text:p>36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0" table:style-name="ce42">
            <text:p>37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1" table:style-name="ce42">
            <text:p>37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2" table:style-name="ce42">
            <text:p>37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3" table:style-name="ce42">
            <text:p>37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4" table:style-name="ce42">
            <text:p>37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5" table:style-name="ce42">
            <text:p>375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6" table:style-name="ce42">
            <text:p>37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7" table:style-name="ce42">
            <text:p>37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8" table:style-name="ce42">
            <text:p>37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9" table:style-name="ce42">
            <text:p>37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0" table:style-name="ce42">
            <text:p>38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1" table:style-name="ce42">
            <text:p>38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2" table:style-name="ce42">
            <text:p>38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3" table:style-name="ce42">
            <text:p>38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4" table:style-name="ce42">
            <text:p>38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5" table:style-name="ce42">
            <text:p>38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6" table:style-name="ce42">
            <text:p>38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7" table:style-name="ce42">
            <text:p>38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8" table:style-name="ce42">
            <text:p>38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9" table:style-name="ce42">
            <text:p>38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0" table:style-name="ce42">
            <text:p>39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1" table:style-name="ce42">
            <text:p>39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2" table:style-name="ce42">
            <text:p>39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3" table:style-name="ce42">
            <text:p>39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4" table:style-name="ce42">
            <text:p>39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5" table:style-name="ce42">
            <text:p>39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6" table:style-name="ce42">
            <text:p>39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7" table:style-name="ce42">
            <text:p>39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8" table:style-name="ce42">
            <text:p>39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9" table:style-name="ce42">
            <text:p>39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0" table:style-name="ce42">
            <text:p>40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1" table:style-name="ce42">
            <text:p>40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2" table:style-name="ce42">
            <text:p>40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3" table:style-name="ce42">
            <text:p>40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4" table:style-name="ce42">
            <text:p>40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5" table:style-name="ce42">
            <text:p>40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6" table:style-name="ce42">
            <text:p>40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7" table:style-name="ce42">
            <text:p>40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8" table:style-name="ce42">
            <text:p>40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9" table:style-name="ce42">
            <text:p>40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0" table:style-name="ce42">
            <text:p>41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1" table:style-name="ce42">
            <text:p>41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2" table:style-name="ce42">
            <text:p>41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3" table:style-name="ce42">
            <text:p>41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4" table:style-name="ce42">
            <text:p>41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5" table:style-name="ce42">
            <text:p>41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6" table:style-name="ce42">
            <text:p>41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7" table:style-name="ce42">
            <text:p>41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8" table:style-name="ce42">
            <text:p>41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9" table:style-name="ce42">
            <text:p>41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0" table:style-name="ce42">
            <text:p>42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1" table:style-name="ce42">
            <text:p>42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2" table:style-name="ce42">
            <text:p>42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3" table:style-name="ce42">
            <text:p>42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4" table:style-name="ce42">
            <text:p>42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5" table:style-name="ce42">
            <text:p>42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6" table:style-name="ce42">
            <text:p>42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7" table:style-name="ce42">
            <text:p>42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8" table:style-name="ce42">
            <text:p>42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9" table:style-name="ce42">
            <text:p>42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0" table:style-name="ce42">
            <text:p>43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1" table:style-name="ce42">
            <text:p>43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2" table:style-name="ce42">
            <text:p>43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3" table:style-name="ce42">
            <text:p>43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4" table:style-name="ce42">
            <text:p>43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5" table:style-name="ce42">
            <text:p>43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6" table:style-name="ce42">
            <text:p>43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7" table:style-name="ce42">
            <text:p>43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8" table:style-name="ce42">
            <text:p>43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9" table:style-name="ce42">
            <text:p>43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0" table:style-name="ce42">
            <text:p>44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1" table:style-name="ce42">
            <text:p>44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2" table:style-name="ce42">
            <text:p>44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3" table:style-name="ce42">
            <text:p>44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4" table:style-name="ce42">
            <text:p>44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5" table:style-name="ce42">
            <text:p>445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6" table:style-name="ce42">
            <text:p>44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7" table:style-name="ce42">
            <text:p>44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8" table:style-name="ce42">
            <text:p>44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9" table:style-name="ce42">
            <text:p>44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0" table:style-name="ce42">
            <text:p>45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1" table:style-name="ce42">
            <text:p>45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2" table:style-name="ce42">
            <text:p>45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3" table:style-name="ce42">
            <text:p>453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4" table:style-name="ce42">
            <text:p>45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5" table:style-name="ce42">
            <text:p>45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6" table:style-name="ce42">
            <text:p>45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7" table:style-name="ce42">
            <text:p>45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8" table:style-name="ce42">
            <text:p>45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9" table:style-name="ce42">
            <text:p>45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0" table:style-name="ce42">
            <text:p>46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1" table:style-name="ce42">
            <text:p>461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2" table:style-name="ce42">
            <text:p>46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3" table:style-name="ce42">
            <text:p>46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4" table:style-name="ce42">
            <text:p>46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5" table:style-name="ce42">
            <text:p>46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6" table:style-name="ce42">
            <text:p>46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7" table:style-name="ce42">
            <text:p>46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8" table:style-name="ce42">
            <text:p>46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9" table:style-name="ce42">
            <text:p>469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0" table:style-name="ce42">
            <text:p>47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1" table:style-name="ce42">
            <text:p>47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2" table:style-name="ce42">
            <text:p>47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3" table:style-name="ce42">
            <text:p>47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4" table:style-name="ce42">
            <text:p>47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5" table:style-name="ce42">
            <text:p>47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6" table:style-name="ce42">
            <text:p>47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7" table:style-name="ce42">
            <text:p>477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8" table:style-name="ce42">
            <text:p>47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9" table:style-name="ce42">
            <text:p>47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0" table:style-name="ce42">
            <text:p>48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1" table:style-name="ce42">
            <text:p>48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2" table:style-name="ce42">
            <text:p>48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3" table:style-name="ce42">
            <text:p>48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4" table:style-name="ce42">
            <text:p>48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5" table:style-name="ce42">
            <text:p>485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6" table:style-name="ce42">
            <text:p>48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7" table:style-name="ce42">
            <text:p>48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8" table:style-name="ce42">
            <text:p>48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9" table:style-name="ce42">
            <text:p>48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0" table:style-name="ce42">
            <text:p>49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1" table:style-name="ce42">
            <text:p>49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2" table:style-name="ce42">
            <text:p>49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3" table:style-name="ce42">
            <text:p>493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4" table:style-name="ce42">
            <text:p>49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5" table:style-name="ce42">
            <text:p>49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6" table:style-name="ce42">
            <text:p>49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7" table:style-name="ce42">
            <text:p>49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8" table:style-name="ce42">
            <text:p>49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9" table:style-name="ce42">
            <text:p>49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0" table:style-name="ce42">
            <text:p>50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1" table:style-name="ce42">
            <text:p>50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2" table:style-name="ce42">
            <text:p>50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55"/>
          <table:table-cell office:value-type="float" office:value="503" table:style-name="ce42">
            <text:p>50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1" table:style-name="ce55"/>
          <table:table-cell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4" table:style-name="ce42">
            <text:p>50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5" table:style-name="ce42">
            <text:p>50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6" table:style-name="ce42">
            <text:p>50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7" table:style-name="ce42">
            <text:p>50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8" table:style-name="ce42">
            <text:p>50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9" table:style-name="ce42">
            <text:p>50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0" table:style-name="ce42">
            <text:p>51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1" table:style-name="ce42">
            <text:p>51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2" table:style-name="ce42">
            <text:p>51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3" table:style-name="ce42">
            <text:p>51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4" table:style-name="ce42">
            <text:p>51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5" table:style-name="ce42">
            <text:p>51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6" table:style-name="ce42">
            <text:p>51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7" table:style-name="ce42">
            <text:p>51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8" table:style-name="ce42">
            <text:p>51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9" table:style-name="ce42">
            <text:p>51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0" table:style-name="ce42">
            <text:p>52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1" table:style-name="ce42">
            <text:p>52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2" table:style-name="ce42">
            <text:p>52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3" table:style-name="ce42">
            <text:p>52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4" table:style-name="ce42">
            <text:p>52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5" table:style-name="ce42">
            <text:p>52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6" table:style-name="ce42">
            <text:p>52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7" table:style-name="ce42">
            <text:p>52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8" table:style-name="ce42">
            <text:p>52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9" table:style-name="ce42">
            <text:p>52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0" table:style-name="ce42">
            <text:p>53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1" table:style-name="ce42">
            <text:p>53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2" table:style-name="ce42">
            <text:p>53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3" table:style-name="ce42">
            <text:p>53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4" table:style-name="ce42">
            <text:p>53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5" table:style-name="ce42">
            <text:p>53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6" table:style-name="ce42">
            <text:p>53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7" table:style-name="ce42">
            <text:p>53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8" table:style-name="ce42">
            <text:p>53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9" table:style-name="ce42">
            <text:p>53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0" table:style-name="ce42">
            <text:p>54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1" table:style-name="ce42">
            <text:p>54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2" table:style-name="ce42">
            <text:p>54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3" table:style-name="ce42">
            <text:p>54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4" table:style-name="ce42">
            <text:p>54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5" table:style-name="ce42">
            <text:p>54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6" table:style-name="ce42">
            <text:p>54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7" table:style-name="ce42">
            <text:p>54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8" table:style-name="ce42">
            <text:p>54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9" table:style-name="ce42">
            <text:p>54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0" table:style-name="ce42">
            <text:p>55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1" table:style-name="ce42">
            <text:p>55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2" table:style-name="ce42">
            <text:p>55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3" table:style-name="ce42">
            <text:p>55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4" table:style-name="ce42">
            <text:p>55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5" table:style-name="ce42">
            <text:p>55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6" table:style-name="ce42">
            <text:p>55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7" table:style-name="ce42">
            <text:p>55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8" table:style-name="ce42">
            <text:p>55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9" table:style-name="ce42">
            <text:p>55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0" table:style-name="ce42">
            <text:p>56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1" table:style-name="ce42">
            <text:p>56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2" table:style-name="ce42">
            <text:p>56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3" table:style-name="ce42">
            <text:p>56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4" table:style-name="ce42">
            <text:p>56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5" table:style-name="ce42">
            <text:p>56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6" table:style-name="ce42">
            <text:p>56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7" table:style-name="ce42">
            <text:p>56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8" table:style-name="ce42">
            <text:p>56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9" table:style-name="ce42">
            <text:p>56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0" table:style-name="ce42">
            <text:p>57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1" table:style-name="ce42">
            <text:p>57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2" table:style-name="ce42">
            <text:p>57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3" table:style-name="ce42">
            <text:p>57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4" table:style-name="ce42">
            <text:p>57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5" table:style-name="ce42">
            <text:p>57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6" table:style-name="ce42">
            <text:p>57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7" table:style-name="ce42">
            <text:p>57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8" table:style-name="ce42">
            <text:p>57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9" table:style-name="ce42">
            <text:p>57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0" table:style-name="ce42">
            <text:p>58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1" table:style-name="ce42">
            <text:p>58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2" table:style-name="ce42">
            <text:p>58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3" table:style-name="ce42">
            <text:p>58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4" table:style-name="ce42">
            <text:p>58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5" table:style-name="ce42">
            <text:p>58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6" table:style-name="ce42">
            <text:p>58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7" table:style-name="ce42">
            <text:p>58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8" table:style-name="ce42">
            <text:p>58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9" table:style-name="ce42">
            <text:p>58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0" table:style-name="ce42">
            <text:p>59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1" table:style-name="ce42">
            <text:p>59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2" table:style-name="ce42">
            <text:p>59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3" table:style-name="ce42">
            <text:p>59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4" table:style-name="ce42">
            <text:p>59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5" table:style-name="ce42">
            <text:p>59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6" table:style-name="ce42">
            <text:p>59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7" table:style-name="ce42">
            <text:p>59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8" table:style-name="ce42">
            <text:p>59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9" table:style-name="ce42">
            <text:p>59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0" table:style-name="ce42">
            <text:p>60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1" table:style-name="ce42">
            <text:p>60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2" table:style-name="ce42">
            <text:p>60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3" table:style-name="ce42">
            <text:p>60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4" table:style-name="ce42">
            <text:p>60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5" table:style-name="ce42">
            <text:p>60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6" table:style-name="ce42">
            <text:p>60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7" table:style-name="ce42">
            <text:p>60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8" table:style-name="ce42">
            <text:p>60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9" table:style-name="ce42">
            <text:p>60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0" table:style-name="ce42">
            <text:p>61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1" table:style-name="ce42">
            <text:p>61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2" table:style-name="ce42">
            <text:p>61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3" table:style-name="ce42">
            <text:p>61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4" table:style-name="ce42">
            <text:p>61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5" table:style-name="ce42">
            <text:p>61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6" table:style-name="ce42">
            <text:p>61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7" table:style-name="ce42">
            <text:p>61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8" table:style-name="ce42">
            <text:p>61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9" table:style-name="ce42">
            <text:p>61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0" table:style-name="ce42">
            <text:p>62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1" table:style-name="ce42">
            <text:p>62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2" table:style-name="ce42">
            <text:p>62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3" table:style-name="ce42">
            <text:p>62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4" table:style-name="ce42">
            <text:p>62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5" table:style-name="ce42">
            <text:p>62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6" table:style-name="ce42">
            <text:p>62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7" table:style-name="ce42">
            <text:p>62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8" table:style-name="ce42">
            <text:p>62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9" table:style-name="ce42">
            <text:p>62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0" table:style-name="ce42">
            <text:p>63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1" table:style-name="ce42">
            <text:p>63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2" table:style-name="ce42">
            <text:p>63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3" table:style-name="ce42">
            <text:p>63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4" table:style-name="ce42">
            <text:p>63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5" table:style-name="ce42">
            <text:p>63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6" table:style-name="ce42">
            <text:p>63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7" table:style-name="ce42">
            <text:p>63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8" table:style-name="ce42">
            <text:p>63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9" table:style-name="ce42">
            <text:p>63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0" table:style-name="ce42">
            <text:p>64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1" table:style-name="ce42">
            <text:p>64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2" table:style-name="ce42">
            <text:p>64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3" table:style-name="ce42">
            <text:p>64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4" table:style-name="ce42">
            <text:p>64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5" table:style-name="ce42">
            <text:p>64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6" table:style-name="ce42">
            <text:p>64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7" table:style-name="ce42">
            <text:p>64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8" table:style-name="ce42">
            <text:p>64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9" table:style-name="ce42">
            <text:p>64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0" table:style-name="ce42">
            <text:p>65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1" table:style-name="ce42">
            <text:p>65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2" table:style-name="ce42">
            <text:p>65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3" table:style-name="ce42">
            <text:p>65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4" table:style-name="ce42">
            <text:p>65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5" table:style-name="ce42">
            <text:p>65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6" table:style-name="ce42">
            <text:p>65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7" table:style-name="ce42">
            <text:p>65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8" table:style-name="ce42">
            <text:p>65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9" table:style-name="ce42">
            <text:p>65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0" table:style-name="ce42">
            <text:p>66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1" table:style-name="ce42">
            <text:p>66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2" table:style-name="ce42">
            <text:p>66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3" table:style-name="ce42">
            <text:p>66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4" table:style-name="ce42">
            <text:p>66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5" table:style-name="ce42">
            <text:p>66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6" table:style-name="ce42">
            <text:p>66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7" table:style-name="ce42">
            <text:p>66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8" table:style-name="ce42">
            <text:p>66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9" table:style-name="ce42">
            <text:p>66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0" table:style-name="ce42">
            <text:p>67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1" table:style-name="ce42">
            <text:p>67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2" table:style-name="ce42">
            <text:p>67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3" table:style-name="ce42">
            <text:p>67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4" table:style-name="ce42">
            <text:p>67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5" table:style-name="ce42">
            <text:p>67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6" table:style-name="ce42">
            <text:p>67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7" table:style-name="ce42">
            <text:p>67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8" table:style-name="ce42">
            <text:p>67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9" table:style-name="ce42">
            <text:p>67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0" table:style-name="ce42">
            <text:p>68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1" table:style-name="ce42">
            <text:p>68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2" table:style-name="ce42">
            <text:p>68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3" table:style-name="ce42">
            <text:p>68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4" table:style-name="ce42">
            <text:p>68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5" table:style-name="ce42">
            <text:p>68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6" table:style-name="ce42">
            <text:p>68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7" table:style-name="ce42">
            <text:p>68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8" table:style-name="ce42">
            <text:p>68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9" table:style-name="ce42">
            <text:p>68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0" table:style-name="ce42">
            <text:p>69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1" table:style-name="ce42">
            <text:p>69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2" table:style-name="ce42">
            <text:p>69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3" table:style-name="ce42">
            <text:p>69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4" table:style-name="ce42">
            <text:p>69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5" table:style-name="ce42">
            <text:p>69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6" table:style-name="ce42">
            <text:p>69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7" table:style-name="ce42">
            <text:p>69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8" table:style-name="ce42">
            <text:p>69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9" table:style-name="ce42">
            <text:p>69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0" table:style-name="ce42">
            <text:p>70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1" table:style-name="ce42">
            <text:p>70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2" table:style-name="ce42">
            <text:p>70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3" table:style-name="ce42">
            <text:p>70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4" table:style-name="ce42">
            <text:p>70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5" table:style-name="ce42">
            <text:p>70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6" table:style-name="ce42">
            <text:p>70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7" table:style-name="ce42">
            <text:p>70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8" table:style-name="ce42">
            <text:p>70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9" table:style-name="ce42">
            <text:p>70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0" table:style-name="ce42">
            <text:p>71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1" table:style-name="ce42">
            <text:p>71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2" table:style-name="ce42">
            <text:p>71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3" table:style-name="ce42">
            <text:p>71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4" table:style-name="ce42">
            <text:p>71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5" table:style-name="ce42">
            <text:p>71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6" table:style-name="ce42">
            <text:p>71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7" table:style-name="ce42">
            <text:p>71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8" table:style-name="ce42">
            <text:p>71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9" table:style-name="ce42">
            <text:p>71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0" table:style-name="ce42">
            <text:p>72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1" table:style-name="ce42">
            <text:p>72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2" table:style-name="ce42">
            <text:p>72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3" table:style-name="ce42">
            <text:p>72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4" table:style-name="ce42">
            <text:p>72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5" table:style-name="ce42">
            <text:p>72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6" table:style-name="ce42">
            <text:p>72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7" table:style-name="ce42">
            <text:p>72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8" table:style-name="ce42">
            <text:p>72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9" table:style-name="ce42">
            <text:p>72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0" table:style-name="ce42">
            <text:p>73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1" table:style-name="ce42">
            <text:p>73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2" table:style-name="ce42">
            <text:p>73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3" table:style-name="ce42">
            <text:p>73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4" table:style-name="ce42">
            <text:p>73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5" table:style-name="ce42">
            <text:p>73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6" table:style-name="ce42">
            <text:p>73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7" table:style-name="ce42">
            <text:p>73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8" table:style-name="ce42">
            <text:p>73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9" table:style-name="ce42">
            <text:p>73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0" table:style-name="ce42">
            <text:p>74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1" table:style-name="ce42">
            <text:p>74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2" table:style-name="ce42">
            <text:p>74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3" table:style-name="ce42">
            <text:p>74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4" table:style-name="ce42">
            <text:p>74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5" table:style-name="ce42">
            <text:p>74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6" table:style-name="ce42">
            <text:p>74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7" table:style-name="ce42">
            <text:p>74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8" table:style-name="ce42">
            <text:p>74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9" table:style-name="ce42">
            <text:p>74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0" table:style-name="ce42">
            <text:p>75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1" table:style-name="ce42">
            <text:p>75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2" table:style-name="ce42">
            <text:p>75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3" table:style-name="ce42">
            <text:p>75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4" table:style-name="ce42">
            <text:p>75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5" table:style-name="ce42">
            <text:p>75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6" table:style-name="ce42">
            <text:p>75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7" table:style-name="ce42">
            <text:p>75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8" table:style-name="ce42">
            <text:p>75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9" table:style-name="ce42">
            <text:p>75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0" table:style-name="ce42">
            <text:p>76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1" table:style-name="ce42">
            <text:p>76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2" table:style-name="ce42">
            <text:p>76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3" table:style-name="ce42">
            <text:p>76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4" table:style-name="ce42">
            <text:p>76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5" table:style-name="ce42">
            <text:p>76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6" table:style-name="ce42">
            <text:p>76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7" table:style-name="ce42">
            <text:p>76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8" table:style-name="ce42">
            <text:p>76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9" table:style-name="ce42">
            <text:p>76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0" table:style-name="ce42">
            <text:p>77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1" table:style-name="ce42">
            <text:p>77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2" table:style-name="ce42">
            <text:p>77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3" table:style-name="ce42">
            <text:p>77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4" table:style-name="ce42">
            <text:p>77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5" table:style-name="ce42">
            <text:p>77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6" table:style-name="ce42">
            <text:p>77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7" table:style-name="ce42">
            <text:p>77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8" table:style-name="ce42">
            <text:p>77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9" table:style-name="ce42">
            <text:p>77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0" table:style-name="ce42">
            <text:p>78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1" table:style-name="ce42">
            <text:p>78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2" table:style-name="ce42">
            <text:p>78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3" table:style-name="ce42">
            <text:p>78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4" table:style-name="ce42">
            <text:p>78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5" table:style-name="ce42">
            <text:p>78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6" table:style-name="ce42">
            <text:p>78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7" table:style-name="ce42">
            <text:p>78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8" table:style-name="ce42">
            <text:p>78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9" table:style-name="ce42">
            <text:p>78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0" table:style-name="ce42">
            <text:p>79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1" table:style-name="ce42">
            <text:p>79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2" table:style-name="ce42">
            <text:p>79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3" table:style-name="ce42">
            <text:p>79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4" table:style-name="ce42">
            <text:p>79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5" table:style-name="ce42">
            <text:p>79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6" table:style-name="ce42">
            <text:p>79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7" table:style-name="ce42">
            <text:p>79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8" table:style-name="ce42">
            <text:p>79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9" table:style-name="ce42">
            <text:p>79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0" table:style-name="ce42">
            <text:p>80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1" table:style-name="ce42">
            <text:p>80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2" table:style-name="ce42">
            <text:p>80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3" table:style-name="ce42">
            <text:p>80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4" table:style-name="ce42">
            <text:p>80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5" table:style-name="ce42">
            <text:p>80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6" table:style-name="ce42">
            <text:p>80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7" table:style-name="ce42">
            <text:p>80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8" table:style-name="ce42">
            <text:p>80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9" table:style-name="ce42">
            <text:p>80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0" table:style-name="ce42">
            <text:p>81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1" table:style-name="ce42">
            <text:p>81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2" table:style-name="ce42">
            <text:p>81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3" table:style-name="ce42">
            <text:p>81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4" table:style-name="ce42">
            <text:p>81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5" table:style-name="ce42">
            <text:p>81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6" table:style-name="ce42">
            <text:p>81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7" table:style-name="ce42">
            <text:p>81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8" table:style-name="ce42">
            <text:p>81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9" table:style-name="ce42">
            <text:p>81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0" table:style-name="ce42">
            <text:p>82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1" table:style-name="ce42">
            <text:p>82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2" table:style-name="ce42">
            <text:p>82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3" table:style-name="ce42">
            <text:p>82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4" table:style-name="ce42">
            <text:p>82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5" table:style-name="ce42">
            <text:p>82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6" table:style-name="ce42">
            <text:p>82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7" table:style-name="ce42">
            <text:p>827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8" table:style-name="ce42">
            <text:p>82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9" table:style-name="ce42">
            <text:p>82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0" table:style-name="ce42">
            <text:p>83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1" table:style-name="ce42">
            <text:p>83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2" table:style-name="ce42">
            <text:p>83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3" table:style-name="ce42">
            <text:p>83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4" table:style-name="ce42">
            <text:p>83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5" table:style-name="ce42">
            <text:p>835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6" table:style-name="ce42">
            <text:p>83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7" table:style-name="ce42">
            <text:p>83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8" table:style-name="ce42">
            <text:p>83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9" table:style-name="ce42">
            <text:p>83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0" table:style-name="ce42">
            <text:p>84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1" table:style-name="ce42">
            <text:p>84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2" table:style-name="ce42">
            <text:p>84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3" table:style-name="ce42">
            <text:p>843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4" table:style-name="ce42">
            <text:p>84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5" table:style-name="ce42">
            <text:p>84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6" table:style-name="ce42">
            <text:p>84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7" table:style-name="ce42">
            <text:p>84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8" table:style-name="ce42">
            <text:p>84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9" table:style-name="ce42">
            <text:p>84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0" table:style-name="ce42">
            <text:p>85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1" table:style-name="ce42">
            <text:p>851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2" table:style-name="ce42">
            <text:p>85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3" table:style-name="ce42">
            <text:p>85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4" table:style-name="ce42">
            <text:p>85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5" table:style-name="ce42">
            <text:p>85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6" table:style-name="ce42">
            <text:p>85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7" table:style-name="ce42">
            <text:p>85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8" table:style-name="ce42">
            <text:p>85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9" table:style-name="ce42">
            <text:p>859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0" table:style-name="ce42">
            <text:p>86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1" table:style-name="ce42">
            <text:p>86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2" table:style-name="ce42">
            <text:p>86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3" table:style-name="ce42">
            <text:p>86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4" table:style-name="ce42">
            <text:p>86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5" table:style-name="ce42">
            <text:p>86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6" table:style-name="ce42">
            <text:p>86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7" table:style-name="ce42">
            <text:p>867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8" table:style-name="ce42">
            <text:p>86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9" table:style-name="ce42">
            <text:p>86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0" table:style-name="ce42">
            <text:p>87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1" table:style-name="ce42">
            <text:p>87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2" table:style-name="ce42">
            <text:p>87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3" table:style-name="ce42">
            <text:p>87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4" table:style-name="ce42">
            <text:p>87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5" table:style-name="ce42">
            <text:p>875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6" table:style-name="ce42">
            <text:p>87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7" table:style-name="ce42">
            <text:p>87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8" table:style-name="ce42">
            <text:p>87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9" table:style-name="ce42">
            <text:p>87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0" table:style-name="ce42">
            <text:p>88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1" table:style-name="ce42">
            <text:p>88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2" table:style-name="ce42">
            <text:p>88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3" table:style-name="ce42">
            <text:p>88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4" table:style-name="ce42">
            <text:p>88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5" table:style-name="ce42">
            <text:p>88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6" table:style-name="ce42">
            <text:p>88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7" table:style-name="ce42">
            <text:p>88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8" table:style-name="ce42">
            <text:p>88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9" table:style-name="ce42">
            <text:p>88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0" table:style-name="ce42">
            <text:p>89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1" table:style-name="ce42">
            <text:p>89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2" table:style-name="ce42">
            <text:p>89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3" table:style-name="ce42">
            <text:p>89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4" table:style-name="ce42">
            <text:p>89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5" table:style-name="ce42">
            <text:p>89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6" table:style-name="ce42">
            <text:p>89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7" table:style-name="ce42">
            <text:p>89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8" table:style-name="ce42">
            <text:p>89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9" table:style-name="ce42">
            <text:p>89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0" table:style-name="ce42">
            <text:p>90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1" table:style-name="ce42">
            <text:p>90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2" table:style-name="ce42">
            <text:p>90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3" table:style-name="ce42">
            <text:p>90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4" table:style-name="ce42">
            <text:p>90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5" table:style-name="ce42">
            <text:p>90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6" table:style-name="ce42">
            <text:p>90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7" table:style-name="ce42">
            <text:p>90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8" table:style-name="ce42">
            <text:p>90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9" table:style-name="ce42">
            <text:p>90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0" table:style-name="ce42">
            <text:p>91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1" table:style-name="ce42">
            <text:p>91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2" table:style-name="ce42">
            <text:p>91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3" table:style-name="ce42">
            <text:p>91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4" table:style-name="ce42">
            <text:p>91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5" table:style-name="ce42">
            <text:p>91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6" table:style-name="ce42">
            <text:p>91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7" table:style-name="ce42">
            <text:p>91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8" table:style-name="ce42">
            <text:p>91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9" table:style-name="ce42">
            <text:p>91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0" table:style-name="ce42">
            <text:p>92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1" table:style-name="ce42">
            <text:p>92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2" table:style-name="ce42">
            <text:p>92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3" table:style-name="ce42">
            <text:p>92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4" table:style-name="ce42">
            <text:p>92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5" table:style-name="ce42">
            <text:p>92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6" table:style-name="ce42">
            <text:p>92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7" table:style-name="ce42">
            <text:p>92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8" table:style-name="ce42">
            <text:p>92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9" table:style-name="ce42">
            <text:p>92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0" table:style-name="ce42">
            <text:p>93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1" table:style-name="ce42">
            <text:p>93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2" table:style-name="ce42">
            <text:p>93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3" table:style-name="ce42">
            <text:p>93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4" table:style-name="ce42">
            <text:p>93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5" table:style-name="ce42">
            <text:p>93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6" table:style-name="ce42">
            <text:p>93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7" table:style-name="ce42">
            <text:p>93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8" table:style-name="ce42">
            <text:p>93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9" table:style-name="ce42">
            <text:p>93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0" table:style-name="ce42">
            <text:p>94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1" table:style-name="ce42">
            <text:p>94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2" table:style-name="ce42">
            <text:p>94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3" table:style-name="ce42">
            <text:p>94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4" table:style-name="ce42">
            <text:p>94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5" table:style-name="ce42">
            <text:p>945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6" table:style-name="ce42">
            <text:p>94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7" table:style-name="ce42">
            <text:p>94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8" table:style-name="ce42">
            <text:p>94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9" table:style-name="ce42">
            <text:p>94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0" table:style-name="ce42">
            <text:p>95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1" table:style-name="ce42">
            <text:p>95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2" table:style-name="ce42">
            <text:p>95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3" table:style-name="ce42">
            <text:p>953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4" table:style-name="ce42">
            <text:p>95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5" table:style-name="ce42">
            <text:p>95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6" table:style-name="ce42">
            <text:p>95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7" table:style-name="ce42">
            <text:p>95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8" table:style-name="ce42">
            <text:p>95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9" table:style-name="ce42">
            <text:p>95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0" table:style-name="ce42">
            <text:p>96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1" table:style-name="ce42">
            <text:p>961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2" table:style-name="ce42">
            <text:p>96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3" table:style-name="ce42">
            <text:p>96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4" table:style-name="ce42">
            <text:p>96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5" table:style-name="ce42">
            <text:p>96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6" table:style-name="ce42">
            <text:p>96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7" table:style-name="ce42">
            <text:p>96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8" table:style-name="ce42">
            <text:p>96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9" table:style-name="ce42">
            <text:p>969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0" table:style-name="ce42">
            <text:p>97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1" table:style-name="ce42">
            <text:p>97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2" table:style-name="ce42">
            <text:p>97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3" table:style-name="ce42">
            <text:p>97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4" table:style-name="ce42">
            <text:p>97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5" table:style-name="ce42">
            <text:p>97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6" table:style-name="ce42">
            <text:p>97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7" table:style-name="ce42">
            <text:p>977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8" table:style-name="ce42">
            <text:p>97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9" table:style-name="ce42">
            <text:p>97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0" table:style-name="ce42">
            <text:p>98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1" table:style-name="ce42">
            <text:p>98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2" table:style-name="ce42">
            <text:p>98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3" table:style-name="ce42">
            <text:p>98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4" table:style-name="ce42">
            <text:p>98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5" table:style-name="ce42">
            <text:p>985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6" table:style-name="ce42">
            <text:p>98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7" table:style-name="ce42">
            <text:p>98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8" table:style-name="ce42">
            <text:p>98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9" table:style-name="ce42">
            <text:p>98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0" table:style-name="ce42">
            <text:p>99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1" table:style-name="ce42">
            <text:p>99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2" table:style-name="ce42">
            <text:p>99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3" table:style-name="ce42">
            <text:p>993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4" table:style-name="ce42">
            <text:p>99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5" table:style-name="ce42">
            <text:p>99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6" table:style-name="ce42">
            <text:p>99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7" table:style-name="ce42">
            <text:p>99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8" table:style-name="ce42">
            <text:p>99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9" table:style-name="ce42">
            <text:p>99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00" table:style-name="ce42">
            <text:p>100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0">
          <table:table-cell table:style-name="ce1"/>
          <table:table-cell office:value-type="string" table:style-name="ce56">
            <text:p>Stop! If you try to enter more than 1,000 rows of donations, you'll get an error message and you won't be able to submit your claim.</text:p>
          </table:table-cell>
          <table:table-cell table:style-name="ce4"/>
          <table:table-cell table:style-name="ce24"/>
          <table:table-cell table:number-columns-repeated="4" table:style-name="ce4"/>
          <table:table-cell table:style-name="ce25"/>
          <table:table-cell table:style-name="ce26"/>
          <table:table-cell table:style-name="ce27"/>
          <table:table-cell table:number-columns-repeated="932" table:style-name="ce1"/>
          <table:table-cell table:number-columns-repeated="15441" table:style-name="ce2"/>
        </table:table-row>
        <table:table-row table:style-name="ro10">
          <table:table-cell table:style-name="ce1"/>
          <table:table-cell office:value-type="string" table:style-name="ce56">
            <text:p>You will need to submit this claim with up to 1,000 rows of donations and then make another claim</text:p>
          </table:table-cell>
          <table:table-cell table:style-name="ce4"/>
          <table:table-cell table:style-name="ce24"/>
          <table:table-cell table:number-columns-repeated="4" table:style-name="ce4"/>
          <table:table-cell table:style-name="ce25"/>
          <table:table-cell table:style-name="ce26"/>
          <table:table-cell table:style-name="ce27"/>
          <table:table-cell table:number-columns-repeated="932" table:style-name="ce1"/>
          <table:table-cell table:number-columns-repeated="15441" table:style-name="ce2"/>
        </table:table-row>
        <table:table-row table:number-rows-repeated="63907" table:style-name="ro11">
          <table:table-cell table:style-name="ce1"/>
          <table:table-cell table:number-columns-repeated="2" table:style-name="ce4"/>
          <table:table-cell table:style-name="ce24"/>
          <table:table-cell table:number-columns-repeated="4" table:style-name="ce4"/>
          <table:table-cell table:style-name="ce25"/>
          <table:table-cell table:style-name="ce26"/>
          <table:table-cell table:style-name="ce27"/>
          <table:table-cell table:number-columns-repeated="932" table:style-name="ce1"/>
          <table:table-cell table:number-columns-repeated="15441" table:style-name="ce2"/>
        </table:table-row>
        <table:table-row table:number-rows-repeated="983643" table:style-name="ro11">
          <table:table-cell table:number-columns-repeated="16384"/>
        </table:table-row>
        <table:named-expressions>
          <table:named-range table:name="Print_Area" table:cell-range-address="R68GAD_V1_00_0_EN.$A$1:R68GAD_V1_00_0_EN.$XFD$1026" table:base-cell-address="R68GAD_V1_00_0_EN.$A$1"/>
        </table:named-expressions>
      </table:table>
      <table:named-expressions>
        <table:named-range table:name="GIFT_AID_DATA_AREA" table:cell-range-address="R68GAD_V1_00_0_EN.$C$6:R68GAD_V1_00_0_EN.$I$505" table:base-cell-address="R68GAD_V1_00_0_EN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1" svg:font-family="Arial1"/>
    <style:font-face style:name="Arial" svg:font-family="Arial"/>
    <style:font-face style:name="Arial2" svg:font-family="Arial2"/>
    <style:font-face style:name="Arial3" svg:font-family="Arial3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text-style style:name="N30">
      <number:text-content/>
    </number:text-style>
    <number:date-style style:name="N36P0">
      <number:day number:style="long"/>
      <number:text>/</number:text>
      <number:month number:style="long"/>
      <number:text>/</number:text>
      <number:year/>
    </number:date-style>
    <number:text-style style:name="N36">
      <number:text-content/>
      <style:map style:condition="value()&gt;=0" style:apply-style-name="N36P0"/>
    </number:text-style>
    <number:date-style style:name="N37">
      <number:day number:style="long"/>
      <number:text>/</number:text>
      <number:month number:style="long"/>
      <number:text>/</number:text>
      <number:year/>
    </number:date-style>
    <number:currency-style style:name="N38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8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8P0"/>
    </number:currency-style>
    <number:date-style style:name="N39">
      <number:day/>
      <number:text>/</number:text>
      <number:month/>
      <number:text>/</number:text>
      <number:year/>
    </number:date-style>
    <number:currency-style style:name="N40P0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4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0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MandatoryDataErrorStyle" style:family="table-cell" style:data-style-name="N0">
      <style:table-cell-properties fo:border="thin solid #FF0000" style:vertical-align="automatic" fo:background-color="#FFFFFF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ltr" style:first-page-number="1" style:scale-to="62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000000" style:font-name="Calibri" style:font-name-asian="Calibri" style:font-name-complex="Calibri" fo:font-size="10pt" style:font-size-asian="10pt" style:font-size-complex="10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OFFICI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328</meta:generator>
    <dc:title/>
    <meta:initial-creator>Rundle, Michael</meta:initial-creator>
    <dc:creator>Singh, Suryabala</dc:creator>
    <meta:creation-date>2024-08-29T06:55:19Z</meta:creation-date>
    <dc:date>2026-01-11T15:27:16Z</dc:date>
    <meta:editing-cycles>1</meta:editing-cycles>
    <meta:editing-duration>PT0S</meta:editing-duration>
  </office:meta>
</office:document-meta>
</file>