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3" style:font-name-asian="Arial3" style:font-name-complex="Arial3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ro18" style:family="table-row">
      <style:table-row-properties style:row-height="36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17-11-10T00:00:00" table:style-name="ce33">
            <text:p>10/11/17</text:p>
          </table:table-cell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office:value-type="float" office:value="240" table:style-name="ce35">
            <text:p>240.00</text:p>
          </table:table-cell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1850" table:formula="of:=SUM([.K25:.K1024])" table:number-columns-spanned="2" table:number-rows-spanned="1" table:style-name="ce66">
            <text:p>£1,85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Prof</text:p>
          </table:table-cell>
          <table:table-cell office:value-type="string" table:style-name="ce44">
            <text:p>Henry</text:p>
          </table:table-cell>
          <table:table-cell office:value-type="string" table:style-name="ce43">
            <text:p>House Martin</text:p>
          </table:table-cell>
          <table:table-cell office:value-type="string" table:style-name="ce43">
            <text:p>152A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4T00:00:00" table:style-name="ce47">
            <text:p>24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8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John</text:p>
          </table:table-cell>
          <table:table-cell office:value-type="string" table:style-name="ce43">
            <text:p>Smith</text:p>
          </table:table-cell>
          <table:table-cell office:value-type="string" table:style-name="ce45">
            <text:p>100 <text:s text:c="5"/>Champs Elysees,</text:p>
            <text:p><text:s/><text:span text:style-name="T6">Paris</text:span>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off Gift Aid donations</text:p>
          </table:table-cell>
          <table:table-cell table:style-name="ce46"/>
          <table:table-cell office:value-type="date" office:date-value="2015-03-31T00:00:00" table:style-name="ce47">
            <text:p>31/03/15</text:p>
          </table:table-cell>
          <table:table-cell office:value-type="float" office:value="880" table:style-name="ce48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15-04-26T00:00:00" table:style-name="ce47">
            <text:p>26/04/1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25-02-28T00:00:00" table:style-name="ce47">
            <text:p>28/02/2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happy</text:p>
          </table:table-cell>
          <table:table-cell office:value-type="string" table:style-name="ce43">
            <text:p>House del</text:p>
          </table:table-cell>
          <table:table-cell office:value-type="string" table:style-name="ce43">
            <text:p>152A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8T00:00:00" table:style-name="ce47">
            <text:p>28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1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/>
    <meta:initial-creator>Rundle, Michael</meta:initial-creator>
    <dc:creator>Singh, Suryabala</dc:creator>
    <meta:creation-date>2024-08-29T06:55:19Z</meta:creation-date>
    <dc:date>2026-02-10T19:08:37Z</dc:date>
    <meta:editing-cycles>1</meta:editing-cycles>
    <meta:editing-duration>PT0S</meta:editing-duration>
  </office:meta>
</office:document-meta>
</file>