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65pt" style:use-optimal-row-height="false" fo:break-before="auto"/>
    </style:style>
    <style:style style:name="ro2" style:family="table-row">
      <style:table-row-properties style:row-height="45.6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5.9pt" style:use-optimal-row-height="false" fo:break-before="auto"/>
    </style:style>
    <style:style style:name="ro5" style:family="table-row">
      <style:table-row-properties style:row-height="28.4pt" style:use-optimal-row-height="false" fo:break-before="auto"/>
    </style:style>
    <style:style style:name="ro6" style:family="table-row">
      <style:table-row-properties style:row-height="14.15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table:style-name="ce14"/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0" table:formula="of:=SUM([.E25:.E224])" table:style-name="ce16">
            <text:p>£0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0" table:formula="of:=SUM([.F25:.F224])" table:style-name="ce16">
            <text:p>£0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92" table:style-name="ro11">
          <table:table-cell table:number-columns-repeated="16384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>Other Income Schedule</dc:title>
    <meta:initial-creator>HMRC</meta:initial-creator>
    <dc:creator>Rundle, Michael</dc:creator>
    <meta:creation-date>2012-05-23T12:38:37Z</meta:creation-date>
    <dc:date>2025-11-20T15:18:10Z</dc:date>
    <meta:editing-cycles>46</meta:editing-cycles>
    <meta:editing-duration>PT110608S</meta:editing-duration>
  </office:meta>
</office:document-meta>
</file>