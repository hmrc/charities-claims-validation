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FFFFFF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FFFF" style:cell-protect="non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445833333333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75pt" style:use-optimal-row-height="false" fo:break-before="auto"/>
    </style:style>
    <style:style style:name="ro2" style:family="table-row">
      <style:table-row-properties style:row-height="45.75pt" style:use-optimal-row-height="fals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56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7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 table:protected="true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27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28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0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1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style-name="ce13">
            <text:p>Box 1</text:p>
          </table:table-cell>
          <table:table-cell office:value-type="float" office:value="78" table:style-name="ce14">
            <text:p>78.00</text:p>
          </table:table-cell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2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3">
            <text:p>Total of gross payments</text:p>
          </table:table-cell>
          <table:covered-table-cell/>
          <table:table-cell office:value-type="currency" office:value="9257" table:formula="of:=SUM([.E25:.E224])" table:style-name="ce16">
            <text:p>£9,257.00</text:p>
          </table:table-cell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3">
            <text:p>Total of tax deducted</text:p>
          </table:table-cell>
          <table:covered-table-cell/>
          <table:table-cell office:value-type="currency" office:value="192" table:formula="of:=SUM([.F25:.F224])" table:style-name="ce16">
            <text:p>£192.00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4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2"/>
          <table:table-cell office:value-type="float" office:value="1" table:style-name="ce23">
            <text:p>1</text:p>
          </table:table-cell>
          <table:table-cell office:value-type="string" table:style-name="ce24">
            <text:p>Test <text:s text:c="3"/>Us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2" table:style-name="ce23">
            <text:p>2</text:p>
          </table:table-cell>
          <table:table-cell office:value-type="string" table:style-name="ce24">
            <text:p>Test <text:s text:c="4"/>2nd <text:s text:c="2"/>User</text:p>
          </table:table-cell>
          <table:table-cell office:value-type="date" office:date-value="2025-02-28T00:00:00" table:style-name="ce25">
            <text:p>28/02/25</text:p>
          </table:table-cell>
          <table:table-cell office:value-type="float" office:value="6789" table:style-name="ce26">
            <text:p>6,789.00</text:p>
          </table:table-cell>
          <table:table-cell office:value-type="float" office:value="80" table:style-name="ce26">
            <text:p>80.00</text:p>
          </table:table-cell>
          <table:table-cell table:number-columns-repeated="1017" table:style-name="ce2"/>
          <table:table-cell table:number-columns-repeated="15361"/>
        </table:table-row>
        <table:table-row table:style-name="ro11"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35">
            <text:p>Test <text:s text:c="10"/>User</text:p>
            <text:p>Oth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4" table:style-name="ce23">
            <text:p>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5" table:style-name="ce23">
            <text:p>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6" table:style-name="ce23">
            <text:p>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7" table:style-name="ce23">
            <text:p>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8" table:style-name="ce23">
            <text:p>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/>
          <table:table-cell office:value-type="float" office:value="9" table:style-name="ce23">
            <text:p>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" table:style-name="ce23">
            <text:p>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" table:style-name="ce23">
            <text:p>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" table:style-name="ce23">
            <text:p>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" table:style-name="ce23">
            <text:p>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" table:style-name="ce23">
            <text:p>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" table:style-name="ce23">
            <text:p>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" table:style-name="ce23">
            <text:p>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" table:style-name="ce23">
            <text:p>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" table:style-name="ce23">
            <text:p>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" table:style-name="ce23">
            <text:p>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" table:style-name="ce23">
            <text:p>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1" table:style-name="ce23">
            <text:p>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2" table:style-name="ce23">
            <text:p>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3" table:style-name="ce23">
            <text:p>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4" table:style-name="ce23">
            <text:p>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5" table:style-name="ce23">
            <text:p>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6" table:style-name="ce23">
            <text:p>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7" table:style-name="ce23">
            <text:p>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8" table:style-name="ce23">
            <text:p>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9" table:style-name="ce23">
            <text:p>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0" table:style-name="ce23">
            <text:p>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1" table:style-name="ce23">
            <text:p>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2" table:style-name="ce23">
            <text:p>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3" table:style-name="ce23">
            <text:p>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4" table:style-name="ce23">
            <text:p>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5" table:style-name="ce23">
            <text:p>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6" table:style-name="ce23">
            <text:p>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7" table:style-name="ce23">
            <text:p>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8" table:style-name="ce23">
            <text:p>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9" table:style-name="ce23">
            <text:p>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0" table:style-name="ce23">
            <text:p>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1" table:style-name="ce23">
            <text:p>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2" table:style-name="ce23">
            <text:p>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3" table:style-name="ce23">
            <text:p>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4" table:style-name="ce23">
            <text:p>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5" table:style-name="ce23">
            <text:p>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6" table:style-name="ce23">
            <text:p>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7" table:style-name="ce23">
            <text:p>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8" table:style-name="ce23">
            <text:p>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9" table:style-name="ce23">
            <text:p>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0" table:style-name="ce23">
            <text:p>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1" table:style-name="ce23">
            <text:p>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2" table:style-name="ce23">
            <text:p>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3" table:style-name="ce23">
            <text:p>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4" table:style-name="ce23">
            <text:p>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5" table:style-name="ce23">
            <text:p>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6" table:style-name="ce23">
            <text:p>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7" table:style-name="ce23">
            <text:p>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8" table:style-name="ce23">
            <text:p>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9" table:style-name="ce23">
            <text:p>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0" table:style-name="ce23">
            <text:p>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1" table:style-name="ce23">
            <text:p>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2" table:style-name="ce23">
            <text:p>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3" table:style-name="ce23">
            <text:p>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4" table:style-name="ce23">
            <text:p>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5" table:style-name="ce23">
            <text:p>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6" table:style-name="ce23">
            <text:p>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7" table:style-name="ce23">
            <text:p>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8" table:style-name="ce23">
            <text:p>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9" table:style-name="ce23">
            <text:p>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0" table:style-name="ce23">
            <text:p>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1" table:style-name="ce23">
            <text:p>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2" table:style-name="ce23">
            <text:p>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3" table:style-name="ce23">
            <text:p>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4" table:style-name="ce23">
            <text:p>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5" table:style-name="ce23">
            <text:p>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6" table:style-name="ce23">
            <text:p>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7" table:style-name="ce23">
            <text:p>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8" table:style-name="ce23">
            <text:p>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9" table:style-name="ce23">
            <text:p>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0" table:style-name="ce23">
            <text:p>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1" table:style-name="ce23">
            <text:p>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2" table:style-name="ce23">
            <text:p>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3" table:style-name="ce23">
            <text:p>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4" table:style-name="ce23">
            <text:p>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5" table:style-name="ce23">
            <text:p>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6" table:style-name="ce23">
            <text:p>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7" table:style-name="ce23">
            <text:p>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8" table:style-name="ce23">
            <text:p>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9" table:style-name="ce23">
            <text:p>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0" table:style-name="ce23">
            <text:p>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1" table:style-name="ce23">
            <text:p>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2" table:style-name="ce23">
            <text:p>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3" table:style-name="ce23">
            <text:p>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4" table:style-name="ce23">
            <text:p>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5" table:style-name="ce23">
            <text:p>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6" table:style-name="ce23">
            <text:p>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7" table:style-name="ce23">
            <text:p>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8" table:style-name="ce23">
            <text:p>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9" table:style-name="ce23">
            <text:p>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0" table:style-name="ce23">
            <text:p>1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1" table:style-name="ce23">
            <text:p>10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2" table:style-name="ce23">
            <text:p>10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3" table:style-name="ce23">
            <text:p>10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4" table:style-name="ce23">
            <text:p>10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5" table:style-name="ce23">
            <text:p>10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6" table:style-name="ce23">
            <text:p>10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7" table:style-name="ce23">
            <text:p>10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8" table:style-name="ce23">
            <text:p>10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9" table:style-name="ce23">
            <text:p>10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0" table:style-name="ce23">
            <text:p>1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1" table:style-name="ce23">
            <text:p>1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2" table:style-name="ce23">
            <text:p>1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3" table:style-name="ce23">
            <text:p>1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4" table:style-name="ce23">
            <text:p>1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5" table:style-name="ce23">
            <text:p>1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6" table:style-name="ce23">
            <text:p>1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7" table:style-name="ce23">
            <text:p>1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8" table:style-name="ce23">
            <text:p>1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9" table:style-name="ce23">
            <text:p>1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0" table:style-name="ce23">
            <text:p>1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1" table:style-name="ce23">
            <text:p>1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2" table:style-name="ce23">
            <text:p>1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3" table:style-name="ce23">
            <text:p>1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4" table:style-name="ce23">
            <text:p>1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5" table:style-name="ce23">
            <text:p>1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6" table:style-name="ce23">
            <text:p>1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7" table:style-name="ce23">
            <text:p>1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8" table:style-name="ce23">
            <text:p>1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9" table:style-name="ce23">
            <text:p>1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0" table:style-name="ce23">
            <text:p>1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1" table:style-name="ce23">
            <text:p>1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2" table:style-name="ce23">
            <text:p>1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3" table:style-name="ce23">
            <text:p>1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4" table:style-name="ce23">
            <text:p>1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5" table:style-name="ce23">
            <text:p>1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6" table:style-name="ce23">
            <text:p>1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7" table:style-name="ce23">
            <text:p>1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8" table:style-name="ce23">
            <text:p>1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9" table:style-name="ce23">
            <text:p>1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0" table:style-name="ce23">
            <text:p>1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1" table:style-name="ce23">
            <text:p>1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2" table:style-name="ce23">
            <text:p>1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3" table:style-name="ce23">
            <text:p>1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4" table:style-name="ce23">
            <text:p>1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5" table:style-name="ce23">
            <text:p>1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6" table:style-name="ce23">
            <text:p>1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7" table:style-name="ce23">
            <text:p>1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8" table:style-name="ce23">
            <text:p>1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9" table:style-name="ce23">
            <text:p>1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0" table:style-name="ce23">
            <text:p>1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1" table:style-name="ce23">
            <text:p>1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2" table:style-name="ce23">
            <text:p>1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3" table:style-name="ce23">
            <text:p>1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4" table:style-name="ce23">
            <text:p>1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5" table:style-name="ce23">
            <text:p>1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6" table:style-name="ce23">
            <text:p>1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7" table:style-name="ce23">
            <text:p>1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8" table:style-name="ce23">
            <text:p>1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9" table:style-name="ce23">
            <text:p>1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0" table:style-name="ce23">
            <text:p>1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1" table:style-name="ce23">
            <text:p>1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2" table:style-name="ce23">
            <text:p>1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3" table:style-name="ce23">
            <text:p>1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4" table:style-name="ce23">
            <text:p>1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5" table:style-name="ce23">
            <text:p>1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6" table:style-name="ce23">
            <text:p>1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7" table:style-name="ce23">
            <text:p>1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8" table:style-name="ce23">
            <text:p>1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9" table:style-name="ce23">
            <text:p>1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0" table:style-name="ce23">
            <text:p>1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1" table:style-name="ce23">
            <text:p>1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2" table:style-name="ce23">
            <text:p>1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3" table:style-name="ce23">
            <text:p>1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4" table:style-name="ce23">
            <text:p>1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5" table:style-name="ce23">
            <text:p>1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6" table:style-name="ce23">
            <text:p>1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7" table:style-name="ce23">
            <text:p>1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8" table:style-name="ce23">
            <text:p>1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9" table:style-name="ce23">
            <text:p>1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0" table:style-name="ce23">
            <text:p>1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1" table:style-name="ce23">
            <text:p>1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2" table:style-name="ce23">
            <text:p>1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3" table:style-name="ce23">
            <text:p>1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4" table:style-name="ce23">
            <text:p>1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5" table:style-name="ce23">
            <text:p>1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6" table:style-name="ce23">
            <text:p>1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7" table:style-name="ce23">
            <text:p>1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8" table:style-name="ce23">
            <text:p>1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9" table:style-name="ce23">
            <text:p>1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0" table:style-name="ce23">
            <text:p>1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1" table:style-name="ce23">
            <text:p>1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2" table:style-name="ce23">
            <text:p>1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3" table:style-name="ce23">
            <text:p>1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4" table:style-name="ce23">
            <text:p>1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5" table:style-name="ce23">
            <text:p>1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6" table:style-name="ce23">
            <text:p>1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7" table:style-name="ce23">
            <text:p>1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8" table:style-name="ce23">
            <text:p>1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9" table:style-name="ce23">
            <text:p>1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0" table:style-name="ce23">
            <text:p>2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number-rows-repeated="480" table:style-name="ro12">
          <table:table-cell table:number-columns-repeated="16384"/>
        </table:table-row>
        <table:table-row table:number-rows-repeated="12" table:style-name="ro3">
          <table:table-cell/>
          <table:table-cell table:number-columns-repeated="1022" table:style-name="ce2"/>
          <table:table-cell table:number-columns-repeated="15361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21</meta:generator>
    <dc:title>Other Income Schedule</dc:title>
    <meta:initial-creator>HMRC</meta:initial-creator>
    <dc:creator>sandip.khedekar@digital.hmrc.gov.uk</dc:creator>
    <meta:creation-date>2012-05-23T12:38:37Z</meta:creation-date>
    <dc:date>2026-06-22T11:10:54Z</dc:date>
    <meta:editing-cycles>46</meta:editing-cycles>
    <meta:editing-duration>PT110608S</meta:editing-duration>
  </office:meta>
</office:document-meta>
</file>