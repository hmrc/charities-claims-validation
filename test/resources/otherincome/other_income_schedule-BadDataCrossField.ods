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transparent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transparent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="thin solid #000000" fo:background-color="#FFFFFF" style:cell-protect="none"/>
    </style:style>
    <style:style style:name="ce28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9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4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6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55.9pt" style:use-optimal-row-height="false" fo:break-before="auto"/>
    </style:style>
    <style:style style:name="ro6" style:family="table-row">
      <style:table-row-properties style:row-height="28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30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31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2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3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2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office:value-type="string" table:number-columns-spanned="5" table:number-rows-spanned="1" table:style-name="ce33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office:value-type="string" table:number-columns-spanned="5" table:number-rows-spanned="1" table:style-name="ce33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4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4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4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5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4">
          <table:table-cell table:style-name="ce2"/>
          <table:table-cell table:number-columns-spanned="5" table:number-rows-spanned="1" table:style-name="ce30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6">
            <text:p>Total of gross payments</text:p>
          </table:table-cell>
          <table:covered-table-cell/>
          <table:table-cell office:value-type="currency" office:value="10" table:formula="of:=SUM([.E25:.E224])" table:style-name="ce16">
            <text:p>£10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table:number-columns-spanned="5" table:number-rows-spanned="1" table:style-name="ce30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6">
            <text:p>Total of tax deducted</text:p>
          </table:table-cell>
          <table:covered-table-cell/>
          <table:table-cell office:value-type="currency" office:value="1E+20" table:formula="of:=SUM([.F25:.F224])" table:style-name="ce16">
            <text:p>£100,000,000,000,000,000,000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7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0" table:style-name="ce26">
            <text:p>10.00</text:p>
          </table:table-cell>
          <table:table-cell office:value-type="float" office:value="1E+20" table:style-name="ce26">
            <text:p>100,000,000,000,000,000,000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" table:style-name="ce23">
            <text:p>1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" table:style-name="ce23">
            <text:p>1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" table:style-name="ce23">
            <text:p>1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" table:style-name="ce23">
            <text:p>1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" table:style-name="ce23">
            <text:p>1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" table:style-name="ce23">
            <text:p>1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" table:style-name="ce23">
            <text:p>1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" table:style-name="ce23">
            <text:p>1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" table:style-name="ce23">
            <text:p>1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0" table:style-name="ce23">
            <text:p>2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1" table:style-name="ce23">
            <text:p>2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2" table:style-name="ce23">
            <text:p>2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3" table:style-name="ce23">
            <text:p>2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4" table:style-name="ce23">
            <text:p>2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5" table:style-name="ce23">
            <text:p>2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6" table:style-name="ce23">
            <text:p>2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7" table:style-name="ce23">
            <text:p>2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8" table:style-name="ce23">
            <text:p>2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9" table:style-name="ce23">
            <text:p>2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0" table:style-name="ce23">
            <text:p>3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1" table:style-name="ce23">
            <text:p>3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2" table:style-name="ce23">
            <text:p>3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3" table:style-name="ce23">
            <text:p>3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4" table:style-name="ce23">
            <text:p>3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5" table:style-name="ce23">
            <text:p>3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6" table:style-name="ce23">
            <text:p>3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7" table:style-name="ce23">
            <text:p>3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8" table:style-name="ce23">
            <text:p>3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39" table:style-name="ce23">
            <text:p>3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0" table:style-name="ce23">
            <text:p>4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1" table:style-name="ce23">
            <text:p>4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2" table:style-name="ce23">
            <text:p>4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3" table:style-name="ce23">
            <text:p>4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4" table:style-name="ce23">
            <text:p>4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5" table:style-name="ce23">
            <text:p>4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6" table:style-name="ce23">
            <text:p>4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7" table:style-name="ce23">
            <text:p>4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8" table:style-name="ce23">
            <text:p>4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49" table:style-name="ce23">
            <text:p>4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0" table:style-name="ce23">
            <text:p>5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1" table:style-name="ce23">
            <text:p>5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2" table:style-name="ce23">
            <text:p>5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3" table:style-name="ce23">
            <text:p>5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4" table:style-name="ce23">
            <text:p>5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5" table:style-name="ce23">
            <text:p>5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6" table:style-name="ce23">
            <text:p>5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7" table:style-name="ce23">
            <text:p>5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8" table:style-name="ce23">
            <text:p>5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59" table:style-name="ce23">
            <text:p>5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0" table:style-name="ce23">
            <text:p>6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1" table:style-name="ce23">
            <text:p>6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2" table:style-name="ce23">
            <text:p>6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3" table:style-name="ce23">
            <text:p>6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4" table:style-name="ce23">
            <text:p>6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5" table:style-name="ce23">
            <text:p>6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6" table:style-name="ce23">
            <text:p>6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7" table:style-name="ce23">
            <text:p>6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8" table:style-name="ce23">
            <text:p>6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69" table:style-name="ce23">
            <text:p>6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0" table:style-name="ce23">
            <text:p>7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1" table:style-name="ce23">
            <text:p>7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2" table:style-name="ce23">
            <text:p>7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3" table:style-name="ce23">
            <text:p>7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4" table:style-name="ce23">
            <text:p>7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5" table:style-name="ce23">
            <text:p>7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6" table:style-name="ce23">
            <text:p>7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7" table:style-name="ce23">
            <text:p>7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8" table:style-name="ce23">
            <text:p>7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79" table:style-name="ce23">
            <text:p>7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0" table:style-name="ce23">
            <text:p>8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1" table:style-name="ce23">
            <text:p>8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2" table:style-name="ce23">
            <text:p>8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3" table:style-name="ce23">
            <text:p>8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4" table:style-name="ce23">
            <text:p>8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5" table:style-name="ce23">
            <text:p>8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6" table:style-name="ce23">
            <text:p>8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7" table:style-name="ce23">
            <text:p>8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8" table:style-name="ce23">
            <text:p>8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89" table:style-name="ce23">
            <text:p>8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0" table:style-name="ce23">
            <text:p>9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1" table:style-name="ce23">
            <text:p>9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2" table:style-name="ce23">
            <text:p>9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3" table:style-name="ce23">
            <text:p>9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4" table:style-name="ce23">
            <text:p>9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5" table:style-name="ce23">
            <text:p>9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6" table:style-name="ce23">
            <text:p>9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7" table:style-name="ce23">
            <text:p>9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8" table:style-name="ce23">
            <text:p>9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99" table:style-name="ce23">
            <text:p>9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0" table:style-name="ce23">
            <text:p>10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1" table:style-name="ce23">
            <text:p>10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2" table:style-name="ce23">
            <text:p>10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3" table:style-name="ce23">
            <text:p>10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4" table:style-name="ce23">
            <text:p>10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5" table:style-name="ce23">
            <text:p>10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6" table:style-name="ce23">
            <text:p>10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7" table:style-name="ce23">
            <text:p>10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8" table:style-name="ce23">
            <text:p>10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09" table:style-name="ce23">
            <text:p>10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0" table:style-name="ce23">
            <text:p>11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1" table:style-name="ce23">
            <text:p>11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2" table:style-name="ce23">
            <text:p>11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3" table:style-name="ce23">
            <text:p>11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4" table:style-name="ce23">
            <text:p>11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5" table:style-name="ce23">
            <text:p>11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6" table:style-name="ce23">
            <text:p>11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7" table:style-name="ce23">
            <text:p>11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8" table:style-name="ce23">
            <text:p>11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19" table:style-name="ce23">
            <text:p>11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0" table:style-name="ce23">
            <text:p>12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1" table:style-name="ce23">
            <text:p>12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2" table:style-name="ce23">
            <text:p>12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3" table:style-name="ce23">
            <text:p>12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4" table:style-name="ce23">
            <text:p>12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5" table:style-name="ce23">
            <text:p>12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6" table:style-name="ce23">
            <text:p>12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7" table:style-name="ce23">
            <text:p>12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8" table:style-name="ce23">
            <text:p>12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29" table:style-name="ce23">
            <text:p>12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0" table:style-name="ce23">
            <text:p>13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1" table:style-name="ce23">
            <text:p>13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2" table:style-name="ce23">
            <text:p>13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3" table:style-name="ce23">
            <text:p>13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4" table:style-name="ce23">
            <text:p>13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5" table:style-name="ce23">
            <text:p>13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6" table:style-name="ce23">
            <text:p>13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7" table:style-name="ce23">
            <text:p>13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8" table:style-name="ce23">
            <text:p>13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39" table:style-name="ce23">
            <text:p>13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0" table:style-name="ce23">
            <text:p>14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1" table:style-name="ce23">
            <text:p>14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2" table:style-name="ce23">
            <text:p>14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3" table:style-name="ce23">
            <text:p>14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4" table:style-name="ce23">
            <text:p>14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5" table:style-name="ce23">
            <text:p>14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6" table:style-name="ce23">
            <text:p>14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7" table:style-name="ce23">
            <text:p>14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8" table:style-name="ce23">
            <text:p>14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49" table:style-name="ce23">
            <text:p>14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0" table:style-name="ce23">
            <text:p>15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1" table:style-name="ce23">
            <text:p>15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2" table:style-name="ce23">
            <text:p>15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3" table:style-name="ce23">
            <text:p>15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4" table:style-name="ce23">
            <text:p>15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5" table:style-name="ce23">
            <text:p>15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6" table:style-name="ce23">
            <text:p>15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7" table:style-name="ce23">
            <text:p>15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8" table:style-name="ce23">
            <text:p>15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59" table:style-name="ce23">
            <text:p>15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0" table:style-name="ce23">
            <text:p>16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1" table:style-name="ce23">
            <text:p>16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2" table:style-name="ce23">
            <text:p>16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3" table:style-name="ce23">
            <text:p>16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4" table:style-name="ce23">
            <text:p>16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5" table:style-name="ce23">
            <text:p>16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6" table:style-name="ce23">
            <text:p>16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7" table:style-name="ce23">
            <text:p>16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8" table:style-name="ce23">
            <text:p>16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69" table:style-name="ce23">
            <text:p>16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0" table:style-name="ce23">
            <text:p>17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1" table:style-name="ce23">
            <text:p>17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2" table:style-name="ce23">
            <text:p>17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3" table:style-name="ce23">
            <text:p>17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4" table:style-name="ce23">
            <text:p>17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5" table:style-name="ce23">
            <text:p>17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6" table:style-name="ce23">
            <text:p>17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7" table:style-name="ce23">
            <text:p>17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8" table:style-name="ce23">
            <text:p>17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79" table:style-name="ce23">
            <text:p>17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0" table:style-name="ce23">
            <text:p>18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1" table:style-name="ce23">
            <text:p>18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2" table:style-name="ce23">
            <text:p>18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3" table:style-name="ce23">
            <text:p>18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4" table:style-name="ce23">
            <text:p>18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5" table:style-name="ce23">
            <text:p>18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6" table:style-name="ce23">
            <text:p>18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7" table:style-name="ce23">
            <text:p>18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8" table:style-name="ce23">
            <text:p>18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89" table:style-name="ce23">
            <text:p>18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0" table:style-name="ce23">
            <text:p>19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1" table:style-name="ce23">
            <text:p>191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2" table:style-name="ce23">
            <text:p>192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3" table:style-name="ce23">
            <text:p>193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4" table:style-name="ce23">
            <text:p>194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5" table:style-name="ce23">
            <text:p>195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6" table:style-name="ce23">
            <text:p>196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7" table:style-name="ce23">
            <text:p>197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8" table:style-name="ce23">
            <text:p>198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199" table:style-name="ce23">
            <text:p>199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4">
          <table:table-cell/>
          <table:table-cell office:value-type="float" office:value="200" table:style-name="ce23">
            <text:p>200</text:p>
          </table:table-cell>
          <table:table-cell table:style-name="ce27"/>
          <table:table-cell table:style-name="ce28"/>
          <table:table-cell table:number-columns-repeated="2" table:style-name="ce29"/>
          <table:table-cell table:number-columns-repeated="16378"/>
        </table:table-row>
        <table:table-row table:number-rows-repeated="492" table:style-name="ro3">
          <table:table-cell table:number-columns-repeated="16384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>Other Income Schedule</dc:title>
    <meta:initial-creator>HMRC</meta:initial-creator>
    <dc:creator>Thornton, Kyle</dc:creator>
    <meta:creation-date>2012-05-23T12:38:37Z</meta:creation-date>
    <dc:date>2026-02-09T10:37:33Z</dc:date>
    <meta:editing-cycles>46</meta:editing-cycles>
    <meta:editing-duration>PT110608S</meta:editing-duration>
  </office:meta>
</office:document-meta>
</file>