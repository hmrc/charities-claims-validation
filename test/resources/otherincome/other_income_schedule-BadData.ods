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middle" fo:background-color="#FFFFFF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6" style:family="table-cell" style:parent-style-name="Default" style:data-style-name="N4">
      <style:table-cell-properties style:vertical-align="automatic" fo:background-color="#FFFFFF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</style:style>
    <style:style style:name="ce9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0" style:family="table-cell" style:parent-style-name="Default" style:data-style-name="N0">
      <style:table-cell-properties style:vertical-align="automatic" fo:background-color="#FFFFFF"/>
    </style:style>
    <style:style style:name="ce11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/>
      <style:text-properties fo:color="#FFFFFF" fo:font-weight="bold" style:font-weight-asian="bold" style:font-weight-complex="bold"/>
    </style:style>
    <style:style style:name="ce14" style:family="table-cell" style:parent-style-name="Default" style:data-style-name="N4">
      <style:table-cell-properties fo:border="thin solid #000000" fo:background-color="#FFFFFF" style:cell-protect="none"/>
    </style:style>
    <style:style style:name="ce15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16" style:family="table-cell" style:parent-style-name="Default" style:data-style-name="N37">
      <style:table-cell-properties fo:border-top="2pt solid #000000" fo:border-bottom="2pt solid #000000" fo:border-left="none" fo:border-right="2pt solid #000000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8" style:family="table-cell" style:parent-style-name="Default" style:data-style-name="N4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000000"/>
    </style:style>
    <style:style style:name="ce21" style:family="table-cell" style:parent-style-name="Default" style:data-style-name="N36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4">
      <style:table-cell-properties fo:border="thin solid #000000" style:vertical-align="automatic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fo:background-color="#FFFFFF" style:cell-protect="none"/>
    </style:style>
    <style:style style:name="ce25" style:family="table-cell" style:parent-style-name="Default" style:data-style-name="N38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26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ackground-color="#FFFFFF"/>
    </style:style>
    <style:style style:name="ce2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20pt" style:font-size-asian="20pt" style:font-size-complex="20pt"/>
    </style:style>
    <style:style style:name="ce2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31" style:family="table-cell" style:parent-style-name="Hyperlink" style:data-style-name="N4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3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18.0445833333333cm"/>
    </style:style>
    <style:style style:name="co4" style:family="table-column">
      <style:table-column-properties fo:break-before="auto" style:column-width="4.28625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77.85pt" style:use-optimal-row-height="false" fo:break-before="auto"/>
    </style:style>
    <style:style style:name="ro2" style:family="table-row">
      <style:table-row-properties style:row-height="45.7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56.1pt" style:use-optimal-row-height="false" fo:break-before="auto"/>
    </style:style>
    <style:style style:name="ro6" style:family="table-row">
      <style:table-row-properties style:row-height="28.5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OI_V1_00_0_EN" table:style-name="ta1">
        <table:shapes>
          <draw:frame draw:z-index="1" draw:id="id0" draw:style-name="a0" draw:name="Graphics 1" svg:x="0.39488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column table:style-name="co8" table:number-columns-repeated="15361" table:default-cell-style-name="ce1"/>
        <table:table-row table:style-name="ro1">
          <table:table-cell table:style-name="ce2"/>
          <table:table-cell table:number-columns-spanned="5" table:number-rows-spanned="1" table:style-name="ce27"/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2">
          <table:table-cell table:style-name="ce3"/>
          <table:table-cell office:value-type="string" table:number-columns-spanned="5" table:number-rows-spanned="1" table:style-name="ce28">
            <text:p>Other income</text:p>
          </table:table-cell>
          <table:covered-table-cell table:number-columns-repeated="4"/>
          <table:table-cell table:style-name="ce3"/>
          <table:table-cell table:number-columns-repeated="1016" table:style-name="ce2"/>
          <table:table-cell table:number-columns-repeated="15361"/>
        </table:table-row>
        <table:table-row table:style-name="ro3">
          <table:table-cell table:style-name="ce2"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4">
          <table:table-cell table:style-name="ce2"/>
          <table:table-cell office:value-type="string" table:number-columns-spanned="5" table:number-rows-spanned="1" table:style-name="ce29">
            <text:p>How to complete this schedule: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5">
          <table:table-cell table:style-name="ce2"/>
          <table:table-cell office:value-type="string" table:number-columns-spanned="5" table:number-rows-spanned="1" table:style-name="ce30">
            <text:p><text:span text:style-name="T2">Step 1 –</text:span><text:s/>Enter the amount of tax overclaimed in previous other income claims. If you haven't overclaimed any tax, leave this box blank.</text:p>
            <text:p/>
            <text:p><text:span text:style-name="T2">Step 2 –</text:span><text:s/>Enter the details of each other income payment in the table below. Enter values in pounds sterling including pence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style-name="ce7"/>
          <table:table-cell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4">
          <table:table-cell table:style-name="ce2"/>
          <table:table-cell office:value-type="string" table:number-columns-spanned="5" table:number-rows-spanned="1" table:style-name="ce29">
            <text:p>Important note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6">
          <table:table-cell table:style-name="ce2"/>
          <table:table-cell office:value-type="string" table:number-columns-spanned="5" table:number-rows-spanned="1" table:style-name="ce30">
            <text:p>You<text:s/><text:span text:style-name="T2">must not</text:span><text:s/>alter the structure or formatting of this schedule or HMRC won't accept it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6">
          <table:table-cell table:style-name="ce2"/>
          <table:table-cell office:value-type="string" table:number-columns-spanned="5" table:number-rows-spanned="1" table:style-name="ce30">
            <text:p>For more information on completing this schedule follow the link below. You must be connected to the internet to access the guide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7">
          <table:table-cell table:style-name="ce2"/>
          <table:table-cell table:style-name="ce8"/>
          <table:table-cell table:style-name="ce9"/>
          <table:table-cell office:value-type="string" table:style-name="ce8">
            <text:p>►</text:p>
          </table:table-cell>
          <table:table-cell office:value-type="string" table:number-columns-spanned="2" table:number-rows-spanned="1" table:style-name="ce31">
            <text:p><text:a xlink:href="http://www.hmrc.gov.uk/charitiesonline">Charities Online guidance</text:a></text:p>
          </table:table-cell>
          <table:covered-table-cell/>
          <table:table-cell table:number-columns-repeated="1017" table:style-name="ce2"/>
          <table:table-cell table:number-columns-repeated="15361"/>
        </table:table-row>
        <table:table-row table:style-name="ro7">
          <table:table-cell table:style-name="ce2"/>
          <table:table-cell table:style-name="ce7"/>
          <table:table-cell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style-name="ce7"/>
          <table:table-cell table:style-name="ce4"/>
          <table:table-cell table:style-name="ce10"/>
          <table:table-cell table:number-columns-repeated="2" table:style-name="ce4"/>
          <table:table-cell table:style-name="ce2"/>
          <table:table-cell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4">
          <table:table-cell table:style-name="ce2"/>
          <table:table-cell table:style-name="ce7"/>
          <table:table-cell office:value-type="string" table:style-name="ce12">
            <text:p>Adjustment for other income previous over-claimed</text:p>
          </table:table-cell>
          <table:table-cell table:number-columns-repeated="3" table:style-name="ce2"/>
          <table:table-cell table:number-columns-repeated="2"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4">
          <table:table-cell table:style-name="ce2"/>
          <table:table-cell office:value-type="string" table:style-name="ce13">
            <text:p>Box 1</text:p>
          </table:table-cell>
          <table:table-cell office:value-type="string" table:style-name="ce14">
            <text:p>test</text:p>
          </table:table-cell>
          <table:table-cell table:number-columns-repeated="4" table:style-name="ce2"/>
          <table:table-cell table:style-name="ce4"/>
          <table:table-cell table:style-name="ce2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table:style-name="ce15"/>
          <table:table-cell table:style-name="ce4"/>
          <table:table-cell table:style-name="ce10"/>
          <table:table-cell table:number-columns-repeated="4"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office:value-type="string" table:number-columns-spanned="5" table:number-rows-spanned="1" table:style-name="ce32">
            <text:p>The totals below are automatically calculated from the amounts you enter in the schedule.</text:p>
          </table:table-cell>
          <table:covered-table-cell table:number-columns-repeated="4"/>
          <table:table-cell table:style-name="ce4"/>
          <table:table-cell table:number-columns-repeated="1016" table:style-name="ce2"/>
          <table:table-cell table:number-columns-repeated="15361"/>
        </table:table-row>
        <table:table-row table:style-name="ro4">
          <table:table-cell table:style-name="ce2"/>
          <table:table-cell table:number-columns-spanned="5" table:number-rows-spanned="1" table:style-name="ce27"/>
          <table:covered-table-cell table:number-columns-repeated="4"/>
          <table:table-cell table:style-name="ce4"/>
          <table:table-cell table:number-columns-repeated="16377"/>
        </table:table-row>
        <table:table-row table:style-name="ro8">
          <table:table-cell table:style-name="ce2"/>
          <table:table-cell table:style-name="ce7"/>
          <table:table-cell table:style-name="ce4"/>
          <table:table-cell office:value-type="string" table:number-columns-spanned="2" table:number-rows-spanned="1" table:style-name="ce33">
            <text:p>Total of gross payments</text:p>
          </table:table-cell>
          <table:covered-table-cell/>
          <table:table-cell office:value-type="currency" office:value="15662" table:formula="of:=SUM([.E25:.E224])" table:style-name="ce16">
            <text:p>£15,662.00</text:p>
          </table:table-cell>
          <table:table-cell table:number-columns-repeated="1017" table:style-name="ce2"/>
          <table:table-cell table:number-columns-repeated="15361"/>
        </table:table-row>
        <table:table-row table:style-name="ro4">
          <table:table-cell table:style-name="ce2"/>
          <table:table-cell table:number-columns-spanned="5" table:number-rows-spanned="1" table:style-name="ce27"/>
          <table:covered-table-cell table:number-columns-repeated="4"/>
          <table:table-cell table:style-name="ce4"/>
          <table:table-cell table:number-columns-repeated="16377"/>
        </table:table-row>
        <table:table-row table:style-name="ro8">
          <table:table-cell table:number-columns-repeated="3" table:style-name="ce2"/>
          <table:table-cell office:value-type="string" table:number-columns-spanned="2" table:number-rows-spanned="1" table:style-name="ce33">
            <text:p>Total of tax deducted</text:p>
          </table:table-cell>
          <table:covered-table-cell/>
          <table:table-cell office:value-type="currency" office:value="640" table:formula="of:=SUM([.F25:.F224])" table:style-name="ce16">
            <text:p>£640.00</text:p>
          </table:table-cell>
          <table:table-cell table:style-name="ce4"/>
          <table:table-cell table:number-columns-repeated="16377"/>
        </table:table-row>
        <table:table-row table:style-name="ro9">
          <table:table-cell table:style-name="ce2"/>
          <table:table-cell office:value-type="string" table:number-columns-spanned="5" table:number-rows-spanned="1" table:style-name="ce34">
            <text:p>Other income table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10">
          <table:table-cell table:style-name="ce3"/>
          <table:table-cell office:value-type="string" table:style-name="ce17">
            <text:p>Item</text:p>
          </table:table-cell>
          <table:table-cell office:value-type="string" table:style-name="ce17">
            <text:p>Name of payer</text:p>
          </table:table-cell>
          <table:table-cell office:value-type="string" table:style-name="ce17">
            <text:p>Date of payment</text:p>
          </table:table-cell>
          <table:table-cell office:value-type="string" table:style-name="ce18">
            <text:p>Gross payment</text:p>
          </table:table-cell>
          <table:table-cell office:value-type="string" table:style-name="ce18">
            <text:p>Tax deducted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3"/>
          <table:table-cell table:style-name="ce19"/>
          <table:table-cell table:style-name="ce20"/>
          <table:table-cell office:value-type="string" table:style-name="ce21">
            <text:p><text:s/>(DD/MM/YY)</text:p>
          </table:table-cell>
          <table:table-cell office:value-type="string" table:style-name="ce22">
            <text:p>(£)</text:p>
          </table:table-cell>
          <table:table-cell office:value-type="string" table:style-name="ce22">
            <text:p>(£)</text:p>
          </table:table-cell>
          <table:table-cell table:style-name="ce3"/>
          <table:table-cell table:number-columns-repeated="16377"/>
        </table:table-row>
        <table:table-row table:style-name="ro4">
          <table:table-cell table:style-name="ce2"/>
          <table:table-cell office:value-type="float" office:value="1" table:style-name="ce23">
            <text:p>1</text:p>
          </table:table-cell>
          <table:table-cell table:style-name="ce24"/>
          <table:table-cell office:value-type="date" office:date-value="2025-01-01T00:00:00" table:style-name="ce25">
            <text:p>01/01/25</text:p>
          </table:table-cell>
          <table:table-cell office:value-type="float" office:value="1234" table:style-name="ce26">
            <text:p>1,234.00</text:p>
          </table:table-cell>
          <table:table-cell office:value-type="float" office:value="56" table:style-name="ce26">
            <text:p>56.00</text:p>
          </table:table-cell>
          <table:table-cell table:number-columns-repeated="1017" table:style-name="ce2"/>
          <table:table-cell table:number-columns-repeated="15361"/>
        </table:table-row>
        <table:table-row table:style-name="ro4">
          <table:table-cell table:style-name="ce2"/>
          <table:table-cell office:value-type="float" office:value="2" table:style-name="ce23">
            <text:p>2</text:p>
          </table:table-cell>
          <table:table-cell office:value-type="string" table:style-name="ce24">
            <text:p>missing date<text:s/></text:p>
          </table:table-cell>
          <table:table-cell table:style-name="ce25"/>
          <table:table-cell office:value-type="float" office:value="1234" table:style-name="ce26">
            <text:p>1,234.00</text:p>
          </table:table-cell>
          <table:table-cell office:value-type="float" office:value="56" table:style-name="ce26">
            <text:p>56.00</text:p>
          </table:table-cell>
          <table:table-cell table:number-columns-repeated="1017" table:style-name="ce2"/>
          <table:table-cell table:number-columns-repeated="15361"/>
        </table:table-row>
        <table:table-row table:style-name="ro4">
          <table:table-cell table:style-name="ce2"/>
          <table:table-cell office:value-type="float" office:value="3" table:style-name="ce23">
            <text:p>3</text:p>
          </table:table-cell>
          <table:table-cell office:value-type="string" table:style-name="ce24">
            <text:p>missing gross</text:p>
          </table:table-cell>
          <table:table-cell office:value-type="date" office:date-value="2025-01-03T00:00:00" table:style-name="ce25">
            <text:p>03/01/25</text:p>
          </table:table-cell>
          <table:table-cell table:style-name="ce26"/>
          <table:table-cell office:value-type="float" office:value="56" table:style-name="ce26">
            <text:p>56.00</text:p>
          </table:table-cell>
          <table:table-cell table:number-columns-repeated="1017" table:style-name="ce2"/>
          <table:table-cell table:number-columns-repeated="15361"/>
        </table:table-row>
        <table:table-row table:style-name="ro4">
          <table:table-cell table:style-name="ce2"/>
          <table:table-cell office:value-type="float" office:value="4" table:style-name="ce23">
            <text:p>4</text:p>
          </table:table-cell>
          <table:table-cell office:value-type="string" table:style-name="ce24">
            <text:p>missing deducted<text:s/></text:p>
          </table:table-cell>
          <table:table-cell office:value-type="date" office:date-value="2025-01-04T00:00:00" table:style-name="ce25">
            <text:p>04/01/25</text:p>
          </table:table-cell>
          <table:table-cell office:value-type="float" office:value="1234" table:style-name="ce26">
            <text:p>1,234.00</text:p>
          </table:table-cell>
          <table:table-cell table:style-name="ce26"/>
          <table:table-cell table:number-columns-repeated="1017" table:style-name="ce2"/>
          <table:table-cell table:number-columns-repeated="15361"/>
        </table:table-row>
        <table:table-row table:style-name="ro4">
          <table:table-cell table:style-name="ce2"/>
          <table:table-cell office:value-type="float" office:value="5" table:style-name="ce23">
            <text:p>5</text:p>
          </table:table-cell>
          <table:table-cell office:value-type="string" table:style-name="ce24">
            <text:p>invalid name aaaaaaaaaaaaaaaaaaaaaaaaaaaaaaaaaaaaaaaaaaaaaaaaaaaaaaaaaaaaaaaaaaaaaaaaaaaaaaaaaaaaaaaaaaaaaaaaaaaaaaaaaaaaaaaaaaaaaaaaaaaaaa</text:p>
          </table:table-cell>
          <table:table-cell office:value-type="date" office:date-value="2025-01-05T00:00:00" table:style-name="ce25">
            <text:p>05/01/25</text:p>
          </table:table-cell>
          <table:table-cell office:value-type="float" office:value="1234" table:style-name="ce26">
            <text:p>1,234.00</text:p>
          </table:table-cell>
          <table:table-cell office:value-type="float" office:value="56" table:style-name="ce26">
            <text:p>56.00</text:p>
          </table:table-cell>
          <table:table-cell table:number-columns-repeated="1017" table:style-name="ce2"/>
          <table:table-cell table:number-columns-repeated="15361"/>
        </table:table-row>
        <table:table-row table:style-name="ro4">
          <table:table-cell table:style-name="ce2"/>
          <table:table-cell office:value-type="float" office:value="6" table:style-name="ce23">
            <text:p>6</text:p>
          </table:table-cell>
          <table:table-cell office:value-type="string" table:style-name="ce24">
            <text:p>invalid date</text:p>
          </table:table-cell>
          <table:table-cell office:value-type="string" table:style-name="ce25">
            <text:p>06/0</text:p>
          </table:table-cell>
          <table:table-cell office:value-type="float" office:value="1234" table:style-name="ce26">
            <text:p>1,234.00</text:p>
          </table:table-cell>
          <table:table-cell office:value-type="float" office:value="56" table:style-name="ce26">
            <text:p>56.00</text:p>
          </table:table-cell>
          <table:table-cell table:number-columns-repeated="1017" table:style-name="ce2"/>
          <table:table-cell table:number-columns-repeated="15361"/>
        </table:table-row>
        <table:table-row table:style-name="ro4">
          <table:table-cell table:style-name="ce2"/>
          <table:table-cell office:value-type="float" office:value="7" table:style-name="ce23">
            <text:p>7</text:p>
          </table:table-cell>
          <table:table-cell office:value-type="string" table:style-name="ce2">
            <text:p>future date<text:s/></text:p>
          </table:table-cell>
          <table:table-cell office:value-type="date" office:date-value="2027-01-05T00:00:00" table:style-name="ce25">
            <text:p>05/01/27</text:p>
          </table:table-cell>
          <table:table-cell office:value-type="float" office:value="1234" table:style-name="ce26">
            <text:p>1,234.00</text:p>
          </table:table-cell>
          <table:table-cell office:value-type="float" office:value="56" table:style-name="ce26">
            <text:p>56.00</text:p>
          </table:table-cell>
          <table:table-cell table:number-columns-repeated="1017" table:style-name="ce2"/>
          <table:table-cell table:number-columns-repeated="15361"/>
        </table:table-row>
        <table:table-row table:style-name="ro4">
          <table:table-cell table:style-name="ce2"/>
          <table:table-cell office:value-type="float" office:value="8" table:style-name="ce23">
            <text:p>8</text:p>
          </table:table-cell>
          <table:table-cell office:value-type="string" table:style-name="ce24">
            <text:p>invalid gross</text:p>
          </table:table-cell>
          <table:table-cell office:value-type="date" office:date-value="2025-01-07T00:00:00" table:style-name="ce25">
            <text:p>07/01/25</text:p>
          </table:table-cell>
          <table:table-cell office:value-type="string" table:style-name="ce26">
            <text:p>test</text:p>
          </table:table-cell>
          <table:table-cell office:value-type="float" office:value="56" table:style-name="ce26">
            <text:p>56.00</text:p>
          </table:table-cell>
          <table:table-cell table:number-columns-repeated="1017" table:style-name="ce2"/>
          <table:table-cell table:number-columns-repeated="15361"/>
        </table:table-row>
        <table:table-row table:style-name="ro4">
          <table:table-cell/>
          <table:table-cell office:value-type="float" office:value="9" table:style-name="ce23">
            <text:p>9</text:p>
          </table:table-cell>
          <table:table-cell office:value-type="string" table:style-name="ce24">
            <text:p>invalid deducted</text:p>
          </table:table-cell>
          <table:table-cell office:value-type="date" office:date-value="2025-01-08T00:00:00" table:style-name="ce25">
            <text:p>08/01/25</text:p>
          </table:table-cell>
          <table:table-cell office:value-type="float" office:value="1234" table:style-name="ce26">
            <text:p>1,234.00</text:p>
          </table:table-cell>
          <table:table-cell office:value-type="string" table:style-name="ce26">
            <text:p>test</text:p>
          </table:table-cell>
          <table:table-cell table:number-columns-repeated="16378"/>
        </table:table-row>
        <table:table-row table:style-name="ro4">
          <table:table-cell/>
          <table:table-cell table:style-name="ce23"/>
          <table:table-cell office:value-type="string" table:style-name="ce24">
            <text:p>gross &lt;= deducted</text:p>
          </table:table-cell>
          <table:table-cell office:value-type="date" office:date-value="2025-01-09T00:00:00" table:style-name="ce25">
            <text:p>09/01/25</text:p>
          </table:table-cell>
          <table:table-cell office:value-type="float" office:value="56" table:style-name="ce26">
            <text:p>56.00</text:p>
          </table:table-cell>
          <table:table-cell office:value-type="float" office:value="56" table:style-name="ce26">
            <text:p>56.00</text:p>
          </table:table-cell>
          <table:table-cell table:number-columns-repeated="16378"/>
        </table:table-row>
        <table:table-row table:style-name="ro4">
          <table:table-cell/>
          <table:table-cell office:value-type="float" office:value="11" table:style-name="ce23">
            <text:p>11</text:p>
          </table:table-cell>
          <table:table-cell office:value-type="string" table:style-name="ce24">
            <text:p>missing item number</text:p>
          </table:table-cell>
          <table:table-cell office:value-type="date" office:date-value="2025-01-01T00:00:00" table:style-name="ce25">
            <text:p>01/01/25</text:p>
          </table:table-cell>
          <table:table-cell office:value-type="float" office:value="1234" table:style-name="ce26">
            <text:p>1,234.00</text:p>
          </table:table-cell>
          <table:table-cell office:value-type="float" office:value="56" table:style-name="ce26">
            <text:p>56.00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23">
            <text:p>012</text:p>
          </table:table-cell>
          <table:table-cell office:value-type="string" table:style-name="ce24">
            <text:p>Invalid item number</text:p>
          </table:table-cell>
          <table:table-cell office:value-type="date" office:date-value="2025-01-01T00:00:00" table:style-name="ce25">
            <text:p>01/01/25</text:p>
          </table:table-cell>
          <table:table-cell office:value-type="float" office:value="1234" table:style-name="ce26">
            <text:p>1,234.00</text:p>
          </table:table-cell>
          <table:table-cell office:value-type="float" office:value="56" table:style-name="ce26">
            <text:p>56.00</text:p>
          </table:table-cell>
          <table:table-cell table:number-columns-repeated="16378"/>
        </table:table-row>
        <table:table-row table:style-name="ro4">
          <table:table-cell/>
          <table:table-cell office:value-type="float" office:value="13" table:style-name="ce23">
            <text:p>13</text:p>
          </table:table-cell>
          <table:table-cell office:value-type="string" table:style-name="ce24">
            <text:p>invalid feb date</text:p>
          </table:table-cell>
          <table:table-cell office:value-type="string" table:style-name="ce25">
            <text:p>30/02/25</text:p>
          </table:table-cell>
          <table:table-cell office:value-type="float" office:value="4500" table:style-name="ce26">
            <text:p>4,500.00</text:p>
          </table:table-cell>
          <table:table-cell office:value-type="float" office:value="80" table:style-name="ce26">
            <text:p>80.00</text:p>
          </table:table-cell>
          <table:table-cell table:number-columns-repeated="16378"/>
        </table:table-row>
        <table:table-row table:style-name="ro4">
          <table:table-cell/>
          <table:table-cell office:value-type="float" office:value="14" table:style-name="ce23">
            <text:p>1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5" table:style-name="ce23">
            <text:p>1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6" table:style-name="ce23">
            <text:p>1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7" table:style-name="ce23">
            <text:p>1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8" table:style-name="ce23">
            <text:p>1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9" table:style-name="ce23">
            <text:p>1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20" table:style-name="ce23">
            <text:p>2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21" table:style-name="ce23">
            <text:p>2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22" table:style-name="ce23">
            <text:p>2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23" table:style-name="ce23">
            <text:p>2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24" table:style-name="ce23">
            <text:p>2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25" table:style-name="ce23">
            <text:p>2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26" table:style-name="ce23">
            <text:p>2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27" table:style-name="ce23">
            <text:p>2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28" table:style-name="ce23">
            <text:p>2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29" table:style-name="ce23">
            <text:p>2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30" table:style-name="ce23">
            <text:p>3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31" table:style-name="ce23">
            <text:p>3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32" table:style-name="ce23">
            <text:p>3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33" table:style-name="ce23">
            <text:p>3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34" table:style-name="ce23">
            <text:p>3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35" table:style-name="ce23">
            <text:p>3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36" table:style-name="ce23">
            <text:p>3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37" table:style-name="ce23">
            <text:p>3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38" table:style-name="ce23">
            <text:p>3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39" table:style-name="ce23">
            <text:p>3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40" table:style-name="ce23">
            <text:p>4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41" table:style-name="ce23">
            <text:p>4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42" table:style-name="ce23">
            <text:p>4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43" table:style-name="ce23">
            <text:p>4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44" table:style-name="ce23">
            <text:p>4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45" table:style-name="ce23">
            <text:p>4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46" table:style-name="ce23">
            <text:p>4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47" table:style-name="ce23">
            <text:p>4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48" table:style-name="ce23">
            <text:p>4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49" table:style-name="ce23">
            <text:p>4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50" table:style-name="ce23">
            <text:p>5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51" table:style-name="ce23">
            <text:p>5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52" table:style-name="ce23">
            <text:p>5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53" table:style-name="ce23">
            <text:p>5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54" table:style-name="ce23">
            <text:p>5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55" table:style-name="ce23">
            <text:p>5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56" table:style-name="ce23">
            <text:p>5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57" table:style-name="ce23">
            <text:p>5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58" table:style-name="ce23">
            <text:p>5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59" table:style-name="ce23">
            <text:p>5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60" table:style-name="ce23">
            <text:p>6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61" table:style-name="ce23">
            <text:p>6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62" table:style-name="ce23">
            <text:p>6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63" table:style-name="ce23">
            <text:p>6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64" table:style-name="ce23">
            <text:p>6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65" table:style-name="ce23">
            <text:p>6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66" table:style-name="ce23">
            <text:p>6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67" table:style-name="ce23">
            <text:p>6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68" table:style-name="ce23">
            <text:p>6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69" table:style-name="ce23">
            <text:p>6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70" table:style-name="ce23">
            <text:p>7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71" table:style-name="ce23">
            <text:p>7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72" table:style-name="ce23">
            <text:p>7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73" table:style-name="ce23">
            <text:p>7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74" table:style-name="ce23">
            <text:p>7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75" table:style-name="ce23">
            <text:p>7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76" table:style-name="ce23">
            <text:p>7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77" table:style-name="ce23">
            <text:p>7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78" table:style-name="ce23">
            <text:p>7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79" table:style-name="ce23">
            <text:p>7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80" table:style-name="ce23">
            <text:p>8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81" table:style-name="ce23">
            <text:p>8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82" table:style-name="ce23">
            <text:p>8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83" table:style-name="ce23">
            <text:p>8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84" table:style-name="ce23">
            <text:p>8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85" table:style-name="ce23">
            <text:p>8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86" table:style-name="ce23">
            <text:p>8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87" table:style-name="ce23">
            <text:p>8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88" table:style-name="ce23">
            <text:p>8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89" table:style-name="ce23">
            <text:p>8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90" table:style-name="ce23">
            <text:p>9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91" table:style-name="ce23">
            <text:p>9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92" table:style-name="ce23">
            <text:p>9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93" table:style-name="ce23">
            <text:p>9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94" table:style-name="ce23">
            <text:p>9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95" table:style-name="ce23">
            <text:p>9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96" table:style-name="ce23">
            <text:p>9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97" table:style-name="ce23">
            <text:p>9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98" table:style-name="ce23">
            <text:p>9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99" table:style-name="ce23">
            <text:p>9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00" table:style-name="ce23">
            <text:p>10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01" table:style-name="ce23">
            <text:p>10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02" table:style-name="ce23">
            <text:p>10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03" table:style-name="ce23">
            <text:p>10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04" table:style-name="ce23">
            <text:p>10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05" table:style-name="ce23">
            <text:p>10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06" table:style-name="ce23">
            <text:p>10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07" table:style-name="ce23">
            <text:p>10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08" table:style-name="ce23">
            <text:p>10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09" table:style-name="ce23">
            <text:p>10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10" table:style-name="ce23">
            <text:p>11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11" table:style-name="ce23">
            <text:p>11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12" table:style-name="ce23">
            <text:p>11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13" table:style-name="ce23">
            <text:p>11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14" table:style-name="ce23">
            <text:p>11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15" table:style-name="ce23">
            <text:p>11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16" table:style-name="ce23">
            <text:p>11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17" table:style-name="ce23">
            <text:p>11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18" table:style-name="ce23">
            <text:p>11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19" table:style-name="ce23">
            <text:p>11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20" table:style-name="ce23">
            <text:p>12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21" table:style-name="ce23">
            <text:p>12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22" table:style-name="ce23">
            <text:p>12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23" table:style-name="ce23">
            <text:p>12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24" table:style-name="ce23">
            <text:p>12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25" table:style-name="ce23">
            <text:p>12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26" table:style-name="ce23">
            <text:p>12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27" table:style-name="ce23">
            <text:p>12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28" table:style-name="ce23">
            <text:p>12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29" table:style-name="ce23">
            <text:p>12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30" table:style-name="ce23">
            <text:p>13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31" table:style-name="ce23">
            <text:p>13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32" table:style-name="ce23">
            <text:p>13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33" table:style-name="ce23">
            <text:p>13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34" table:style-name="ce23">
            <text:p>13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35" table:style-name="ce23">
            <text:p>13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36" table:style-name="ce23">
            <text:p>13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37" table:style-name="ce23">
            <text:p>13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38" table:style-name="ce23">
            <text:p>13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39" table:style-name="ce23">
            <text:p>13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40" table:style-name="ce23">
            <text:p>14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41" table:style-name="ce23">
            <text:p>14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42" table:style-name="ce23">
            <text:p>14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43" table:style-name="ce23">
            <text:p>14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44" table:style-name="ce23">
            <text:p>14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45" table:style-name="ce23">
            <text:p>14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46" table:style-name="ce23">
            <text:p>14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47" table:style-name="ce23">
            <text:p>14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48" table:style-name="ce23">
            <text:p>14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49" table:style-name="ce23">
            <text:p>14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50" table:style-name="ce23">
            <text:p>15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51" table:style-name="ce23">
            <text:p>15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52" table:style-name="ce23">
            <text:p>15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53" table:style-name="ce23">
            <text:p>15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54" table:style-name="ce23">
            <text:p>15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55" table:style-name="ce23">
            <text:p>15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56" table:style-name="ce23">
            <text:p>15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57" table:style-name="ce23">
            <text:p>15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58" table:style-name="ce23">
            <text:p>15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59" table:style-name="ce23">
            <text:p>15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60" table:style-name="ce23">
            <text:p>16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61" table:style-name="ce23">
            <text:p>16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62" table:style-name="ce23">
            <text:p>16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63" table:style-name="ce23">
            <text:p>16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64" table:style-name="ce23">
            <text:p>16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65" table:style-name="ce23">
            <text:p>16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66" table:style-name="ce23">
            <text:p>16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67" table:style-name="ce23">
            <text:p>16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68" table:style-name="ce23">
            <text:p>16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69" table:style-name="ce23">
            <text:p>16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70" table:style-name="ce23">
            <text:p>17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71" table:style-name="ce23">
            <text:p>17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72" table:style-name="ce23">
            <text:p>17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73" table:style-name="ce23">
            <text:p>17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74" table:style-name="ce23">
            <text:p>17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75" table:style-name="ce23">
            <text:p>17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76" table:style-name="ce23">
            <text:p>17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77" table:style-name="ce23">
            <text:p>17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78" table:style-name="ce23">
            <text:p>17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79" table:style-name="ce23">
            <text:p>17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80" table:style-name="ce23">
            <text:p>18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81" table:style-name="ce23">
            <text:p>18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82" table:style-name="ce23">
            <text:p>18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83" table:style-name="ce23">
            <text:p>18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84" table:style-name="ce23">
            <text:p>18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85" table:style-name="ce23">
            <text:p>18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86" table:style-name="ce23">
            <text:p>18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87" table:style-name="ce23">
            <text:p>18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88" table:style-name="ce23">
            <text:p>18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89" table:style-name="ce23">
            <text:p>18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90" table:style-name="ce23">
            <text:p>19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91" table:style-name="ce23">
            <text:p>19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92" table:style-name="ce23">
            <text:p>19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93" table:style-name="ce23">
            <text:p>19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94" table:style-name="ce23">
            <text:p>19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95" table:style-name="ce23">
            <text:p>19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96" table:style-name="ce23">
            <text:p>19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97" table:style-name="ce23">
            <text:p>19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98" table:style-name="ce23">
            <text:p>19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199" table:style-name="ce23">
            <text:p>19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4">
          <table:table-cell/>
          <table:table-cell office:value-type="float" office:value="200" table:style-name="ce23">
            <text:p>20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number-rows-repeated="492" table:style-name="ro3">
          <table:table-cell table:number-columns-repeated="16384"/>
        </table:table-row>
        <table:table-row table:number-rows-repeated="4" table:style-name="ro3">
          <table:table-cell/>
          <table:table-cell table:number-columns-repeated="2" table:style-name="ce4"/>
          <table:table-cell table:style-name="ce5"/>
          <table:table-cell table:number-columns-repeated="16380"/>
        </table:table-row>
        <table:table-row table:number-rows-repeated="2" table:style-name="ro3">
          <table:table-cell/>
          <table:table-cell table:number-columns-repeated="2" table:style-name="ce4"/>
          <table:table-cell table:style-name="ce5"/>
          <table:table-cell table:number-columns-repeated="1019" table:style-name="ce2"/>
          <table:table-cell table:number-columns-repeated="15361"/>
        </table:table-row>
        <table:table-row table:number-rows-repeated="64482" table:style-name="ro3">
          <table:table-cell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6378"/>
        </table:table-row>
        <table:table-row table:number-rows-repeated="98337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date-style style:name="N38P0">
      <number:day number:style="long"/>
      <number:text>/</number:text>
      <number:month number:style="long"/>
      <number:text>/</number:text>
      <number:year/>
    </number:date-style>
    <number:text-style style:name="N38">
      <number:text-content/>
      <style:map style:condition="value()&gt;=0" style:apply-style-name="N38P0"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="5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dc:title>Other Income Schedule</dc:title>
    <meta:initial-creator>HMRC</meta:initial-creator>
    <dc:creator>Singh, Suryabala</dc:creator>
    <meta:creation-date>2012-05-23T12:38:37Z</meta:creation-date>
    <dc:date>2026-02-12T11:23:50Z</dc:date>
    <meta:editing-cycles>46</meta:editing-cycles>
    <meta:editing-duration>PT110608S</meta:editing-duration>
  </office:meta>
</office:document-meta>
</file>