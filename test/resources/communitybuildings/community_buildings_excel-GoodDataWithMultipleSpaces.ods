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0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45pt" style:use-optimal-row-height="tru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8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9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21]&lt;=2016;[.G21]&gt;5000))" style:apply-style-name="cf1" style:base-cell-address="R68CB_V1_00_0_EN.G21"/>
      <style:map style:condition="of:cell-content()&gt;8000" style:apply-style-name="cf1"/>
    </style:style>
    <style:style style:name="ce50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21]&lt;=2016;[.I21]&gt;5000))" style:apply-style-name="cf1" style:base-cell-address="R68CB_V1_00_0_EN.I21"/>
      <style:map style:condition="of:cell-content()&gt;8000" style:apply-style-name="cf1"/>
    </style:style>
    <style:style style:name="ce5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22]&lt;=2016;[.G22]&gt;5000))" style:apply-style-name="cf1" style:base-cell-address="R68CB_V1_00_0_EN.G22"/>
      <style:map style:condition="of:cell-content()&gt;8000" style:apply-style-name="cf1"/>
    </style:style>
    <style:style style:name="ce5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22]&lt;=2016;[.I22]&gt;5000))" style:apply-style-name="cf1" style:base-cell-address="R68CB_V1_00_0_EN.I22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11500" table:formula="of:=SUM([.G18:.G517];[.I18:.I517])" table:style-name="ce21">
            <text:p>£1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 <text:s text:c="5"/>Vault</text:p>
          </table:table-cell>
          <table:table-cell office:value-type="string" table:style-name="ce30">
            <text:p>22 <text:s text:c="5"/>Liberty <text:s text:c="4"/>Place</text:p>
          </table:table-cell>
          <table:table-cell office:value-type="string" table:style-name="ce30">
            <text:p>L20 3UD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45">
            <text:p>1,500.00</text:p>
          </table:table-cell>
          <table:table-cell office:value-type="float" office:value="2025" table:style-name="ce31">
            <text:p>2025</text:p>
          </table:table-cell>
          <table:table-cell office:value-type="float" office:value="2500" table:style-name="ce47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he <text:s text:c="6"/>Vault</text:p>
          </table:table-cell>
          <table:table-cell office:value-type="string" table:style-name="ce30">
            <text:p>22 <text:s text:c="4"/>Liberty <text:s text:c="5"/>Place</text:p>
          </table:table-cell>
          <table:table-cell office:value-type="string" table:style-name="ce30">
            <text:p>L20 3UD</text:p>
          </table:table-cell>
          <table:table-cell office:value-type="float" office:value="2026" table:style-name="ce31">
            <text:p>2026</text:p>
          </table:table-cell>
          <table:table-cell office:value-type="float" office:value="2000" table:style-name="ce46">
            <text:p>2,000.00</text:p>
          </table:table-cell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Bootle <text:s text:c="4"/>Village <text:s text:c="5"/>Hall</text:p>
          </table:table-cell>
          <table:table-cell office:value-type="string" table:style-name="ce30">
            <text:p>11A <text:s text:c="5"/>Grange <text:s text:c="5"/>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46">
            <text:p>1,750.00</text:p>
          </table:table-cell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4" table:style-name="ce29">
            <text:p>4</text:p>
          </table:table-cell>
          <table:table-cell office:value-type="string" table:style-name="ce30">
            <text:p>Test <text:s text:c="7"/>Building <text:s text:c="7"/>Name</text:p>
          </table:table-cell>
          <table:table-cell office:value-type="string" table:style-name="ce44">
            <text:p><text:s text:c="2"/>39</text:p>
            <text:p><text:s text:c="4"/>Kingsbury.</text:p>
            <text:p>Street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2000" table:style-name="ce49">
            <text:p>2,000.00</text:p>
          </table:table-cell>
          <table:table-cell table:style-name="ce31"/>
          <table:table-cell table:style-name="ce50"/>
          <table:table-cell table:number-columns-repeated="1015" table:style-name="ce2"/>
          <table:table-cell table:number-columns-repeated="15360" table:style-name="ce3"/>
        </table:table-row>
        <table:table-row table:style-name="ro17">
          <table:table-cell table:style-name="ce2"/>
          <table:table-cell office:value-type="float" office:value="5" table:style-name="ce29">
            <text:p>5</text:p>
          </table:table-cell>
          <table:table-cell office:value-type="string" table:style-name="ce44">
            <text:p>Bootle Village</text:p>
            <text:p/>
            <text:p>Hall</text:p>
          </table:table-cell>
          <table:table-cell office:value-type="string" table:style-name="ce30">
            <text:p>Address: <text:s text:c="11"/>'11A Grange Road'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51">
            <text:p>1,750.00</text:p>
          </table:table-cell>
          <table:table-cell table:style-name="ce31"/>
          <table:table-cell table:style-name="ce52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6"/>
          <table:table-cell table:style-name="ce31"/>
          <table:table-cell table:style-name="ce48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8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8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>Gift Aid Small Donations Scheme (GASDS) Community Buildings</dc:title>
    <meta:initial-creator>HMRC</meta:initial-creator>
    <dc:creator>sandip.khedekar@digital.hmrc.gov.uk</dc:creator>
    <meta:creation-date>2015-02-11T07:56:00Z</meta:creation-date>
    <dc:date>2026-06-22T10:56:06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