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style:cell-protect="protected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0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Hyperlink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3972222222222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9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39]&lt;=2016;[.G39]&gt;5000))" style:apply-style-name="cf1" style:base-cell-address="R68CB_V1_00_0_EN.G39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39]&lt;=2016;[.I39]&gt;5000))" style:apply-style-name="cf1" style:base-cell-address="R68CB_V1_00_0_EN.I39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8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35]&lt;=2016;[.I35]&gt;5000))" style:apply-style-name="cf1" style:base-cell-address="R68CB_V1_00_0_EN.I35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33"/>
        <table:table-row table:style-name="ro1">
          <table:table-cell table:style-name="ce1"/>
          <table:table-cell office:value-type="string" table:number-columns-spanned="8" table:number-rows-spanned="1" table:style-name="ce34">
            <text:p>Gift Aid Small Donations Scheme (GASDS) community buildings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2">
          <table:table-cell table:style-name="ce3"/>
          <table:table-cell office:value-type="string" table:number-columns-spanned="8" table:number-rows-spanned="1" table:style-name="ce35">
            <text:p>Get it right first time - how to complete this schedule:</text:p>
          </table:table-cell>
          <table:covered-table-cell table:number-columns-repeated="7"/>
          <table:table-cell table:number-columns-repeated="16375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36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1"/>
          <table:table-cell table:number-columns-repeated="15360" table:style-name="ce2"/>
        </table:table-row>
        <table:table-row table:style-name="ro4">
          <table:table-cell table:style-name="ce1"/>
          <table:table-cell table:number-columns-spanned="8" table:number-rows-spanned="1" table:style-name="ce37"/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5">
          <table:table-cell table:style-name="ce4"/>
          <table:table-cell office:value-type="string" table:number-columns-spanned="8" table:number-rows-spanned="1" table:style-name="ce38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4"/>
          <table:table-cell table:number-columns-repeated="15360" table:style-name="ce5"/>
        </table:table-row>
        <table:table-row table:style-name="ro6">
          <table:table-cell table:style-name="ce3"/>
          <table:table-cell office:value-type="string" table:number-columns-spanned="2" table:number-rows-spanned="1" table:style-name="ce39">
            <text:p><text:a xlink:href="http://www.hmrc.gov.uk/charitiesonline">Charities Online guidance</text:a></text:p>
          </table:table-cell>
          <table:covered-table-cell/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7">
          <table:table-cell table:style-name="ce1"/>
          <table:table-cell office:value-type="string" table:style-name="ce9">
            <text:p>Fig.1</text:p>
            <text:p>Examples</text:p>
          </table:table-cell>
          <table:table-cell office:value-type="string" table:style-name="ce10">
            <text:p>Building name<text:s/></text:p>
            <text:p><text:span text:style-name="T3">(up to 160 characters)</text:span></text:p>
          </table:table-cell>
          <table:table-cell office:value-type="string" table:style-name="ce10">
            <text:p>First line of address</text:p>
            <text:p><text:span text:style-name="T3">(up to 40 characters)</text:span></text:p>
          </table:table-cell>
          <table:table-cell office:value-type="string" table:style-name="ce10">
            <text:p>Postcode</text:p>
            <text:p><text:span text:style-name="T3"><text:s/>UPPER CASE and include a space</text:span></text:p>
          </table:table-cell>
          <table:table-cell office:value-type="string" table:style-name="ce10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0">
            <text:p>Amount of donations received in tax year 1</text:p>
            <text:p>(£)</text:p>
            <text:p><text:span text:style-name="T3">(include tax year 3 claims in this column)</text:span></text:p>
            <text:p/>
          </table:table-cell>
          <table:table-cell office:value-type="string" table:style-name="ce10">
            <text:p>Tax year 2 ending 5 April</text:p>
          </table:table-cell>
          <table:table-cell office:value-type="string" table:style-name="ce10">
            <text:p>Amount of donations received in tax year 2</text:p>
            <text:p>(£)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2">
            <text:p>The Vault</text:p>
          </table:table-cell>
          <table:table-cell office:value-type="string" table:style-name="ce13">
            <text:p>22 Liberty Place</text:p>
          </table:table-cell>
          <table:table-cell office:value-type="string" table:style-name="ce12">
            <text:p>L20 3UD</text:p>
          </table:table-cell>
          <table:table-cell office:value-type="string" table:style-name="ce12">
            <text:p>2014</text:p>
          </table:table-cell>
          <table:table-cell office:value-type="float" office:value="1500" table:style-name="ce14">
            <text:p>1500.00</text:p>
          </table:table-cell>
          <table:table-cell office:value-type="string" table:style-name="ce15">
            <text:p>2015</text:p>
          </table:table-cell>
          <table:table-cell office:value-type="float" office:value="2500" table:style-name="ce14">
            <text:p>250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6">
            <text:p>The Vault</text:p>
          </table:table-cell>
          <table:table-cell office:value-type="string" table:style-name="ce16">
            <text:p>22 Liberty Place</text:p>
          </table:table-cell>
          <table:table-cell office:value-type="string" table:style-name="ce16">
            <text:p>L20 3UD</text:p>
          </table:table-cell>
          <table:table-cell office:value-type="string" table:style-name="ce16">
            <text:p>2016</text:p>
          </table:table-cell>
          <table:table-cell office:value-type="float" office:value="2000" table:style-name="ce17">
            <text:p>2000.00</text:p>
          </table:table-cell>
          <table:table-cell table:number-columns-repeated="2" table:style-name="ce16"/>
          <table:table-cell table:number-columns-repeated="1015" table:style-name="ce1"/>
          <table:table-cell table:number-columns-repeated="15360" table:style-name="ce2"/>
        </table:table-row>
        <table:table-row table:style-name="ro9">
          <table:table-cell table:style-name="ce1"/>
          <table:table-cell table:style-name="ce11"/>
          <table:table-cell office:value-type="string" table:style-name="ce12">
            <text:p>Bootle Village Hall</text:p>
          </table:table-cell>
          <table:table-cell office:value-type="string" table:style-name="ce13">
            <text:p>11A Grange Road</text:p>
          </table:table-cell>
          <table:table-cell office:value-type="string" table:style-name="ce12">
            <text:p>L20 1KL</text:p>
          </table:table-cell>
          <table:table-cell office:value-type="string" table:style-name="ce12">
            <text:p>2015</text:p>
          </table:table-cell>
          <table:table-cell office:value-type="float" office:value="1750" table:style-name="ce14">
            <text:p>1750.00</text:p>
          </table:table-cell>
          <table:table-cell table:style-name="ce15"/>
          <table:table-cell table:style-name="ce18"/>
          <table:table-cell table:number-columns-repeated="1015" table:style-name="ce1"/>
          <table:table-cell table:number-columns-repeated="15360" table:style-name="ce2"/>
        </table:table-row>
        <table:table-row table:style-name="ro10">
          <table:table-cell table:number-columns-repeated="1024" table:style-name="ce1"/>
          <table:table-cell table:number-columns-repeated="15360" table:style-name="ce2"/>
        </table:table-row>
        <table:table-row table:style-name="ro11">
          <table:table-cell table:style-name="ce1"/>
          <table:table-cell office:value-type="string" table:number-columns-spanned="8" table:number-rows-spanned="1" table:style-name="ce40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2">
          <table:table-cell table:style-name="ce1"/>
          <table:table-cell table:style-name="ce19"/>
          <table:table-cell table:number-columns-repeated="3" table:style-name="ce6"/>
          <table:table-cell office:value-type="string" table:number-columns-spanned="3" table:number-rows-spanned="1" table:style-name="ce41">
            <text:p>Total of all amounts:</text:p>
          </table:table-cell>
          <table:covered-table-cell table:number-columns-repeated="2"/>
          <table:table-cell office:value-type="currency" office:value="0" table:formula="of:=SUM([.G18:.G517];[.I18:.I517])" table:style-name="ce20">
            <text:p>£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13">
          <table:table-cell table:style-name="ce1"/>
          <table:table-cell office:value-type="string" table:number-columns-spanned="8" table:number-rows-spanned="1" table:style-name="ce42">
            <text:p>Community buildings table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4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15">
          <table:table-cell table:style-name="ce3"/>
          <table:table-cell office:value-type="string" table:style-name="ce21">
            <text:p>Item</text:p>
          </table:table-cell>
          <table:table-cell office:value-type="string" table:style-name="ce21">
            <text:p>Building name</text:p>
          </table:table-cell>
          <table:table-cell office:value-type="string" table:style-name="ce21">
            <text:p>First line of address</text:p>
          </table:table-cell>
          <table:table-cell office:value-type="string" table:style-name="ce21">
            <text:p>Postcode</text:p>
          </table:table-cell>
          <table:table-cell office:value-type="string" table:style-name="ce22">
            <text:p>Tax year 1 ending 5 April</text:p>
          </table:table-cell>
          <table:table-cell office:value-type="string" table:style-name="ce23">
            <text:p>Amount of donations received in tax year 1</text:p>
          </table:table-cell>
          <table:table-cell office:value-type="string" table:style-name="ce22">
            <text:p>Tax year 2 ending 5 April</text:p>
          </table:table-cell>
          <table:table-cell office:value-type="string" table:style-name="ce23">
            <text:p>Amount of donations received in tax year 2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3"/>
          <table:table-cell table:number-columns-repeated="3" table:style-name="ce24"/>
          <table:table-cell table:style-name="ce25"/>
          <table:table-cell table:style-name="ce26"/>
          <table:table-cell office:value-type="string" table:style-name="ce27">
            <text:p><text:s/>(£)</text:p>
          </table:table-cell>
          <table:table-cell table:style-name="ce26"/>
          <table:table-cell office:value-type="string" table:style-name="ce27">
            <text:p><text:s/>(£)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" table:style-name="ce28">
            <text:p>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" table:style-name="ce28">
            <text:p>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" table:style-name="ce28">
            <text:p>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" table:style-name="ce28">
            <text:p>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" table:style-name="ce28">
            <text:p>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" table:style-name="ce28">
            <text:p>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" table:style-name="ce28">
            <text:p>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" table:style-name="ce28">
            <text:p>8</text:p>
          </table:table-cell>
          <table:table-cell table:style-name="ce43"/>
          <table:table-cell table:number-columns-repeated="2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" table:style-name="ce28">
            <text:p>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" table:style-name="ce28">
            <text:p>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" table:style-name="ce28">
            <text:p>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" table:style-name="ce28">
            <text:p>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" table:style-name="ce28">
            <text:p>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" table:style-name="ce28">
            <text:p>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" table:style-name="ce28">
            <text:p>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" table:style-name="ce28">
            <text:p>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" table:style-name="ce28">
            <text:p>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" table:style-name="ce28">
            <text:p>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8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" table:style-name="ce28">
            <text:p>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" table:style-name="ce28">
            <text:p>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" table:style-name="ce28">
            <text:p>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7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" table:style-name="ce28">
            <text:p>2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" table:style-name="ce28">
            <text:p>2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" table:style-name="ce28">
            <text:p>2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" table:style-name="ce28">
            <text:p>2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" table:style-name="ce28">
            <text:p>2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" table:style-name="ce28">
            <text:p>2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" table:style-name="ce28">
            <text:p>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" table:style-name="ce28">
            <text:p>2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" table:style-name="ce28">
            <text:p>3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" table:style-name="ce28">
            <text:p>3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" table:style-name="ce28">
            <text:p>3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" table:style-name="ce28">
            <text:p>3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" table:style-name="ce28">
            <text:p>3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" table:style-name="ce28">
            <text:p>3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" table:style-name="ce28">
            <text:p>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" table:style-name="ce28">
            <text:p>3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" table:style-name="ce28">
            <text:p>3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" table:style-name="ce28">
            <text:p>3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" table:style-name="ce28">
            <text:p>4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" table:style-name="ce28">
            <text:p>4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" table:style-name="ce28">
            <text:p>4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" table:style-name="ce28">
            <text:p>4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" table:style-name="ce28">
            <text:p>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" table:style-name="ce28">
            <text:p>4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" table:style-name="ce28">
            <text:p>4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" table:style-name="ce28">
            <text:p>4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" table:style-name="ce28">
            <text:p>4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" table:style-name="ce28">
            <text:p>4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" table:style-name="ce28">
            <text:p>5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1" table:style-name="ce28">
            <text:p>5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2" table:style-name="ce28">
            <text:p>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3" table:style-name="ce28">
            <text:p>5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4" table:style-name="ce28">
            <text:p>5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5" table:style-name="ce28">
            <text:p>5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6" table:style-name="ce28">
            <text:p>5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7" table:style-name="ce28">
            <text:p>5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8" table:style-name="ce28">
            <text:p>5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9" table:style-name="ce28">
            <text:p>5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0" table:style-name="ce28">
            <text:p>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1" table:style-name="ce28">
            <text:p>6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2" table:style-name="ce28">
            <text:p>6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3" table:style-name="ce28">
            <text:p>6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4" table:style-name="ce28">
            <text:p>6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5" table:style-name="ce28">
            <text:p>6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6" table:style-name="ce28">
            <text:p>6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7" table:style-name="ce28">
            <text:p>6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8" table:style-name="ce28">
            <text:p>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9" table:style-name="ce28">
            <text:p>6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0" table:style-name="ce28">
            <text:p>7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1" table:style-name="ce28">
            <text:p>7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2" table:style-name="ce28">
            <text:p>7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3" table:style-name="ce28">
            <text:p>7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4" table:style-name="ce28">
            <text:p>7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5" table:style-name="ce28">
            <text:p>7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6" table:style-name="ce28">
            <text:p>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7" table:style-name="ce28">
            <text:p>7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8" table:style-name="ce28">
            <text:p>7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9" table:style-name="ce28">
            <text:p>7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0" table:style-name="ce28">
            <text:p>8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1" table:style-name="ce28">
            <text:p>8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2" table:style-name="ce28">
            <text:p>8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3" table:style-name="ce28">
            <text:p>8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4" table:style-name="ce28">
            <text:p>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5" table:style-name="ce28">
            <text:p>8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6" table:style-name="ce28">
            <text:p>8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7" table:style-name="ce28">
            <text:p>8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8" table:style-name="ce28">
            <text:p>8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9" table:style-name="ce28">
            <text:p>8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0" table:style-name="ce28">
            <text:p>9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1" table:style-name="ce28">
            <text:p>9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2" table:style-name="ce28">
            <text:p>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3" table:style-name="ce28">
            <text:p>9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4" table:style-name="ce28">
            <text:p>9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5" table:style-name="ce28">
            <text:p>9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6" table:style-name="ce28">
            <text:p>9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7" table:style-name="ce28">
            <text:p>9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8" table:style-name="ce28">
            <text:p>9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9" table:style-name="ce28">
            <text:p>9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0" table:style-name="ce28">
            <text:p>1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1" table:style-name="ce28">
            <text:p>10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2" table:style-name="ce28">
            <text:p>10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3" table:style-name="ce28">
            <text:p>10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4" table:style-name="ce28">
            <text:p>10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5" table:style-name="ce28">
            <text:p>10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6" table:style-name="ce28">
            <text:p>10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7" table:style-name="ce28">
            <text:p>10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8" table:style-name="ce28">
            <text:p>1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9" table:style-name="ce28">
            <text:p>10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0" table:style-name="ce28">
            <text:p>11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1" table:style-name="ce28">
            <text:p>11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2" table:style-name="ce28">
            <text:p>11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3" table:style-name="ce28">
            <text:p>11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4" table:style-name="ce28">
            <text:p>11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5" table:style-name="ce28">
            <text:p>11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6" table:style-name="ce28">
            <text:p>1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7" table:style-name="ce28">
            <text:p>11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8" table:style-name="ce28">
            <text:p>11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9" table:style-name="ce28">
            <text:p>11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0" table:style-name="ce28">
            <text:p>12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1" table:style-name="ce28">
            <text:p>12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2" table:style-name="ce28">
            <text:p>12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3" table:style-name="ce28">
            <text:p>12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4" table:style-name="ce28">
            <text:p>12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5" table:style-name="ce28">
            <text:p>12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6" table:style-name="ce28">
            <text:p>12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7" table:style-name="ce28">
            <text:p>12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8" table:style-name="ce28">
            <text:p>12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9" table:style-name="ce28">
            <text:p>12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0" table:style-name="ce28">
            <text:p>13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1" table:style-name="ce28">
            <text:p>13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2" table:style-name="ce28">
            <text:p>13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3" table:style-name="ce28">
            <text:p>13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4" table:style-name="ce28">
            <text:p>13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5" table:style-name="ce28">
            <text:p>13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6" table:style-name="ce28">
            <text:p>13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7" table:style-name="ce28">
            <text:p>13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8" table:style-name="ce28">
            <text:p>13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9" table:style-name="ce28">
            <text:p>13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0" table:style-name="ce28">
            <text:p>14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1" table:style-name="ce28">
            <text:p>14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2" table:style-name="ce28">
            <text:p>14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3" table:style-name="ce28">
            <text:p>14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4" table:style-name="ce28">
            <text:p>14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5" table:style-name="ce28">
            <text:p>14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6" table:style-name="ce28">
            <text:p>14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7" table:style-name="ce28">
            <text:p>14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8" table:style-name="ce28">
            <text:p>14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9" table:style-name="ce28">
            <text:p>14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0" table:style-name="ce28">
            <text:p>15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1" table:style-name="ce28">
            <text:p>15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2" table:style-name="ce28">
            <text:p>15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3" table:style-name="ce28">
            <text:p>15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4" table:style-name="ce28">
            <text:p>15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5" table:style-name="ce28">
            <text:p>15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6" table:style-name="ce28">
            <text:p>15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7" table:style-name="ce28">
            <text:p>15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8" table:style-name="ce28">
            <text:p>15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9" table:style-name="ce28">
            <text:p>15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0" table:style-name="ce28">
            <text:p>16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1" table:style-name="ce28">
            <text:p>16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2" table:style-name="ce28">
            <text:p>16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3" table:style-name="ce28">
            <text:p>16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4" table:style-name="ce28">
            <text:p>16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5" table:style-name="ce28">
            <text:p>16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6" table:style-name="ce28">
            <text:p>16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7" table:style-name="ce28">
            <text:p>16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8" table:style-name="ce28">
            <text:p>16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9" table:style-name="ce28">
            <text:p>16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0" table:style-name="ce28">
            <text:p>17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1" table:style-name="ce28">
            <text:p>17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2" table:style-name="ce28">
            <text:p>17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3" table:style-name="ce28">
            <text:p>17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4" table:style-name="ce28">
            <text:p>17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5" table:style-name="ce28">
            <text:p>17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6" table:style-name="ce28">
            <text:p>17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7" table:style-name="ce28">
            <text:p>17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8" table:style-name="ce28">
            <text:p>17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9" table:style-name="ce28">
            <text:p>17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0" table:style-name="ce28">
            <text:p>18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1" table:style-name="ce28">
            <text:p>18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2" table:style-name="ce28">
            <text:p>18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3" table:style-name="ce28">
            <text:p>18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4" table:style-name="ce28">
            <text:p>18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5" table:style-name="ce28">
            <text:p>18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6" table:style-name="ce28">
            <text:p>18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7" table:style-name="ce28">
            <text:p>18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8" table:style-name="ce28">
            <text:p>18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9" table:style-name="ce28">
            <text:p>18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0" table:style-name="ce28">
            <text:p>19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1" table:style-name="ce28">
            <text:p>19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2" table:style-name="ce28">
            <text:p>19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3" table:style-name="ce28">
            <text:p>19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4" table:style-name="ce28">
            <text:p>19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5" table:style-name="ce28">
            <text:p>19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6" table:style-name="ce28">
            <text:p>19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7" table:style-name="ce28">
            <text:p>19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8" table:style-name="ce28">
            <text:p>19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9" table:style-name="ce28">
            <text:p>19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0" table:style-name="ce28">
            <text:p>20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1" table:style-name="ce28">
            <text:p>20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2" table:style-name="ce28">
            <text:p>20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3" table:style-name="ce28">
            <text:p>20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4" table:style-name="ce28">
            <text:p>20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5" table:style-name="ce28">
            <text:p>20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6" table:style-name="ce28">
            <text:p>20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7" table:style-name="ce28">
            <text:p>20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8" table:style-name="ce28">
            <text:p>20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9" table:style-name="ce28">
            <text:p>20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0" table:style-name="ce28">
            <text:p>21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1" table:style-name="ce28">
            <text:p>21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2" table:style-name="ce28">
            <text:p>21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3" table:style-name="ce28">
            <text:p>21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4" table:style-name="ce28">
            <text:p>21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5" table:style-name="ce28">
            <text:p>21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6" table:style-name="ce28">
            <text:p>21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7" table:style-name="ce28">
            <text:p>21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8" table:style-name="ce28">
            <text:p>21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9" table:style-name="ce28">
            <text:p>21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0" table:style-name="ce28">
            <text:p>22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1" table:style-name="ce28">
            <text:p>22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2" table:style-name="ce28">
            <text:p>22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3" table:style-name="ce28">
            <text:p>22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4" table:style-name="ce28">
            <text:p>22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5" table:style-name="ce28">
            <text:p>22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6" table:style-name="ce28">
            <text:p>22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7" table:style-name="ce28">
            <text:p>22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8" table:style-name="ce28">
            <text:p>2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9" table:style-name="ce28">
            <text:p>22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0" table:style-name="ce28">
            <text:p>23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1" table:style-name="ce28">
            <text:p>23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2" table:style-name="ce28">
            <text:p>23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3" table:style-name="ce28">
            <text:p>23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4" table:style-name="ce28">
            <text:p>23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5" table:style-name="ce28">
            <text:p>23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6" table:style-name="ce28">
            <text:p>2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7" table:style-name="ce28">
            <text:p>23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8" table:style-name="ce28">
            <text:p>23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9" table:style-name="ce28">
            <text:p>23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0" table:style-name="ce28">
            <text:p>24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1" table:style-name="ce28">
            <text:p>24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2" table:style-name="ce28">
            <text:p>24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3" table:style-name="ce28">
            <text:p>24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4" table:style-name="ce28">
            <text:p>2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5" table:style-name="ce28">
            <text:p>24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6" table:style-name="ce28">
            <text:p>24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7" table:style-name="ce28">
            <text:p>24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8" table:style-name="ce28">
            <text:p>24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9" table:style-name="ce28">
            <text:p>24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0" table:style-name="ce28">
            <text:p>25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1" table:style-name="ce28">
            <text:p>25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2" table:style-name="ce28">
            <text:p>2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3" table:style-name="ce28">
            <text:p>25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4" table:style-name="ce28">
            <text:p>25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5" table:style-name="ce28">
            <text:p>25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6" table:style-name="ce28">
            <text:p>25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7" table:style-name="ce28">
            <text:p>25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8" table:style-name="ce28">
            <text:p>25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9" table:style-name="ce28">
            <text:p>25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0" table:style-name="ce28">
            <text:p>2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1" table:style-name="ce28">
            <text:p>26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2" table:style-name="ce28">
            <text:p>26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3" table:style-name="ce28">
            <text:p>26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4" table:style-name="ce28">
            <text:p>26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5" table:style-name="ce28">
            <text:p>26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6" table:style-name="ce28">
            <text:p>26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7" table:style-name="ce28">
            <text:p>26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8" table:style-name="ce28">
            <text:p>2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9" table:style-name="ce28">
            <text:p>26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0" table:style-name="ce28">
            <text:p>27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1" table:style-name="ce28">
            <text:p>27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2" table:style-name="ce28">
            <text:p>27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3" table:style-name="ce28">
            <text:p>27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4" table:style-name="ce28">
            <text:p>27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5" table:style-name="ce28">
            <text:p>27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6" table:style-name="ce28">
            <text:p>2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7" table:style-name="ce28">
            <text:p>27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8" table:style-name="ce28">
            <text:p>27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9" table:style-name="ce28">
            <text:p>27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0" table:style-name="ce28">
            <text:p>28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1" table:style-name="ce28">
            <text:p>28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2" table:style-name="ce28">
            <text:p>28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3" table:style-name="ce28">
            <text:p>28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4" table:style-name="ce28">
            <text:p>2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5" table:style-name="ce28">
            <text:p>28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6" table:style-name="ce28">
            <text:p>28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7" table:style-name="ce28">
            <text:p>28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8" table:style-name="ce28">
            <text:p>28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9" table:style-name="ce28">
            <text:p>28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0" table:style-name="ce28">
            <text:p>29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1" table:style-name="ce28">
            <text:p>29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2" table:style-name="ce28">
            <text:p>2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3" table:style-name="ce28">
            <text:p>29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4" table:style-name="ce28">
            <text:p>29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5" table:style-name="ce28">
            <text:p>29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6" table:style-name="ce28">
            <text:p>29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7" table:style-name="ce28">
            <text:p>29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8" table:style-name="ce28">
            <text:p>29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9" table:style-name="ce28">
            <text:p>29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0" table:style-name="ce28">
            <text:p>3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1" table:style-name="ce28">
            <text:p>30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2" table:style-name="ce28">
            <text:p>30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3" table:style-name="ce28">
            <text:p>30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4" table:style-name="ce28">
            <text:p>30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5" table:style-name="ce28">
            <text:p>30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6" table:style-name="ce28">
            <text:p>30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7" table:style-name="ce28">
            <text:p>30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8" table:style-name="ce28">
            <text:p>3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9" table:style-name="ce28">
            <text:p>30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0" table:style-name="ce28">
            <text:p>31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1" table:style-name="ce28">
            <text:p>31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2" table:style-name="ce28">
            <text:p>31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3" table:style-name="ce28">
            <text:p>31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4" table:style-name="ce28">
            <text:p>31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5" table:style-name="ce28">
            <text:p>31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6" table:style-name="ce28">
            <text:p>3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7" table:style-name="ce28">
            <text:p>31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8" table:style-name="ce28">
            <text:p>31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9" table:style-name="ce28">
            <text:p>31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0" table:style-name="ce28">
            <text:p>32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1" table:style-name="ce28">
            <text:p>32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2" table:style-name="ce28">
            <text:p>32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3" table:style-name="ce28">
            <text:p>32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4" table:style-name="ce28">
            <text:p>32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5" table:style-name="ce28">
            <text:p>32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6" table:style-name="ce28">
            <text:p>32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7" table:style-name="ce28">
            <text:p>32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8" table:style-name="ce28">
            <text:p>32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9" table:style-name="ce28">
            <text:p>32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0" table:style-name="ce28">
            <text:p>33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1" table:style-name="ce28">
            <text:p>33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2" table:style-name="ce28">
            <text:p>33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3" table:style-name="ce28">
            <text:p>33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4" table:style-name="ce28">
            <text:p>33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5" table:style-name="ce28">
            <text:p>33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6" table:style-name="ce28">
            <text:p>33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7" table:style-name="ce28">
            <text:p>33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8" table:style-name="ce28">
            <text:p>33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9" table:style-name="ce28">
            <text:p>33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0" table:style-name="ce28">
            <text:p>34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1" table:style-name="ce28">
            <text:p>34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2" table:style-name="ce28">
            <text:p>34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3" table:style-name="ce28">
            <text:p>34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4" table:style-name="ce28">
            <text:p>34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5" table:style-name="ce28">
            <text:p>34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6" table:style-name="ce28">
            <text:p>34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7" table:style-name="ce28">
            <text:p>34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8" table:style-name="ce28">
            <text:p>34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9" table:style-name="ce28">
            <text:p>34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0" table:style-name="ce28">
            <text:p>35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1" table:style-name="ce28">
            <text:p>35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2" table:style-name="ce28">
            <text:p>35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3" table:style-name="ce28">
            <text:p>35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4" table:style-name="ce28">
            <text:p>35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5" table:style-name="ce28">
            <text:p>35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6" table:style-name="ce28">
            <text:p>35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7" table:style-name="ce28">
            <text:p>35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8" table:style-name="ce28">
            <text:p>35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9" table:style-name="ce28">
            <text:p>35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0" table:style-name="ce28">
            <text:p>36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1" table:style-name="ce28">
            <text:p>36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2" table:style-name="ce28">
            <text:p>36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3" table:style-name="ce28">
            <text:p>36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4" table:style-name="ce28">
            <text:p>36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5" table:style-name="ce28">
            <text:p>36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6" table:style-name="ce28">
            <text:p>36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7" table:style-name="ce28">
            <text:p>36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8" table:style-name="ce28">
            <text:p>36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9" table:style-name="ce28">
            <text:p>36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0" table:style-name="ce28">
            <text:p>37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1" table:style-name="ce28">
            <text:p>37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2" table:style-name="ce28">
            <text:p>37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3" table:style-name="ce28">
            <text:p>37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4" table:style-name="ce28">
            <text:p>37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5" table:style-name="ce28">
            <text:p>37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6" table:style-name="ce28">
            <text:p>37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7" table:style-name="ce28">
            <text:p>37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8" table:style-name="ce28">
            <text:p>37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9" table:style-name="ce28">
            <text:p>37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0" table:style-name="ce28">
            <text:p>38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1" table:style-name="ce28">
            <text:p>38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2" table:style-name="ce28">
            <text:p>38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3" table:style-name="ce28">
            <text:p>38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4" table:style-name="ce28">
            <text:p>38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5" table:style-name="ce28">
            <text:p>38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6" table:style-name="ce28">
            <text:p>38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7" table:style-name="ce28">
            <text:p>38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8" table:style-name="ce28">
            <text:p>38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9" table:style-name="ce28">
            <text:p>38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0" table:style-name="ce28">
            <text:p>39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1" table:style-name="ce28">
            <text:p>39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2" table:style-name="ce28">
            <text:p>39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3" table:style-name="ce28">
            <text:p>39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4" table:style-name="ce28">
            <text:p>39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5" table:style-name="ce28">
            <text:p>39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6" table:style-name="ce28">
            <text:p>39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7" table:style-name="ce28">
            <text:p>39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8" table:style-name="ce28">
            <text:p>39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9" table:style-name="ce28">
            <text:p>39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0" table:style-name="ce28">
            <text:p>40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1" table:style-name="ce28">
            <text:p>40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2" table:style-name="ce28">
            <text:p>40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3" table:style-name="ce28">
            <text:p>40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4" table:style-name="ce28">
            <text:p>40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5" table:style-name="ce28">
            <text:p>40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6" table:style-name="ce28">
            <text:p>40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7" table:style-name="ce28">
            <text:p>40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8" table:style-name="ce28">
            <text:p>40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9" table:style-name="ce28">
            <text:p>40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0" table:style-name="ce28">
            <text:p>41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1" table:style-name="ce28">
            <text:p>41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2" table:style-name="ce28">
            <text:p>41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3" table:style-name="ce28">
            <text:p>41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4" table:style-name="ce28">
            <text:p>41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5" table:style-name="ce28">
            <text:p>41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6" table:style-name="ce28">
            <text:p>41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7" table:style-name="ce28">
            <text:p>41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8" table:style-name="ce28">
            <text:p>41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9" table:style-name="ce28">
            <text:p>41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0" table:style-name="ce28">
            <text:p>42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1" table:style-name="ce28">
            <text:p>42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2" table:style-name="ce28">
            <text:p>42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3" table:style-name="ce28">
            <text:p>42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4" table:style-name="ce28">
            <text:p>42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5" table:style-name="ce28">
            <text:p>42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6" table:style-name="ce28">
            <text:p>42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7" table:style-name="ce28">
            <text:p>42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8" table:style-name="ce28">
            <text:p>42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9" table:style-name="ce28">
            <text:p>42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0" table:style-name="ce28">
            <text:p>43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1" table:style-name="ce28">
            <text:p>43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2" table:style-name="ce28">
            <text:p>43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3" table:style-name="ce28">
            <text:p>43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4" table:style-name="ce28">
            <text:p>43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5" table:style-name="ce28">
            <text:p>43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6" table:style-name="ce28">
            <text:p>43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7" table:style-name="ce28">
            <text:p>43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8" table:style-name="ce28">
            <text:p>43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9" table:style-name="ce28">
            <text:p>43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0" table:style-name="ce28">
            <text:p>44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1" table:style-name="ce28">
            <text:p>44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2" table:style-name="ce28">
            <text:p>44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3" table:style-name="ce28">
            <text:p>44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4" table:style-name="ce28">
            <text:p>44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5" table:style-name="ce28">
            <text:p>44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6" table:style-name="ce28">
            <text:p>44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7" table:style-name="ce28">
            <text:p>44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8" table:style-name="ce28">
            <text:p>44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9" table:style-name="ce28">
            <text:p>44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0" table:style-name="ce28">
            <text:p>45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1" table:style-name="ce28">
            <text:p>45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2" table:style-name="ce28">
            <text:p>45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3" table:style-name="ce28">
            <text:p>45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4" table:style-name="ce28">
            <text:p>45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5" table:style-name="ce28">
            <text:p>45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6" table:style-name="ce28">
            <text:p>45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7" table:style-name="ce28">
            <text:p>45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8" table:style-name="ce28">
            <text:p>45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9" table:style-name="ce28">
            <text:p>45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0" table:style-name="ce28">
            <text:p>46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1" table:style-name="ce28">
            <text:p>46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2" table:style-name="ce28">
            <text:p>46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3" table:style-name="ce28">
            <text:p>46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4" table:style-name="ce28">
            <text:p>46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5" table:style-name="ce28">
            <text:p>46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6" table:style-name="ce28">
            <text:p>46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7" table:style-name="ce28">
            <text:p>46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8" table:style-name="ce28">
            <text:p>46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9" table:style-name="ce28">
            <text:p>46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0" table:style-name="ce28">
            <text:p>47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1" table:style-name="ce28">
            <text:p>47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2" table:style-name="ce28">
            <text:p>47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3" table:style-name="ce28">
            <text:p>47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4" table:style-name="ce28">
            <text:p>47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5" table:style-name="ce28">
            <text:p>47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6" table:style-name="ce28">
            <text:p>47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7" table:style-name="ce28">
            <text:p>47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8" table:style-name="ce28">
            <text:p>47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9" table:style-name="ce28">
            <text:p>47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0" table:style-name="ce28">
            <text:p>48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1" table:style-name="ce28">
            <text:p>48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2" table:style-name="ce28">
            <text:p>48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3" table:style-name="ce28">
            <text:p>483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4" table:style-name="ce28">
            <text:p>48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5" table:style-name="ce28">
            <text:p>48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6" table:style-name="ce28">
            <text:p>48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7" table:style-name="ce28">
            <text:p>48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8" table:style-name="ce28">
            <text:p>48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9" table:style-name="ce28">
            <text:p>48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0" table:style-name="ce28">
            <text:p>49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1" table:style-name="ce28">
            <text:p>491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2" table:style-name="ce28">
            <text:p>492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3" table:style-name="ce28">
            <text:p>49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4" table:style-name="ce28">
            <text:p>494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5" table:style-name="ce28">
            <text:p>495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6" table:style-name="ce28">
            <text:p>496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7" table:style-name="ce28">
            <text:p>497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8" table:style-name="ce28">
            <text:p>498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9" table:style-name="ce28">
            <text:p>499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0" table:style-name="ce28">
            <text:p>500</text:p>
          </table:table-cell>
          <table:table-cell table:number-columns-repeated="3" table:style-name="ce29"/>
          <table:table-cell table:style-name="ce30"/>
          <table:table-cell table:style-name="ce45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number-rows-repeated="549" table:style-name="ro17">
          <table:table-cell table:number-columns-repeated="16384"/>
        </table:table-row>
        <table:table-row table:number-rows-repeated="64470" table:style-name="ro16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>Gift Aid Small Donations Scheme (GASDS) Community Buildings</dc:title>
    <meta:initial-creator>HMRC</meta:initial-creator>
    <dc:creator>Rundle, Michael</dc:creator>
    <meta:creation-date>2015-02-11T07:56:00Z</meta:creation-date>
    <dc:date>2025-11-21T16:40:31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