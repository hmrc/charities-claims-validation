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30">
      <style:table-cell-properties fo:border="thin solid #000000" style:vertical-align="automatic" fo:wrap-option="wrap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9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ackground-color="#FFFFFF"/>
    </style:style>
    <style:style style:name="ce41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2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10645833333333cm" style:use-optimal-column-width="true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0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75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45pt" style:use-optimal-row-height="tru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515]&lt;=2016;[.G515]&gt;5000))" style:apply-style-name="cf1" style:base-cell-address="R68CB_V1_00_0_EN.G515"/>
      <style:map style:condition="of:cell-content()&gt;8000" style:apply-style-name="cf1"/>
    </style:style>
    <style:style style:name="ce48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517]&lt;=2016;[.G517]&gt;5000))" style:apply-style-name="cf1" style:base-cell-address="R68CB_V1_00_0_EN.G517"/>
      <style:map style:condition="of:cell-content()&gt;8000" style:apply-style-name="cf1"/>
    </style:style>
    <style:style style:name="ce49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50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5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514]&lt;=2016;[.G514]&gt;5000))" style:apply-style-name="cf1" style:base-cell-address="R68CB_V1_00_0_EN.G514"/>
      <style:map style:condition="of:cell-content()&gt;8000" style:apply-style-name="cf1"/>
    </style:style>
    <style:style style:name="ce5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513]&lt;=2016;[.G513]&gt;5000))" style:apply-style-name="cf1" style:base-cell-address="R68CB_V1_00_0_EN.G513"/>
      <style:map style:condition="of:cell-content()&gt;8000" style:apply-style-name="cf1"/>
    </style:style>
    <style:style style:name="ce53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6"/>
        <table:table-row table:style-name="ro1">
          <table:table-cell table:style-name="ce2"/>
          <table:table-cell office:value-type="string" table:number-columns-spanned="8" table:number-rows-spanned="1" table:style-name="ce37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8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9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40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41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2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3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4">
            <text:p>Total of all amounts:</text:p>
          </table:table-cell>
          <table:covered-table-cell table:number-columns-repeated="2"/>
          <table:table-cell office:value-type="currency" office:value="15096" table:formula="of:=SUM([.G18:.G517];[.I18:.I517])" table:style-name="ce21">
            <text:p>£15,096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5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<text:s/><text:span text:style-name="T4">Vault -<text:s/></text:span><text:span text:style-name="T5">Test</text:span><text:span text:style-name="T4"><text:s/></text:span><text:span text:style-name="T6">name</text:span></text:p>
          </table:table-cell>
          <table:table-cell office:value-type="string" table:style-name="ce30">
            <text:p>50 "Helloworld" lane</text:p>
          </table:table-cell>
          <table:table-cell office:value-type="string" table:style-name="ce30">
            <text:p>L20 3UD</text:p>
          </table:table-cell>
          <table:table-cell office:value-type="float" office:value="2023" table:style-name="ce31">
            <text:p>2023</text:p>
          </table:table-cell>
          <table:table-cell office:value-type="float" office:value="1500" table:style-name="ce49">
            <text:p>1,500.00</text:p>
          </table:table-cell>
          <table:table-cell office:value-type="float" office:value="2024" table:style-name="ce31">
            <text:p>2024</text:p>
          </table:table-cell>
          <table:table-cell office:value-type="float" office:value="2500" table:style-name="ce50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est <text:s text:c="7"/>Building <text:s text:c="7"/>Name</text:p>
          </table:table-cell>
          <table:table-cell office:value-type="string" table:style-name="ce33">
            <text:p><text:s text:c="2"/>39</text:p>
            <text:p><text:s text:c="4"/>Kingsbury.</text:p>
            <text:p>Street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2000" table:style-name="ce53">
            <text:p>2,000.00</text:p>
          </table:table-cell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3">
            <text:p>Bootle Village</text:p>
            <text:p/>
            <text:p>Hall</text:p>
          </table:table-cell>
          <table:table-cell office:value-type="string" table:style-name="ce30">
            <text:p>Address: <text:s text:c="11"/>'11A Grange Road'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53">
            <text:p>1,750.00</text:p>
          </table:table-cell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4" table:style-name="ce29">
            <text:p>4</text:p>
          </table:table-cell>
          <table:table-cell office:value-type="string" table:style-name="ce34">
            <text:p>Name: John <text:s/>Doe</text:p>
          </table:table-cell>
          <table:table-cell office:value-type="string" table:style-name="ce35">
            <text:p>Address: <text:s/>123</text:p>
            <text:p>LM:</text:p>
            <text:p>Willow school</text:p>
          </table:table-cell>
          <table:table-cell office:value-type="string" table:style-name="ce30">
            <text:p>NE17 0FG</text:p>
          </table:table-cell>
          <table:table-cell office:value-type="float" office:value="2022" table:style-name="ce31">
            <text:p>2022</text:p>
          </table:table-cell>
          <table:table-cell office:value-type="float" office:value="3890" table:style-name="ce53">
            <text:p>3,890.00</text:p>
          </table:table-cell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52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51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53"/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office:value-type="string" table:style-name="ce30">
            <text:p>500th Building</text:p>
          </table:table-cell>
          <table:table-cell office:value-type="string" table:style-name="ce30">
            <text:p>120 Backworth park</text:p>
          </table:table-cell>
          <table:table-cell office:value-type="string" table:style-name="ce30">
            <text:p>NE17 0FG</text:p>
          </table:table-cell>
          <table:table-cell office:value-type="float" office:value="2024" table:style-name="ce31">
            <text:p>2024</text:p>
          </table:table-cell>
          <table:table-cell office:value-type="float" office:value="3456" table:style-name="ce48">
            <text:p>3,456.00</text:p>
          </table:table-cell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8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8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>Gift Aid Small Donations Scheme (GASDS) Community Buildings</dc:title>
    <meta:initial-creator>HMRC</meta:initial-creator>
    <dc:creator>sandip.khedekar@digital.hmrc.gov.uk</dc:creator>
    <meta:creation-date>2015-02-11T07:56:00Z</meta:creation-date>
    <dc:date>2026-06-20T19:38:20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