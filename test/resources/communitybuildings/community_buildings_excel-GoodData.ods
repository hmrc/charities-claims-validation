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20pt" style:use-optimal-row-height="fals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4"/>
        <table:table-row table:style-name="ro1">
          <table:table-cell table:style-name="ce2"/>
          <table:table-cell office:value-type="string" table:number-columns-spanned="8" table:number-rows-spanned="1" table:style-name="ce35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36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37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38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39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0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1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2">
            <text:p>Total of all amounts:</text:p>
          </table:table-cell>
          <table:covered-table-cell table:number-columns-repeated="2"/>
          <table:table-cell office:value-type="currency" office:value="7750" table:formula="of:=SUM([.G18:.G517];[.I18:.I517])" table:style-name="ce21">
            <text:p>£7,75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3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47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2500" table:style-name="ce46">
            <text:p>2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6" table:style-name="ce31">
            <text:p>2026</text:p>
          </table:table-cell>
          <table:table-cell office:value-type="float" office:value="2000" table:style-name="ce44">
            <text:p>2,000.00</text:p>
          </table:table-cell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0">
            <text:p>Bootle Village Hall</text:p>
          </table:table-cell>
          <table:table-cell office:value-type="string" table:style-name="ce30">
            <text:p>11A Grange Road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1750" table:style-name="ce44">
            <text:p>1,750.00</text:p>
          </table:table-cell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" table:style-name="ce29">
            <text:p>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7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1</meta:generator>
    <dc:title>Gift Aid Small Donations Scheme (GASDS) Community Buildings</dc:title>
    <meta:initial-creator>HMRC</meta:initial-creator>
    <dc:creator>sandip.khedekar@digital.hmrc.gov.uk</dc:creator>
    <meta:creation-date>2015-02-11T07:56:00Z</meta:creation-date>
    <dc:date>2026-04-17T14:45:59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