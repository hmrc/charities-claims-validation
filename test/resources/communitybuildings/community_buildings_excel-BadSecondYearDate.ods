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top" style:cell-protect="protecte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19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38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21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1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4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5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30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3888888888889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13972222222222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6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29.9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14.5pt" style:use-optimal-row-height="fals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name="ce50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9]&lt;=2016;[.G19]&gt;5000))" style:apply-style-name="cf1" style:base-cell-address="R68CB_V1_00_0_EN.G19"/>
      <style:map style:condition="of:cell-content()&gt;8000" style:apply-style-name="cf1"/>
    </style:style>
    <style:style style:name="ce51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5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38"/>
        <table:table-row table:style-name="ro1">
          <table:table-cell table:style-name="ce2"/>
          <table:table-cell office:value-type="string" table:number-columns-spanned="8" table:number-rows-spanned="1" table:style-name="ce39">
            <text:p>Gift Aid Small Donations Scheme (GASDS) community buildings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2">
          <table:table-cell table:style-name="ce4"/>
          <table:table-cell office:value-type="string" table:number-columns-spanned="8" table:number-rows-spanned="1" table:style-name="ce40">
            <text:p>Get it right first time - how to complete this schedule:</text:p>
          </table:table-cell>
          <table:covered-table-cell table:number-columns-repeated="7"/>
          <table:table-cell table:number-columns-repeated="16375" table:style-name="ce4"/>
        </table:table-row>
        <table:table-row table:style-name="ro3">
          <table:table-cell table:style-name="ce2"/>
          <table:table-cell office:value-type="string" table:number-columns-spanned="10" table:number-rows-spanned="1" table:style-name="ce41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2"/>
          <table:table-cell table:number-columns-repeated="15360" table:style-name="ce3"/>
        </table:table-row>
        <table:table-row table:style-name="ro4">
          <table:table-cell table:style-name="ce2"/>
          <table:table-cell table:number-columns-spanned="8" table:number-rows-spanned="1" table:style-name="ce42"/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5">
          <table:table-cell table:style-name="ce5"/>
          <table:table-cell office:value-type="string" table:number-columns-spanned="8" table:number-rows-spanned="1" table:style-name="ce43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5"/>
          <table:table-cell table:number-columns-repeated="15360" table:style-name="ce6"/>
        </table:table-row>
        <table:table-row table:style-name="ro6">
          <table:table-cell table:style-name="ce4"/>
          <table:table-cell office:value-type="string" table:number-columns-spanned="2" table:number-rows-spanned="1" table:style-name="ce44">
            <text:p><text:a xlink:href="http://www.hmrc.gov.uk/charitiesonline">Charities Online guidance</text:a>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7">
          <table:table-cell table:style-name="ce2"/>
          <table:table-cell office:value-type="string" table:style-name="ce10">
            <text:p>Fig.1</text:p>
            <text:p>Examples</text:p>
          </table:table-cell>
          <table:table-cell office:value-type="string" table:style-name="ce11">
            <text:p>Building name<text:s/></text:p>
            <text:p><text:span text:style-name="T3">(up to 160 characters)</text:span></text:p>
          </table:table-cell>
          <table:table-cell office:value-type="string" table:style-name="ce11">
            <text:p>First line of address</text:p>
            <text:p><text:span text:style-name="T3">(up to 40 characters)</text:span></text:p>
          </table:table-cell>
          <table:table-cell office:value-type="string" table:style-name="ce11">
            <text:p>Postcode</text:p>
            <text:p><text:span text:style-name="T3"><text:s/>UPPER CASE and include a space</text:span></text:p>
          </table:table-cell>
          <table:table-cell office:value-type="string" table:style-name="ce11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1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1">
            <text:p>Tax year 2 ending 5 April</text:p>
          </table:table-cell>
          <table:table-cell office:value-type="string" table:style-name="ce11">
            <text:p>Amount of donations received in tax year 2</text:p>
            <text:p>(£)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3">
            <text:p>The Vault</text:p>
          </table:table-cell>
          <table:table-cell office:value-type="string" table:style-name="ce14">
            <text:p>22 Liberty Place</text:p>
          </table:table-cell>
          <table:table-cell office:value-type="string" table:style-name="ce13">
            <text:p>L20 3UD</text:p>
          </table:table-cell>
          <table:table-cell office:value-type="string" table:style-name="ce13">
            <text:p>2014</text:p>
          </table:table-cell>
          <table:table-cell office:value-type="float" office:value="1500" table:style-name="ce15">
            <text:p>1500.00</text:p>
          </table:table-cell>
          <table:table-cell office:value-type="string" table:style-name="ce16">
            <text:p>2015</text:p>
          </table:table-cell>
          <table:table-cell office:value-type="float" office:value="2500" table:style-name="ce15">
            <text:p>2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7">
            <text:p>The Vault</text:p>
          </table:table-cell>
          <table:table-cell office:value-type="string" table:style-name="ce17">
            <text:p>22 Liberty Place</text:p>
          </table:table-cell>
          <table:table-cell office:value-type="string" table:style-name="ce17">
            <text:p>L20 3UD</text:p>
          </table:table-cell>
          <table:table-cell office:value-type="string" table:style-name="ce17">
            <text:p>2016</text:p>
          </table:table-cell>
          <table:table-cell office:value-type="float" office:value="2000" table:style-name="ce18">
            <text:p>2000.00</text:p>
          </table:table-cell>
          <table:table-cell table:number-columns-repeated="2" table:style-name="ce17"/>
          <table:table-cell table:number-columns-repeated="1015" table:style-name="ce2"/>
          <table:table-cell table:number-columns-repeated="15360" table:style-name="ce3"/>
        </table:table-row>
        <table:table-row table:style-name="ro9">
          <table:table-cell table:style-name="ce2"/>
          <table:table-cell table:style-name="ce12"/>
          <table:table-cell office:value-type="string" table:style-name="ce13">
            <text:p>Bootle Village Hall</text:p>
          </table:table-cell>
          <table:table-cell office:value-type="string" table:style-name="ce14">
            <text:p>11A Grange Road</text:p>
          </table:table-cell>
          <table:table-cell office:value-type="string" table:style-name="ce13">
            <text:p>L20 1KL</text:p>
          </table:table-cell>
          <table:table-cell office:value-type="string" table:style-name="ce13">
            <text:p>2015</text:p>
          </table:table-cell>
          <table:table-cell office:value-type="float" office:value="1750" table:style-name="ce15">
            <text:p>1750.00</text:p>
          </table:table-cell>
          <table:table-cell table:style-name="ce16"/>
          <table:table-cell table:style-name="ce19"/>
          <table:table-cell table:number-columns-repeated="1015" table:style-name="ce2"/>
          <table:table-cell table:number-columns-repeated="15360" table:style-name="ce3"/>
        </table:table-row>
        <table:table-row table:style-name="ro10">
          <table:table-cell table:number-columns-repeated="1024" table:style-name="ce2"/>
          <table:table-cell table:number-columns-repeated="15360" table:style-name="ce3"/>
        </table:table-row>
        <table:table-row table:style-name="ro11">
          <table:table-cell table:style-name="ce2"/>
          <table:table-cell office:value-type="string" table:number-columns-spanned="8" table:number-rows-spanned="1" table:style-name="ce45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2">
          <table:table-cell table:style-name="ce2"/>
          <table:table-cell table:style-name="ce20"/>
          <table:table-cell table:number-columns-repeated="3" table:style-name="ce7"/>
          <table:table-cell office:value-type="string" table:number-columns-spanned="3" table:number-rows-spanned="1" table:style-name="ce46">
            <text:p>Total of all amounts:</text:p>
          </table:table-cell>
          <table:covered-table-cell table:number-columns-repeated="2"/>
          <table:table-cell office:value-type="currency" office:value="100" table:formula="of:=SUM([.G18:.G517];[.I18:.I517])" table:style-name="ce21">
            <text:p>£1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3">
          <table:table-cell table:style-name="ce2"/>
          <table:table-cell office:value-type="string" table:number-columns-spanned="8" table:number-rows-spanned="1" table:style-name="ce47">
            <text:p>Community buildings table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4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15">
          <table:table-cell table:style-name="ce4"/>
          <table:table-cell office:value-type="string" table:style-name="ce22">
            <text:p>Item</text:p>
          </table:table-cell>
          <table:table-cell office:value-type="string" table:style-name="ce22">
            <text:p>Building name</text:p>
          </table:table-cell>
          <table:table-cell office:value-type="string" table:style-name="ce22">
            <text:p>First line of address</text:p>
          </table:table-cell>
          <table:table-cell office:value-type="string" table:style-name="ce22">
            <text:p>Postcode</text:p>
          </table:table-cell>
          <table:table-cell office:value-type="string" table:style-name="ce23">
            <text:p>Tax year 1 ending 5 April</text:p>
          </table:table-cell>
          <table:table-cell office:value-type="string" table:style-name="ce24">
            <text:p>Amount of donations received in tax year 1</text:p>
          </table:table-cell>
          <table:table-cell office:value-type="string" table:style-name="ce23">
            <text:p>Tax year 2 ending 5 April</text:p>
          </table:table-cell>
          <table:table-cell office:value-type="string" table:style-name="ce24">
            <text:p>Amount of donations received in tax year 2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4"/>
          <table:table-cell table:number-columns-repeated="3" table:style-name="ce25"/>
          <table:table-cell table:style-name="ce26"/>
          <table:table-cell table:style-name="ce27"/>
          <table:table-cell office:value-type="string" table:style-name="ce28">
            <text:p><text:s/>(£)</text:p>
          </table:table-cell>
          <table:table-cell table:style-name="ce27"/>
          <table:table-cell office:value-type="string" table:style-name="ce28">
            <text:p><text:s/>(£)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" table:style-name="ce29">
            <text:p>1</text:p>
          </table:table-cell>
          <table:table-cell office:value-type="string" table:style-name="ce48">
            <text:p>The Vault 13</text:p>
          </table:table-cell>
          <table:table-cell office:value-type="string" table:style-name="ce48">
            <text:p>23 Grange Road</text:p>
          </table:table-cell>
          <table:table-cell office:value-type="string" table:style-name="ce30">
            <text:p>L20 1KL</text:p>
          </table:table-cell>
          <table:table-cell office:value-type="float" office:value="2025" table:style-name="ce31">
            <text:p>2025</text:p>
          </table:table-cell>
          <table:table-cell office:value-type="float" office:value="50" table:style-name="ce52">
            <text:p>50.00</text:p>
          </table:table-cell>
          <table:table-cell office:value-type="string" table:style-name="ce33">
            <text:p>0000</text:p>
          </table:table-cell>
          <table:table-cell office:value-type="float" office:value="50" table:style-name="ce51">
            <text:p>5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" table:style-name="ce29">
            <text:p>2</text:p>
          </table:table-cell>
          <table:table-cell table:style-name="ce3"/>
          <table:table-cell table:number-columns-repeated="2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" table:style-name="ce29">
            <text:p>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3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" table:style-name="ce29">
            <text:p>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" table:style-name="ce29">
            <text:p>5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" table:style-name="ce29">
            <text:p>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" table:style-name="ce29">
            <text:p>7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" table:style-name="ce29">
            <text:p>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" table:style-name="ce29">
            <text:p>9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3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" table:style-name="ce29">
            <text:p>1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3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" table:style-name="ce29">
            <text:p>11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" table:style-name="ce29">
            <text:p>1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" table:style-name="ce29">
            <text:p>13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" table:style-name="ce29">
            <text:p>14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7">
          <table:table-cell table:style-name="ce2"/>
          <table:table-cell office:value-type="float" office:value="15" table:style-name="ce29">
            <text:p>15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3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" table:style-name="ce29">
            <text:p>16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" table:style-name="ce29">
            <text:p>17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5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" table:style-name="ce29">
            <text:p>1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6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" table:style-name="ce29">
            <text:p>19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7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" table:style-name="ce29">
            <text:p>20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" table:style-name="ce29">
            <text:p>21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" table:style-name="ce29">
            <text:p>22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" table:style-name="ce29">
            <text:p>23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" table:style-name="ce29">
            <text:p>24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" table:style-name="ce29">
            <text:p>25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" table:style-name="ce29">
            <text:p>26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" table:style-name="ce29">
            <text:p>27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" table:style-name="ce29">
            <text:p>28</text:p>
          </table:table-cell>
          <table:table-cell table:style-name="ce30"/>
          <table:table-cell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" table:style-name="ce29">
            <text:p>2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" table:style-name="ce29">
            <text:p>3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" table:style-name="ce29">
            <text:p>3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" table:style-name="ce29">
            <text:p>3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" table:style-name="ce29">
            <text:p>3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" table:style-name="ce29">
            <text:p>3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" table:style-name="ce29">
            <text:p>3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" table:style-name="ce29">
            <text:p>3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" table:style-name="ce29">
            <text:p>3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" table:style-name="ce29">
            <text:p>3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" table:style-name="ce29">
            <text:p>3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" table:style-name="ce29">
            <text:p>4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" table:style-name="ce29">
            <text:p>4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" table:style-name="ce29">
            <text:p>4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" table:style-name="ce29">
            <text:p>4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" table:style-name="ce29">
            <text:p>4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" table:style-name="ce29">
            <text:p>4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" table:style-name="ce29">
            <text:p>4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" table:style-name="ce29">
            <text:p>4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" table:style-name="ce29">
            <text:p>4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" table:style-name="ce29">
            <text:p>4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" table:style-name="ce29">
            <text:p>5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1" table:style-name="ce29">
            <text:p>5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2" table:style-name="ce29">
            <text:p>5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3" table:style-name="ce29">
            <text:p>5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4" table:style-name="ce29">
            <text:p>5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5" table:style-name="ce29">
            <text:p>5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6" table:style-name="ce29">
            <text:p>5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7" table:style-name="ce29">
            <text:p>5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8" table:style-name="ce29">
            <text:p>5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9" table:style-name="ce29">
            <text:p>5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0" table:style-name="ce29">
            <text:p>6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1" table:style-name="ce29">
            <text:p>6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2" table:style-name="ce29">
            <text:p>6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3" table:style-name="ce29">
            <text:p>6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4" table:style-name="ce29">
            <text:p>6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5" table:style-name="ce29">
            <text:p>6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6" table:style-name="ce29">
            <text:p>6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7" table:style-name="ce29">
            <text:p>6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8" table:style-name="ce29">
            <text:p>6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9" table:style-name="ce29">
            <text:p>6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0" table:style-name="ce29">
            <text:p>7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1" table:style-name="ce29">
            <text:p>7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2" table:style-name="ce29">
            <text:p>7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3" table:style-name="ce29">
            <text:p>7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4" table:style-name="ce29">
            <text:p>7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5" table:style-name="ce29">
            <text:p>7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6" table:style-name="ce29">
            <text:p>7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7" table:style-name="ce29">
            <text:p>7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8" table:style-name="ce29">
            <text:p>7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9" table:style-name="ce29">
            <text:p>7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0" table:style-name="ce29">
            <text:p>8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1" table:style-name="ce29">
            <text:p>8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2" table:style-name="ce29">
            <text:p>8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3" table:style-name="ce29">
            <text:p>8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4" table:style-name="ce29">
            <text:p>8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5" table:style-name="ce29">
            <text:p>8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6" table:style-name="ce29">
            <text:p>8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7" table:style-name="ce29">
            <text:p>8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8" table:style-name="ce29">
            <text:p>8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9" table:style-name="ce29">
            <text:p>8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0" table:style-name="ce29">
            <text:p>9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1" table:style-name="ce29">
            <text:p>9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2" table:style-name="ce29">
            <text:p>9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3" table:style-name="ce29">
            <text:p>9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4" table:style-name="ce29">
            <text:p>9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5" table:style-name="ce29">
            <text:p>9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6" table:style-name="ce29">
            <text:p>9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7" table:style-name="ce29">
            <text:p>9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8" table:style-name="ce29">
            <text:p>9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9" table:style-name="ce29">
            <text:p>9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0" table:style-name="ce29">
            <text:p>10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1" table:style-name="ce29">
            <text:p>10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2" table:style-name="ce29">
            <text:p>10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3" table:style-name="ce29">
            <text:p>10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4" table:style-name="ce29">
            <text:p>10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5" table:style-name="ce29">
            <text:p>10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6" table:style-name="ce29">
            <text:p>10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7" table:style-name="ce29">
            <text:p>10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8" table:style-name="ce29">
            <text:p>10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9" table:style-name="ce29">
            <text:p>10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0" table:style-name="ce29">
            <text:p>11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1" table:style-name="ce29">
            <text:p>11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2" table:style-name="ce29">
            <text:p>11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3" table:style-name="ce29">
            <text:p>11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4" table:style-name="ce29">
            <text:p>11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5" table:style-name="ce29">
            <text:p>11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6" table:style-name="ce29">
            <text:p>11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7" table:style-name="ce29">
            <text:p>11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8" table:style-name="ce29">
            <text:p>11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9" table:style-name="ce29">
            <text:p>11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0" table:style-name="ce29">
            <text:p>12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1" table:style-name="ce29">
            <text:p>12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2" table:style-name="ce29">
            <text:p>12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3" table:style-name="ce29">
            <text:p>12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4" table:style-name="ce29">
            <text:p>12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5" table:style-name="ce29">
            <text:p>12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6" table:style-name="ce29">
            <text:p>12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7" table:style-name="ce29">
            <text:p>12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8" table:style-name="ce29">
            <text:p>12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9" table:style-name="ce29">
            <text:p>12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0" table:style-name="ce29">
            <text:p>13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1" table:style-name="ce29">
            <text:p>13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2" table:style-name="ce29">
            <text:p>13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3" table:style-name="ce29">
            <text:p>13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4" table:style-name="ce29">
            <text:p>13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5" table:style-name="ce29">
            <text:p>13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6" table:style-name="ce29">
            <text:p>13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7" table:style-name="ce29">
            <text:p>13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8" table:style-name="ce29">
            <text:p>13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9" table:style-name="ce29">
            <text:p>13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0" table:style-name="ce29">
            <text:p>14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1" table:style-name="ce29">
            <text:p>14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2" table:style-name="ce29">
            <text:p>14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3" table:style-name="ce29">
            <text:p>14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4" table:style-name="ce29">
            <text:p>14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5" table:style-name="ce29">
            <text:p>14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6" table:style-name="ce29">
            <text:p>14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7" table:style-name="ce29">
            <text:p>14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8" table:style-name="ce29">
            <text:p>14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9" table:style-name="ce29">
            <text:p>14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0" table:style-name="ce29">
            <text:p>15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1" table:style-name="ce29">
            <text:p>15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2" table:style-name="ce29">
            <text:p>15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3" table:style-name="ce29">
            <text:p>15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4" table:style-name="ce29">
            <text:p>15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5" table:style-name="ce29">
            <text:p>15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6" table:style-name="ce29">
            <text:p>15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7" table:style-name="ce29">
            <text:p>15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8" table:style-name="ce29">
            <text:p>15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9" table:style-name="ce29">
            <text:p>15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0" table:style-name="ce29">
            <text:p>16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1" table:style-name="ce29">
            <text:p>16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2" table:style-name="ce29">
            <text:p>16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3" table:style-name="ce29">
            <text:p>16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4" table:style-name="ce29">
            <text:p>16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5" table:style-name="ce29">
            <text:p>16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6" table:style-name="ce29">
            <text:p>16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7" table:style-name="ce29">
            <text:p>16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8" table:style-name="ce29">
            <text:p>16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9" table:style-name="ce29">
            <text:p>16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0" table:style-name="ce29">
            <text:p>17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1" table:style-name="ce29">
            <text:p>17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2" table:style-name="ce29">
            <text:p>17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3" table:style-name="ce29">
            <text:p>17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4" table:style-name="ce29">
            <text:p>17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5" table:style-name="ce29">
            <text:p>17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6" table:style-name="ce29">
            <text:p>17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7" table:style-name="ce29">
            <text:p>17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8" table:style-name="ce29">
            <text:p>17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9" table:style-name="ce29">
            <text:p>17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0" table:style-name="ce29">
            <text:p>18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1" table:style-name="ce29">
            <text:p>18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2" table:style-name="ce29">
            <text:p>18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3" table:style-name="ce29">
            <text:p>18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4" table:style-name="ce29">
            <text:p>18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5" table:style-name="ce29">
            <text:p>18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6" table:style-name="ce29">
            <text:p>18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7" table:style-name="ce29">
            <text:p>18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8" table:style-name="ce29">
            <text:p>18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9" table:style-name="ce29">
            <text:p>18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0" table:style-name="ce29">
            <text:p>19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1" table:style-name="ce29">
            <text:p>19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2" table:style-name="ce29">
            <text:p>19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3" table:style-name="ce29">
            <text:p>19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4" table:style-name="ce29">
            <text:p>19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5" table:style-name="ce29">
            <text:p>19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6" table:style-name="ce29">
            <text:p>19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7" table:style-name="ce29">
            <text:p>19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8" table:style-name="ce29">
            <text:p>19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9" table:style-name="ce29">
            <text:p>19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0" table:style-name="ce29">
            <text:p>20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1" table:style-name="ce29">
            <text:p>20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2" table:style-name="ce29">
            <text:p>20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3" table:style-name="ce29">
            <text:p>20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4" table:style-name="ce29">
            <text:p>20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5" table:style-name="ce29">
            <text:p>20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6" table:style-name="ce29">
            <text:p>20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7" table:style-name="ce29">
            <text:p>20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8" table:style-name="ce29">
            <text:p>20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9" table:style-name="ce29">
            <text:p>20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0" table:style-name="ce29">
            <text:p>21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1" table:style-name="ce29">
            <text:p>21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2" table:style-name="ce29">
            <text:p>21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3" table:style-name="ce29">
            <text:p>21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4" table:style-name="ce29">
            <text:p>21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5" table:style-name="ce29">
            <text:p>21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6" table:style-name="ce29">
            <text:p>21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7" table:style-name="ce29">
            <text:p>21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8" table:style-name="ce29">
            <text:p>21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9" table:style-name="ce29">
            <text:p>21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0" table:style-name="ce29">
            <text:p>22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1" table:style-name="ce29">
            <text:p>22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2" table:style-name="ce29">
            <text:p>22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3" table:style-name="ce29">
            <text:p>22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4" table:style-name="ce29">
            <text:p>22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5" table:style-name="ce29">
            <text:p>22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6" table:style-name="ce29">
            <text:p>22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7" table:style-name="ce29">
            <text:p>22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8" table:style-name="ce29">
            <text:p>22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9" table:style-name="ce29">
            <text:p>22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0" table:style-name="ce29">
            <text:p>23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1" table:style-name="ce29">
            <text:p>23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2" table:style-name="ce29">
            <text:p>23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" table:style-name="ce29">
            <text:p>23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4" table:style-name="ce29">
            <text:p>23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5" table:style-name="ce29">
            <text:p>23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6" table:style-name="ce29">
            <text:p>23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7" table:style-name="ce29">
            <text:p>23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8" table:style-name="ce29">
            <text:p>23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9" table:style-name="ce29">
            <text:p>23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0" table:style-name="ce29">
            <text:p>24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1" table:style-name="ce29">
            <text:p>24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2" table:style-name="ce29">
            <text:p>24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3" table:style-name="ce29">
            <text:p>24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4" table:style-name="ce29">
            <text:p>24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5" table:style-name="ce29">
            <text:p>24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6" table:style-name="ce29">
            <text:p>24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7" table:style-name="ce29">
            <text:p>24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8" table:style-name="ce29">
            <text:p>24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9" table:style-name="ce29">
            <text:p>24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0" table:style-name="ce29">
            <text:p>25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1" table:style-name="ce29">
            <text:p>25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2" table:style-name="ce29">
            <text:p>25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3" table:style-name="ce29">
            <text:p>25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4" table:style-name="ce29">
            <text:p>25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5" table:style-name="ce29">
            <text:p>25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6" table:style-name="ce29">
            <text:p>25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7" table:style-name="ce29">
            <text:p>25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8" table:style-name="ce29">
            <text:p>25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9" table:style-name="ce29">
            <text:p>25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0" table:style-name="ce29">
            <text:p>26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1" table:style-name="ce29">
            <text:p>26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2" table:style-name="ce29">
            <text:p>26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3" table:style-name="ce29">
            <text:p>26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4" table:style-name="ce29">
            <text:p>26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5" table:style-name="ce29">
            <text:p>26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6" table:style-name="ce29">
            <text:p>26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7" table:style-name="ce29">
            <text:p>26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8" table:style-name="ce29">
            <text:p>26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9" table:style-name="ce29">
            <text:p>26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0" table:style-name="ce29">
            <text:p>27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1" table:style-name="ce29">
            <text:p>27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2" table:style-name="ce29">
            <text:p>27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3" table:style-name="ce29">
            <text:p>27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4" table:style-name="ce29">
            <text:p>27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5" table:style-name="ce29">
            <text:p>27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6" table:style-name="ce29">
            <text:p>27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7" table:style-name="ce29">
            <text:p>27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8" table:style-name="ce29">
            <text:p>27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9" table:style-name="ce29">
            <text:p>27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0" table:style-name="ce29">
            <text:p>28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1" table:style-name="ce29">
            <text:p>28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2" table:style-name="ce29">
            <text:p>28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3" table:style-name="ce29">
            <text:p>28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4" table:style-name="ce29">
            <text:p>28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5" table:style-name="ce29">
            <text:p>28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6" table:style-name="ce29">
            <text:p>28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7" table:style-name="ce29">
            <text:p>28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8" table:style-name="ce29">
            <text:p>28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9" table:style-name="ce29">
            <text:p>28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0" table:style-name="ce29">
            <text:p>29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1" table:style-name="ce29">
            <text:p>29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2" table:style-name="ce29">
            <text:p>29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3" table:style-name="ce29">
            <text:p>29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4" table:style-name="ce29">
            <text:p>29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5" table:style-name="ce29">
            <text:p>29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6" table:style-name="ce29">
            <text:p>29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7" table:style-name="ce29">
            <text:p>29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8" table:style-name="ce29">
            <text:p>29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9" table:style-name="ce29">
            <text:p>29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0" table:style-name="ce29">
            <text:p>30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1" table:style-name="ce29">
            <text:p>30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2" table:style-name="ce29">
            <text:p>30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3" table:style-name="ce29">
            <text:p>30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4" table:style-name="ce29">
            <text:p>30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5" table:style-name="ce29">
            <text:p>30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6" table:style-name="ce29">
            <text:p>30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7" table:style-name="ce29">
            <text:p>30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8" table:style-name="ce29">
            <text:p>30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9" table:style-name="ce29">
            <text:p>30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0" table:style-name="ce29">
            <text:p>31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1" table:style-name="ce29">
            <text:p>31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2" table:style-name="ce29">
            <text:p>31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3" table:style-name="ce29">
            <text:p>31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4" table:style-name="ce29">
            <text:p>31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5" table:style-name="ce29">
            <text:p>31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6" table:style-name="ce29">
            <text:p>31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7" table:style-name="ce29">
            <text:p>31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8" table:style-name="ce29">
            <text:p>31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9" table:style-name="ce29">
            <text:p>31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0" table:style-name="ce29">
            <text:p>32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1" table:style-name="ce29">
            <text:p>32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2" table:style-name="ce29">
            <text:p>32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3" table:style-name="ce29">
            <text:p>32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4" table:style-name="ce29">
            <text:p>32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5" table:style-name="ce29">
            <text:p>32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6" table:style-name="ce29">
            <text:p>32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7" table:style-name="ce29">
            <text:p>327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8" table:style-name="ce29">
            <text:p>32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9" table:style-name="ce29">
            <text:p>32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0" table:style-name="ce29">
            <text:p>33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1" table:style-name="ce29">
            <text:p>33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2" table:style-name="ce29">
            <text:p>33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3" table:style-name="ce29">
            <text:p>33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4" table:style-name="ce29">
            <text:p>33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5" table:style-name="ce29">
            <text:p>335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6" table:style-name="ce29">
            <text:p>33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7" table:style-name="ce29">
            <text:p>33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8" table:style-name="ce29">
            <text:p>33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9" table:style-name="ce29">
            <text:p>33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0" table:style-name="ce29">
            <text:p>34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1" table:style-name="ce29">
            <text:p>34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2" table:style-name="ce29">
            <text:p>34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3" table:style-name="ce29">
            <text:p>343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4" table:style-name="ce29">
            <text:p>34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5" table:style-name="ce29">
            <text:p>34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6" table:style-name="ce29">
            <text:p>34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7" table:style-name="ce29">
            <text:p>34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8" table:style-name="ce29">
            <text:p>34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9" table:style-name="ce29">
            <text:p>34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0" table:style-name="ce29">
            <text:p>35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1" table:style-name="ce29">
            <text:p>351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2" table:style-name="ce29">
            <text:p>35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3" table:style-name="ce29">
            <text:p>35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4" table:style-name="ce29">
            <text:p>35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5" table:style-name="ce29">
            <text:p>35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6" table:style-name="ce29">
            <text:p>35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7" table:style-name="ce29">
            <text:p>35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8" table:style-name="ce29">
            <text:p>35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9" table:style-name="ce29">
            <text:p>359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0" table:style-name="ce29">
            <text:p>36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1" table:style-name="ce29">
            <text:p>36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2" table:style-name="ce29">
            <text:p>36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3" table:style-name="ce29">
            <text:p>36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4" table:style-name="ce29">
            <text:p>36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5" table:style-name="ce29">
            <text:p>36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6" table:style-name="ce29">
            <text:p>36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7" table:style-name="ce29">
            <text:p>367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8" table:style-name="ce29">
            <text:p>36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9" table:style-name="ce29">
            <text:p>36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0" table:style-name="ce29">
            <text:p>37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1" table:style-name="ce29">
            <text:p>37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2" table:style-name="ce29">
            <text:p>37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3" table:style-name="ce29">
            <text:p>37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4" table:style-name="ce29">
            <text:p>37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5" table:style-name="ce29">
            <text:p>375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6" table:style-name="ce29">
            <text:p>37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7" table:style-name="ce29">
            <text:p>37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8" table:style-name="ce29">
            <text:p>37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9" table:style-name="ce29">
            <text:p>37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0" table:style-name="ce29">
            <text:p>38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1" table:style-name="ce29">
            <text:p>38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2" table:style-name="ce29">
            <text:p>38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3" table:style-name="ce29">
            <text:p>38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4" table:style-name="ce29">
            <text:p>38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5" table:style-name="ce29">
            <text:p>38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6" table:style-name="ce29">
            <text:p>38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7" table:style-name="ce29">
            <text:p>38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8" table:style-name="ce29">
            <text:p>38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9" table:style-name="ce29">
            <text:p>38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0" table:style-name="ce29">
            <text:p>39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1" table:style-name="ce29">
            <text:p>39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2" table:style-name="ce29">
            <text:p>39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3" table:style-name="ce29">
            <text:p>39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4" table:style-name="ce29">
            <text:p>39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5" table:style-name="ce29">
            <text:p>39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6" table:style-name="ce29">
            <text:p>39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7" table:style-name="ce29">
            <text:p>39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8" table:style-name="ce29">
            <text:p>39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9" table:style-name="ce29">
            <text:p>39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0" table:style-name="ce29">
            <text:p>40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1" table:style-name="ce29">
            <text:p>40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2" table:style-name="ce29">
            <text:p>402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3" table:style-name="ce29">
            <text:p>40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4" table:style-name="ce29">
            <text:p>40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5" table:style-name="ce29">
            <text:p>40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6" table:style-name="ce29">
            <text:p>40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7" table:style-name="ce29">
            <text:p>40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8" table:style-name="ce29">
            <text:p>40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9" table:style-name="ce29">
            <text:p>40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0" table:style-name="ce29">
            <text:p>410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1" table:style-name="ce29">
            <text:p>41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2" table:style-name="ce29">
            <text:p>41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3" table:style-name="ce29">
            <text:p>41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4" table:style-name="ce29">
            <text:p>41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5" table:style-name="ce29">
            <text:p>41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6" table:style-name="ce29">
            <text:p>41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7" table:style-name="ce29">
            <text:p>41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8" table:style-name="ce29">
            <text:p>418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9" table:style-name="ce29">
            <text:p>41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0" table:style-name="ce29">
            <text:p>42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1" table:style-name="ce29">
            <text:p>42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2" table:style-name="ce29">
            <text:p>42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3" table:style-name="ce29">
            <text:p>42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4" table:style-name="ce29">
            <text:p>42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5" table:style-name="ce29">
            <text:p>42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6" table:style-name="ce29">
            <text:p>426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7" table:style-name="ce29">
            <text:p>42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8" table:style-name="ce29">
            <text:p>42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9" table:style-name="ce29">
            <text:p>42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0" table:style-name="ce29">
            <text:p>43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1" table:style-name="ce29">
            <text:p>43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2" table:style-name="ce29">
            <text:p>43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3" table:style-name="ce29">
            <text:p>43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4" table:style-name="ce29">
            <text:p>434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5" table:style-name="ce29">
            <text:p>43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6" table:style-name="ce29">
            <text:p>43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7" table:style-name="ce29">
            <text:p>43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8" table:style-name="ce29">
            <text:p>43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9" table:style-name="ce29">
            <text:p>43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0" table:style-name="ce29">
            <text:p>44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1" table:style-name="ce29">
            <text:p>44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2" table:style-name="ce29">
            <text:p>44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3" table:style-name="ce29">
            <text:p>44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4" table:style-name="ce29">
            <text:p>44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5" table:style-name="ce29">
            <text:p>445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6" table:style-name="ce29">
            <text:p>44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7" table:style-name="ce29">
            <text:p>44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8" table:style-name="ce29">
            <text:p>44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9" table:style-name="ce29">
            <text:p>44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0" table:style-name="ce29">
            <text:p>45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1" table:style-name="ce29">
            <text:p>45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2" table:style-name="ce29">
            <text:p>45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3" table:style-name="ce29">
            <text:p>453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4" table:style-name="ce29">
            <text:p>45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5" table:style-name="ce29">
            <text:p>45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6" table:style-name="ce29">
            <text:p>45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7" table:style-name="ce29">
            <text:p>45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8" table:style-name="ce29">
            <text:p>45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9" table:style-name="ce29">
            <text:p>45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0" table:style-name="ce29">
            <text:p>46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1" table:style-name="ce29">
            <text:p>461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2" table:style-name="ce29">
            <text:p>46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3" table:style-name="ce29">
            <text:p>46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4" table:style-name="ce29">
            <text:p>46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5" table:style-name="ce29">
            <text:p>46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6" table:style-name="ce29">
            <text:p>46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7" table:style-name="ce29">
            <text:p>46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8" table:style-name="ce29">
            <text:p>46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9" table:style-name="ce29">
            <text:p>469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0" table:style-name="ce29">
            <text:p>47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1" table:style-name="ce29">
            <text:p>47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2" table:style-name="ce29">
            <text:p>47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3" table:style-name="ce29">
            <text:p>47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4" table:style-name="ce29">
            <text:p>47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5" table:style-name="ce29">
            <text:p>47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6" table:style-name="ce29">
            <text:p>47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7" table:style-name="ce29">
            <text:p>477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8" table:style-name="ce29">
            <text:p>47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9" table:style-name="ce29">
            <text:p>47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0" table:style-name="ce29">
            <text:p>48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1" table:style-name="ce29">
            <text:p>48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2" table:style-name="ce29">
            <text:p>48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3" table:style-name="ce29">
            <text:p>483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4" table:style-name="ce29">
            <text:p>48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5" table:style-name="ce29">
            <text:p>485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6" table:style-name="ce29">
            <text:p>48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7" table:style-name="ce29">
            <text:p>48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8" table:style-name="ce29">
            <text:p>48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9" table:style-name="ce29">
            <text:p>48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0" table:style-name="ce29">
            <text:p>49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1" table:style-name="ce29">
            <text:p>491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2" table:style-name="ce29">
            <text:p>492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3" table:style-name="ce29">
            <text:p>493</text:p>
          </table:table-cell>
          <table:table-cell table:number-columns-repeated="2" table:style-name="ce34"/>
          <table:table-cell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4" table:style-name="ce29">
            <text:p>494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5" table:style-name="ce29">
            <text:p>495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6" table:style-name="ce29">
            <text:p>496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7" table:style-name="ce29">
            <text:p>497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8" table:style-name="ce29">
            <text:p>498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9" table:style-name="ce29">
            <text:p>499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0" table:style-name="ce29">
            <text:p>500</text:p>
          </table:table-cell>
          <table:table-cell table:number-columns-repeated="3" table:style-name="ce30"/>
          <table:table-cell table:style-name="ce31"/>
          <table:table-cell table:style-name="ce50"/>
          <table:table-cell table:style-name="ce31"/>
          <table:table-cell table:style-name="ce49"/>
          <table:table-cell table:number-columns-repeated="1015" table:style-name="ce2"/>
          <table:table-cell table:number-columns-repeated="15360" table:style-name="ce3"/>
        </table:table-row>
        <table:table-row table:number-rows-repeated="11" table:style-name="ro16">
          <table:table-cell table:number-columns-repeated="1024" table:style-name="ce2"/>
          <table:table-cell table:number-columns-repeated="15360"/>
        </table:table-row>
        <table:table-row table:number-rows-repeated="528" table:style-name="ro18">
          <table:table-cell table:number-columns-repeated="16384"/>
        </table:table-row>
        <table:table-row table:number-rows-repeated="10" table:style-name="ro16">
          <table:table-cell table:number-columns-repeated="1024" table:style-name="ce2"/>
          <table:table-cell table:number-columns-repeated="15360"/>
        </table:table-row>
        <table:table-row table:number-rows-repeated="64470" table:style-name="ro16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number-rows-repeated="983040" table:style-name="ro18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date-style style:name="N38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39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title>Gift Aid Small Donations Scheme (GASDS) Community Buildings</dc:title>
    <meta:initial-creator>HMRC</meta:initial-creator>
    <dc:creator>Durojaye, Abiodun</dc:creator>
    <meta:creation-date>2015-02-11T07:56:00Z</meta:creation-date>
    <dc:date>2026-02-16T15:52:41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